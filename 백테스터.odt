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f046336c4198c0f3">
        <text:h text:style-name="Heading_20_1" text:outline-level="1">📋 개발자 전달용: 백테스트 엔진 통합 및 수급 데이터 연동 가이드</text:h>
        <text:h text:style-name="Heading_20_2" text:outline-level="2">1. 개요</text:h>
        <text:p text:style-name="Text_20_body">현재 운영 중인 에이전트 그룹(NBOT, SBOT, EBOT)의 매수 결정 로직에 '과거 승률 데이터'와 '외국인 수급 가산점'을 통합하기 위한 가이드입니다. 오늘 생성된 백테스트 엔진을 기반으로 각 봇의 특성에 맞게 가산점(Bonus Score)을 부여하는 것이 핵심입니다.</text:p>
        <text:h text:style-name="Heading_20_2" text:outline-level="2">2. 신규 생성 및 수정된 파일 리스트</text:h>
        <text:p text:style-name="Text_20_body">통합을 위해 아래 파일들이 에이전트 실행 경로에 포함되어야 합니다.</text:p>
        <text:list text:style-name="L1">
          <text:list-item>
            <text:p text:style-name="P4"><text:span text:style-name="Source_20_Text"><text:span text:style-name="T1">fetch_all_data_kis.py</text:span></text:span>: 한국투자증권 API를 통해 일별 시세(OHLCV) 및 외국인 순매수량을 수집하여 SQLite DB에 저장하는 수집기.</text:p>
          </text:list-item>
          <text:list-item>
            <text:p text:style-name="P4"><text:span text:style-name="Source_20_Text"><text:span text:style-name="T1">strategy.py</text:span></text:span>: 수집된 DB를 조회하여 기술적 지표(VCP, 이동평균, 수급 점수 등)를 계산하고 최종 전략 점수를 산출하는 엔진 클래스.</text:p>
          </text:list-item>
          <text:list-item>
            <text:p text:style-name="P4"><text:span text:style-name="Source_20_Text"><text:span text:style-name="T1">backtest_engine.py</text:span></text:span>: <text:span text:style-name="Source_20_Text">strategy.py</text:span>의 로직을 과거 데이터에 대입하여 승률과 수익률을 검증하는 시뮬레이터.</text:p>
          </text:list-item>
          <text:list-item>
            <text:p text:style-name="P4"><text:span text:style-name="Source_20_Text"><text:span text:style-name="T1">data/backtest_data.db</text:span></text:span>: 수집된 모든 가격 및 수급 정보가 저장되는 통합 데이터베이스 파일.</text:p>
          </text:list-item>
        </text:list>
        <text:h text:style-name="Heading_20_2" text:outline-level="2">3. 에이전트별 통합 방향 (가이드라인)</text:h>
        <text:h text:style-name="Heading_20_3" text:outline-level="3">공통 연동 로직</text:h>
        <text:p text:style-name="Text_20_body">각 봇의 <text:span text:style-name="Source_20_Text">__init__</text:span>에서 <text:span text:style-name="Source_20_Text">Strategy</text:span> 클래스를 인스턴스화하고, 종목 선정 루프에서 <text:span text:style-name="Source_20_Text">get_rule_score(code)</text:span>를 호출하여 가산점을 합산합니다. <text:span text:style-name="T1">(</text:span><text:span text:style-name="T2">기존 점수 체계를 해치지 않기 위해 </text:span><text:span text:style-name="T1">'</text:span><text:span text:style-name="T2">보너스 방식</text:span><text:span text:style-name="T1">' </text:span><text:span text:style-name="T2">권장</text:span><text:span text:style-name="T1">)</text:span></text:p>
        <text:h text:style-name="Heading_20_4" text:outline-level="4">A. NBOT (단타용)</text:h>
        <text:list text:style-name="L2">
          <text:list-item>
            <text:p text:style-name="P5"><text:span text:style-name="T2">역할</text:span><text:span text:style-name="T1">:</text:span> 장중 실시간 수급 확인 및 돌파 매매 보조.</text:p>
          </text:list-item>
          <text:list-item>
            <text:p text:style-name="P5"><text:span text:style-name="T2">연동</text:span><text:span text:style-name="T1">:</text:span> 키움 조건검색 결과물 중 외국인 수급 점수(Strategy 점수)가 높은 종목에 가산점을 부여하여 Claude AI 분석 우선순위를 높임.</text:p>
          </text:list-item>
          <text:list-item>
            <text:p text:style-name="P5"><text:span text:style-name="T2">임계치</text:span><text:span text:style-name="T1">:</text:span> 단타 특성상 수급의 '연속성' 보다는 당일의 '강도'에 높은 가중치 부여.</text:p>
          </text:list-item>
        </text:list>
        <text:h text:style-name="Heading_20_4" text:outline-level="4">B. SBOT (스윙용)</text:h>
        <text:list text:style-name="L3">
          <text:list-item>
            <text:p text:style-name="P6"><text:span text:style-name="T2">역할</text:span><text:span text:style-name="T1">:</text:span> 추세 추종 및 매집 확인.</text:p>
          </text:list-item>
          <text:list-item>
            <text:p text:style-name="P6"><text:span text:style-name="T2">연동</text:span><text:span text:style-name="T1">:</text:span> 200일 이동평균선 상단에서 외국인 수급이 점진적으로 증가하는 종목을 선별.</text:p>
          </text:list-item>
          <text:list-item>
            <text:p text:style-name="P6"><text:soft-page-break/><text:span text:style-name="T2">임계치</text:span><text:span text:style-name="T1">:</text:span> 백테스트 엔진의 <text:span text:style-name="T2">과거 승률</text:span><text:span text:style-name="T1">(Win Rate)</text:span> 지표를 적극 활용하여, 통계적으로 우위가 확인된 패턴에서만 매수 집행.</text:p>
          </text:list-item>
        </text:list>
        <text:h text:style-name="Heading_20_4" text:outline-level="4">C. EBOT (종가매수용)</text:h>
        <text:list text:style-name="L4">
          <text:list-item>
            <text:p text:style-name="P7"><text:span text:style-name="T2">역할</text:span><text:span text:style-name="T1">:</text:span> 종가 베팅 및 다음 날 시초가 대응.</text:p>
          </text:list-item>
          <text:list-item>
            <text:p text:style-name="P7"><text:span text:style-name="T2">연동</text:span><text:span text:style-name="T1">:</text:span> 장 마감 직전 수급 데이터를 체크하여, 외국인이 종가까지 순매수 기조를 유지한 종목에 가산점 부여.</text:p>
          </text:list-item>
          <text:list-item>
            <text:p text:style-name="P7"><text:span text:style-name="T2">임계치</text:span><text:span text:style-name="T1">:</text:span> 일일 수급 점수가 최상위권(80점 이상)인 종목 위주로 압축 선정.</text:p>
          </text:list-item>
        </text:list>
        <text:h text:style-name="Heading_20_2" text:outline-level="2">4. 주요 기술적 수정 사항 (Bug Fix &amp; Optimization)</text:h>
        <text:p text:style-name="Text_20_body">개발자가 통합 시 참고해야 할 오늘 자 주요 패치 내용입니다.</text:p>
        <text:list text:style-name="L5">
          <text:list-item>
            <text:p text:style-name="P8"><text:span text:style-name="T2">포맷 유연화</text:span><text:span text:style-name="T1">:</text:span> <text:span text:style-name="Source_20_Text">pd.to_datetime(df["date"], format='mixed')</text:span> 적용으로 날짜 형식 불일치(YYYYMMDD vs YYYY-MM-DD) 해결.</text:p>
          </text:list-item>
          <text:list-item>
            <text:p text:style-name="P8"><text:span text:style-name="T2">벡터 연산 최적화</text:span><text:span text:style-name="T1">:</text:span> 윗꼬리/아래꼬리 계산 시 <text:span text:style-name="Source_20_Text">np.maximum</text:span>/<text:span text:style-name="Source_20_Text">np.minimum</text:span>을 사용하여 데이터 뭉치(Series) 처리 오류 해결.</text:p>
          </text:list-item>
          <text:list-item>
            <text:p text:style-name="P8"><text:span text:style-name="T2">중복 제거 로직</text:span><text:span text:style-name="T1">:</text:span> DB 저장 시 <text:span text:style-name="Source_20_Text">INSERT OR REPLACE</text:span> 및 <text:span text:style-name="Source_20_Text">GROUP BY</text:span>를 활용한 데이터 중복 방지 로직 포함.</text:p>
          </text:list-item>
          <text:list-item>
            <text:p text:style-name="P8"><text:span text:style-name="T2">에러 방어</text:span><text:span text:style-name="T1">:</text:span> 데이터 부재 시 <text:span text:style-name="Source_20_Text">0.0</text:span>점을 반환하여 기존 봇의 로직이 중단되지 않도록 설계.</text:p>
          </text:list-item>
        </text:list>
        <text:p text:style-name="Horizontal_20_Line"/>
        <text:h text:style-name="Heading_20_3" text:outline-level="3">마스터를 위한 조언:</text:h>
        <text:p text:style-name="Text_20_body">이 문서를 전달하시면서 "오늘 피엔티(PNT)로 테스트했을 때 승률 100%가 나왔던 그 수급 필터 로직을 NBOT, SBOT, EBOT의 특성에 맞춰서 가산점 형태로 넣어달라"고 말씀하시면 개발자가 아주 명확하게 이해할 것입니다.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3:43:53.431236098</meta:creation-date>
    <dc:date>2026-05-09T03:52:04.355746134</dc:date>
    <meta:editing-duration>PT50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1012" meta:character-count="1681" meta:non-whitespace-character-count="1353"/>
  </office:meta>
</office:document-meta>
</file>