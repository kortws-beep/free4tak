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t &gt; /tmp/make_project_files.sh &lt;&lt; 'EOF'</text:p>
      <text:p text:style-name="Standard">#!/bin/bash</text:p>
      <text:p text:style-name="Standard">BASE="/home/free4tak/k-bot/stock_bot"</text:p>
      <text:p text:style-name="Standard">OUT="/tmp/project_docs"</text:p>
      <text:p text:style-name="Standard">mkdir -p $OUT</text:p>
      <text:p text:style-name="Standard"/>
      <text:p text:style-name="Standard"># 1. nbot 핵심</text:p>
      <text:p text:style-name="Standard">echo "=== nbot.py ===" &gt; $OUT/01_nbot_core.txt</text:p>
      <text:p text:style-name="Standard">cat $BASE/bots/nbot.py &gt;&gt; $OUT/01_nbot_core.txt</text:p>
      <text:p text:style-name="Standard">echo -e "\n\n=== nbot_order.py ===" &gt;&gt; $OUT/01_nbot_core.txt</text:p>
      <text:p text:style-name="Standard">cat $BASE/bots/nbot_order.py &gt;&gt; $OUT/01_nbot_core.txt</text:p>
      <text:p text:style-name="Standard">echo -e "\n\n=== nbot_position.py ===" &gt;&gt; $OUT/01_nbot_core.txt</text:p>
      <text:p text:style-name="Standard">cat $BASE/bots/nbot_position.py &gt;&gt; $OUT/01_nbot_core.txt</text:p>
      <text:p text:style-name="Standard"/>
      <text:p text:style-name="Standard"># 2. sbot 핵심</text:p>
      <text:p text:style-name="Standard">echo "=== sbot.py ===" &gt; $OUT/02_sbot_core.txt</text:p>
      <text:p text:style-name="Standard">cat $BASE/bots/sbot.py &gt;&gt; $OUT/02_sbot_core.txt</text:p>
      <text:p text:style-name="Standard">echo -e "\n\n=== sbot_strategy.py ===" &gt;&gt; $OUT/02_sbot_core.txt</text:p>
      <text:p text:style-name="Standard">cat $BASE/core/sbot_strategy.py &gt;&gt; $OUT/02_sbot_core.txt</text:p>
      <text:p text:style-name="Standard"/>
      <text:p text:style-name="Standard"># 3. cbot 핵심</text:p>
      <text:p text:style-name="Standard">echo "=== cbot.py ===" &gt; $OUT/03_cbot_core.txt</text:p>
      <text:p text:style-name="Standard">cat $BASE/bots/cbot.py &gt;&gt; $OUT/03_cbot_core.txt</text:p>
      <text:p text:style-name="Standard"/>
      <text:p text:style-name="Standard"># 4. kiki 핵심</text:p>
      <text:p text:style-name="Standard">echo "=== kiki.py ===" &gt; $OUT/04_kiki_core.txt</text:p>
      <text:p text:style-name="Standard">cat $BASE/interface/kiki.py &gt;&gt; $OUT/04_kiki_core.txt</text:p>
      <text:p text:style-name="Standard">echo -e "\n\n=== kiki_cmd.py ===" &gt;&gt; $OUT/04_kiki_core.txt</text:p>
      <text:p text:style-name="Standard">cat $BASE/interface/kiki_cmd.py &gt;&gt; $OUT/04_kiki_core.txt</text:p>
      <text:p text:style-name="Standard">echo -e "\n\n=== kiki_monitor.py ===" &gt;&gt; $OUT/04_kiki_core.txt</text:p>
      <text:p text:style-name="Standard">cat $BASE/interface/kiki_monitor.py &gt;&gt; $OUT/04_kiki_core.txt</text:p>
      <text:p text:style-name="Standard">echo -e "\n\n=== kiki_briefing.py ===" &gt;&gt; $OUT/04_kiki_core.txt</text:p>
      <text:p text:style-name="Standard">cat $BASE/interface/kiki_briefing.py &gt;&gt; $OUT/04_kiki_core.txt</text:p>
      <text:p text:style-name="Standard">echo -e "\n\n=== kiki_data.py ===" &gt;&gt; $OUT/04_kiki_core.txt</text:p>
      <text:p text:style-name="Standard">cat $BASE/interface/kiki_data.py &gt;&gt; $OUT/04_kiki_core.txt</text:p>
      <text:p text:style-name="Standard">echo -e "\n\n=== daily_review.py ===" &gt;&gt; $OUT/04_kiki_core.txt</text:p>
      <text:p text:style-name="Standard">cat $BASE/interface/daily_review.py &gt;&gt; $OUT/04_kiki_core.txt</text:p>
      <text:p text:style-name="Standard"/>
      <text:p text:style-name="Standard"># 5. 공통 핵심</text:p>
      <text:p text:style-name="Standard">echo "=== strategy.py ===" &gt; $OUT/05_common_core.txt</text:p>
      <text:p text:style-name="Standard">cat $BASE/core/strategy.py &gt;&gt; $OUT/05_common_core.txt</text:p>
      <text:p text:style-name="Standard">echo -e "\n\n=== risk_manager.py ===" &gt;&gt; $OUT/05_common_core.txt</text:p>
      <text:p text:style-name="Standard">cat $BASE/core/risk_manager.py &gt;&gt; $OUT/05_common_core.txt</text:p>
      <text:p text:style-name="Standard">echo -e "\n\n=== kis_api.py ===" &gt;&gt; $OUT/05_common_core.txt</text:p>
      <text:p text:style-name="Standard">cat $BASE/core/kis_api.py &gt;&gt; $OUT/05_common_core.txt</text:p>
      <text:p text:style-name="Standard">echo -e "\n\n=== master_db.py ===" &gt;&gt; $OUT/05_common_core.txt</text:p>
      <text:p text:style-name="Standard">cat $BASE/core/master_db.py &gt;&gt; $OUT/05_common_core.txt</text:p>
      <text:p text:style-name="Standard">echo -e "\n\n=== account_sync.py ===" &gt;&gt; $OUT/05_common_core.txt</text:p>
      <text:p text:style-name="Standard">cat $BASE/core/account_sync.py &gt;&gt; $OUT/05_common_core.txt</text:p>
      <text:p text:style-name="Standard">echo -e "\n\n=== ai_analyzer.py ===" &gt;&gt; $OUT/05_common_core.txt</text:p>
      <text:p text:style-name="Standard"><text:soft-page-break/>cat $BASE/intelligence/ai_analyzer.py &gt;&gt; $OUT/05_common_core.txt</text:p>
      <text:p text:style-name="Standard">echo -e "\n\n=== sector_monitor.py ===" &gt;&gt; $OUT/05_common_core.txt</text:p>
      <text:p text:style-name="Standard">cat $BASE/intelligence/sector_monitor.py &gt;&gt; $OUT/05_common_core.txt</text:p>
      <text:p text:style-name="Standard"/>
      <text:p text:style-name="Standard"># 6. 백테스터 + 주말작업</text:p>
      <text:p text:style-name="Standard">echo "=== backtest_engine.py ===" &gt; $OUT/06_backtest_core.txt</text:p>
      <text:p text:style-name="Standard">cat $BASE/backtest/backtest_engine.py &gt;&gt; $OUT/06_backtest_core.txt</text:p>
      <text:p text:style-name="Standard">echo -e "\n\n=== run_backtest.py ===" &gt;&gt; $OUT/06_backtest_core.txt</text:p>
      <text:p text:style-name="Standard">cat $BASE/backtest/run_backtest.py &gt;&gt; $OUT/06_backtest_core.txt</text:p>
      <text:p text:style-name="Standard">echo -e "\n\n=== sbot_backtest_engine.py ===" &gt;&gt; $OUT/06_backtest_core.txt</text:p>
      <text:p text:style-name="Standard">cat $BASE/backtest/sbot_backtest_engine.py &gt;&gt; $OUT/06_backtest_core.txt</text:p>
      <text:p text:style-name="Standard">echo -e "\n\n=== run_sbot_backtest.py ===" &gt;&gt; $OUT/06_backtest_core.txt</text:p>
      <text:p text:style-name="Standard">cat $BASE/backtest/run_sbot_backtest.py &gt;&gt; $OUT/06_backtest_core.txt</text:p>
      <text:p text:style-name="Standard">echo -e "\n\n=== weekly_review.sh ===" &gt;&gt; $OUT/06_backtest_core.txt</text:p>
      <text:p text:style-name="Standard">cat $BASE/backtest/weekly_review.sh &gt;&gt; $OUT/06_backtest_core.txt</text:p>
      <text:p text:style-name="Standard">echo -e "\n\n=== bot.sh ===" &gt;&gt; $OUT/06_backtest_core.txt</text:p>
      <text:p text:style-name="Standard">cat $BASE/bot.sh &gt;&gt; $OUT/06_backtest_core.txt</text:p>
      <text:p text:style-name="Standard"/>
      <text:p text:style-name="Standard"># 7. 세션 로그 (현재 상태 + 작업이력)</text:p>
      <text:p text:style-name="Standard">cat &gt; $OUT/07_session_log.txt &lt;&lt; 'LOGEOF'</text:p>
      <text:p text:style-name="Standard"># 영암9 자동매매 시스템 세션 로그</text:p>
      <text:p text:style-name="Standard"># 최종 업데이트: 2026-05-27</text:p>
      <text:p text:style-name="Standard"/>
      <text:p text:style-name="Standard">## 시스템 구조</text:p>
      <text:p text:style-name="Standard">- nbot: 단타봇 (KIS 1계좌, 115만원 테스트)</text:p>
      <text:p text:style-name="Standard">- sbot: 스윙봇 (KIS 2계좌, 39만원 테스트)</text:p>
      <text:p text:style-name="Standard">- cbot: 코인봇 (업비트, 94만원 테스트)</text:p>
      <text:p text:style-name="Standard">- kiki: 디스코드 AI 비서</text:p>
      <text:p text:style-name="Standard">- sector_monitor: 테마/업종 수집 봇</text:p>
      <text:p text:style-name="Standard"/>
      <text:p text:style-name="Standard">## 현재 설정</text:p>
      <text:p text:style-name="Standard">- nbot: BUY_SCORE_ENTER=67(동적), MAX_POSITIONS=3, BUY_1ST_AMT_BASE=300,000</text:p>
      <text:p text:style-name="Standard">- sbot: BUY_SCORE_ENTER=80, MAX_POSITIONS=3, BUY_1ST_AMT_BASE=330,000</text:p>
      <text:p text:style-name="Standard">- cbot: LOOP_SLEEP=30, NIGHT_START=1, NIGHT_END=5, WebSocket 실시간</text:p>
      <text:p text:style-name="Standard"/>
      <text:p text:style-name="Standard">## 파일 경로</text:p>
      <text:p text:style-name="Standard">- 봇: /home/free4tak/k-bot/stock_bot/bots/</text:p>
      <text:p text:style-name="Standard">- 코어: /home/free4tak/k-bot/stock_bot/core/</text:p>
      <text:p text:style-name="Standard">- 인터페이스: /home/free4tak/k-bot/stock_bot/interface/</text:p>
      <text:p text:style-name="Standard">- 백테스터: /home/free4tak/k-bot/stock_bot/backtest/</text:p>
      <text:p text:style-name="Standard">- 인텔리전스: /home/free4tak/k-bot/stock_bot/intelligence/</text:p>
      <text:p text:style-name="Standard"/>
      <text:p text:style-name="Standard">## DB 파일</text:p>
      <text:p text:style-name="Standard">- master_trades.db: 통합 매매 기록</text:p>
      <text:p text:style-name="Standard">- trade_history.db: nbot 매매 기록</text:p>
      <text:p text:style-name="Standard">- sbot_trade_history.db: sbot 매매 기록</text:p>
      <text:p text:style-name="Standard">- cbot_trade_history.db: cbot 매매 기록</text:p>
      <text:p text:style-name="Standard">- sector_monitor.db: 테마/업종 데이터</text:p>
      <text:p text:style-name="Standard">- ai_cache.db: AI 분석 캐시</text:p>
      <text:p text:style-name="Standard"/>
      <text:p text:style-name="Standard"><text:soft-page-break/>## 최근 주요 작업 이력 (2026-05-22~27)</text:p>
      <text:p text:style-name="Standard">### nbot</text:p>
      <text:p text:style-name="Standard">- positions 레퍼런스 버그 수정</text:p>
      <text:p text:style-name="Standard">- buy_tags 누락 버그 수정 (do_buy에서 buy_tags 저장)</text:p>
      <text:p text:style-name="Standard">- 수동매도 감지 → sold_today 자동 추가</text:p>
      <text:p text:style-name="Standard">- accel 가산점 추가 (sector_monitor 연동)</text:p>
      <text:p text:style-name="Standard">- 교차 보유 방지 (sbot 보유종목 매수 제외)</text:p>
      <text:p text:style-name="Standard">- 슬롯 없으면 신규 분석 스킵</text:p>
      <text:p text:style-name="Standard">- AI 프롬프트 개선 (기본 60점, 점수 기준 현실화)</text:p>
      <text:p text:style-name="Standard">- AI 캐시 초기화</text:p>
      <text:p text:style-name="Standard"/>
      <text:p text:style-name="Standard">### sbot</text:p>
      <text:p text:style-name="Standard">- load_dotenv 경로 버그 수정</text:p>
      <text:p text:style-name="Standard">- pending_orders 무한루프 버그 수정</text:p>
      <text:p text:style-name="Standard">- orgno/odno 분리 (미체결 취소 정상화)</text:p>
      <text:p text:style-name="Standard">- peak_tracker 잔량 동기화</text:p>
      <text:p text:style-name="Standard">- 2차 매수 조건 강화 (MA20+시장normal+거래량)</text:p>
      <text:p text:style-name="Standard">- 2차 매수 금액 수정 (100만→10만)</text:p>
      <text:p text:style-name="Standard">- ATR 손절 로직 수정 (max→min)</text:p>
      <text:p text:style-name="Standard">- 스윙 테마 지속성 가산점 (sector_monitor 연동)</text:p>
      <text:p text:style-name="Standard">- 교차 보유 방지 (nbot 보유종목 매수 제외)</text:p>
      <text:p text:style-name="Standard">- 미너비니 방식 1종목 추가 (_get_minervini_pick)</text:p>
      <text:p text:style-name="Standard">- 미너비니 종목 20영업일 보유 + 200일선 이탈 청산</text:p>
      <text:p text:style-name="Standard"/>
      <text:p text:style-name="Standard">### cbot</text:p>
      <text:p text:style-name="Standard">- positions 레퍼런스 버그 수정</text:p>
      <text:p text:style-name="Standard">- load_dotenv 경로 수정</text:p>
      <text:p text:style-name="Standard">- master_db profit_rate 오류 수정</text:p>
      <text:p text:style-name="Standard">- 야간 급락감지 완화 (-5% → -8%)</text:p>
      <text:p text:style-name="Standard">- 야간 시간대 조정 (00~06 → 01~05시)</text:p>
      <text:p text:style-name="Standard">- BTC 디커플링 대응 (알트 자체 상태)</text:p>
      <text:p text:style-name="Standard">- 1시간봉 매수 조건 추가 (멀티 타임프레임)</text:p>
      <text:p text:style-name="Standard">- WebSocket 실시간 현재가</text:p>
      <text:p text:style-name="Standard">- 루프 30초 단축</text:p>
      <text:p text:style-name="Standard"/>
      <text:p text:style-name="Standard">### kiki</text:p>
      <text:p text:style-name="Standard">- ebot 완전 제거</text:p>
      <text:p text:style-name="Standard">- 봇 헬스체크 + 자동재시작 (5분→알림, 10분→재시작)</text:p>
      <text:p text:style-name="Standard">- bot.sh 개별 재시작 기능</text:p>
      <text:p text:style-name="Standard">- !매도 실계좌 조회 루틴</text:p>
      <text:p text:style-name="Standard">- cmd_buy 종목명 변환 추가</text:p>
      <text:p text:style-name="Standard">- 승률 계산 오류 수정</text:p>
      <text:p text:style-name="Standard">- _get_ai() None 처리</text:p>
      <text:p text:style-name="Standard">- 날씨 도포면만 표시</text:p>
      <text:p text:style-name="Standard">- 어젯밤 발표결과 max_tokens 200→600</text:p>
      <text:p text:style-name="Standard"/>
      <text:p text:style-name="Standard">### 공통</text:p>
      <text:p text:style-name="Standard">- DB 정합성 체크 (account_sync.py — nbot/sbot/cbot)</text:p>
      <text:p text:style-name="Standard">- daily_review score_enter 자동 조정</text:p>
      <text:p text:style-name="Standard">- performance.py master_trades 수정</text:p>
      <text:p text:style-name="Standard"><text:soft-page-break/></text:p>
      <text:p text:style-name="Standard">### 백테스터</text:p>
      <text:p text:style-name="Standard">- peak_tracker 잔량 동기화 버그 수정</text:p>
      <text:p text:style-name="Standard">- sbot 백테스터 now_t 인자 추가</text:p>
      <text:p text:style-name="Standard">- 백테스트 시나리오 추가 (익절상향 등)</text:p>
      <text:p text:style-name="Standard">- 시나리오 간 상수 격리 (importlib.reload)</text:p>
      <text:p text:style-name="Standard"/>
      <text:p text:style-name="Standard">## 로드맵</text:p>
      <text:p text:style-name="Standard">- 본격 시드 투입 시: 통합 리스크 매니저</text:p>
      <text:p text:style-name="Standard">- 30일 후: sector_monitor 시간대별/순환매 패턴 분석</text:p>
      <text:p text:style-name="Standard">- 3개월 후: sbot 재백테스트</text:p>
      <text:p text:style-name="Standard">- 6개월 후: Redis 메시지 큐</text:p>
      <text:p text:style-name="Standard">- 1년 후: 로컬 AI 파인튜닝</text:p>
      <text:p text:style-name="Standard"/>
      <text:p text:style-name="Standard">## PENDING 작업</text:p>
      <text:p text:style-name="Standard">- sbot !상태 등락률 실시간 (장 중 확인 필요)</text:p>
      <text:p text:style-name="Standard">- vol_ratio 2차 매수 실제 연동 (현재 True 고정)</text:p>
      <text:p text:style-name="Standard">- master_trades 통합 (분할매도 포함)</text:p>
      <text:p text:style-name="Standard">- sbot 리팩토링 (sbot_order.py, sbot_position.py 분리)</text:p>
      <text:p text:style-name="Standard">LOGEOF</text:p>
      <text:p text:style-name="Standard"/>
      <text:p text:style-name="Standard">echo "✅ 완료!"</text:p>
      <text:p text:style-name="Standard">ls -lh $OUT/</text:p>
      <text:p text:style-name="Standard">EOF</text:p>
      <text:p text:style-name="Standard">bash /tmp/make_project_files.sh</text:p>
      <text:p text:style-name="Standard"/>
      <text:p text:style-name="Standard">mkdir -p /home/free4tak/project_docs</text:p>
      <text:p text:style-name="Standard">cp /tmp/project_docs/* /home/free4tak/project_docs/</text:p>
      <text:p text:style-name="Standard">ls -lh /home/free4tak/project_docs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08:10:13.646086439</meta:creation-date>
    <dc:date>2026-05-27T08:13:18.578821910</dc:date>
    <meta:editing-duration>PT3M5S</meta:editing-duration>
    <meta:editing-cycles>1</meta:editing-cycles>
    <meta:document-statistic meta:table-count="0" meta:image-count="0" meta:object-count="0" meta:page-count="4" meta:paragraph-count="158" meta:word-count="1253" meta:character-count="5685" meta:non-whitespace-character-count="5054"/>
    <meta:generator>LibreOffice/24.2.7.2$Linux_X86_64 LibreOffice_project/420$Build-2</meta:generator>
  </office:meta>
</office:document-meta>
</file>