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left="0cm" fo:margin-right="0cm" fo:text-indent="0cm" style:auto-text-indent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🚀 🎯 포함된 기능 (최종 정리)</text:h>
      <text:section text:style-name="Sect1" text:name="code-block-viewer">
        <text:h text:style-name="P1" text:outline-level="1">🎯 사용법 (진짜 간단)</text:h>
        <text:h text:style-name="Heading_20_2" text:outline-level="2">자동매매</text:h>
        <text:section text:style-name="Sect1" text:name="구역1">
          <text:p text:style-name="P2"><text:bookmark text:name="code-block-viewer"/>python bot.py</text:p>
          <text:p text:style-name="Preformatted_20_Text">→ run 입력</text:p>
        </text:section>
        <text:h text:style-name="Heading_20_1" text:outline-level="1">🚀 🎯 포함 기능 (최종)</text:h>
        <text:section text:style-name="Sect1" text:name="구역2">
          <text:p text:style-name="P2"><text:bookmark text:name="code-block-viewer Copy 2"/>✔ 자동매매</text:p>
          <text:p text:style-name="Preformatted_20_Text">✔ 시장 판단 (안정화)</text:p>
          <text:p text:style-name="Preformatted_20_Text">✔ AI TOP3 점수 선택</text:p>
          <text:p text:style-name="Preformatted_20_Text">✔ 손절 / 익절</text:p>
          <text:p text:style-name="Preformatted_20_Text">✔ 디스코드 상세 로그</text:p>
          <text:p text:style-name="Preformatted_20_Text">✔ 리포트 기능</text:p>
          <text:p text:style-name="Preformatted_20_Text">✔ 예외처리 (안죽음)</text:p>
          <text:p text:style-name="Preformatted_20_Text">✔ 상태 저장 (포지션 유지)</text:p>
        </text:section>
        <text:p text:style-name="Text_20_body"/>
        <text:p text:style-name="P2"/>
        <text:p text:style-name="P2"/>
        <text:p text:style-name="P2">import os</text:p>
        <text:p text:style-name="P2">import requests</text:p>
        <text:p text:style-name="P2">import json</text:p>
        <text:p text:style-name="P2">import time</text:p>
        <text:p text:style-name="P2">import datetime</text:p>
        <text:p text:style-name="P2">from anthropic import Anthropic</text:p>
        <text:p text:style-name="P2">from dotenv import load_dotenv</text:p>
        <text:p text:style-name="P2"/>
        <text:p text:style-name="P2">load_dotenv()</text:p>
        <text:p text:style-name="P2"/>
        <text:p text:style-name="P2">APP_KEY = os.getenv("KIS_APPKEY")</text:p>
        <text:p text:style-name="P2">APP_SECRET = os.getenv("KIS_SECRET")</text:p>
        <text:p text:style-name="P2">DISCORD_WEBHOOK = os.getenv("DISCORD_WEBHOOK_URL")</text:p>
        <text:p text:style-name="P2">ANTHROPIC_KEY = os.getenv("ANTHROPIC_API_KEY")</text:p>
        <text:p text:style-name="P2"/>
        <text:p text:style-name="P2">URL_BASE = "https://openapi.koreainvestment.com:9443"</text:p>
        <text:p text:style-name="P2"/>
        <text:p text:style-name="P2">STATE_FILE = "positions.json"</text:p>
        <text:p text:style-name="P2">LOG_FILE = "trade_log.json"</text:p>
        <text:p text:style-name="P2"/>
        <text:p text:style-name="P2">MAX_STOCKS = 4</text:p>
        <text:p text:style-name="P2"/>
        <text:p text:style-name="P2"/>
        <text:p text:style-name="P2">class FinalTrader:</text:p>
        <text:p text:style-name="P2"><text:s text:c="4"/>def __init__(self):</text:p>
        <text:p text:style-name="P2"><text:s text:c="8"/>self.token = self.get_token()</text:p>
        <text:p text:style-name="P2"><text:s text:c="8"/>self.ai = Anthropic(api_key=ANTHROPIC_KEY)</text:p>
        <text:p text:style-name="P2"><text:s text:c="8"/>self.positions = self.load_json(STATE_FILE, {})</text:p>
        <text:p text:style-name="P2"><text:soft-page-break/><text:s text:c="8"/>self.logs = self.load_json(LOG_FILE, [])</text:p>
        <text:p text:style-name="P2"><text:s text:c="8"/>self.start_kospi = None</text:p>
        <text:p text:style-name="P2"><text:s text:c="8"/>self.cached_stocks = []</text:p>
        <text:p text:style-name="P2"/>
        <text:p text:style-name="P2"><text:s text:c="4"/>def load_json(self, file, default):</text:p>
        <text:p text:style-name="P2"><text:s text:c="8"/>try:</text:p>
        <text:p text:style-name="P2"><text:s text:c="12"/>if os.path.exists(file):</text:p>
        <text:p text:style-name="P2"><text:s text:c="16"/>with open(file, "r") as f:</text:p>
        <text:p text:style-name="P2"><text:s text:c="20"/>return json.load(f)</text:p>
        <text:p text:style-name="P2"><text:s text:c="8"/>except:</text:p>
        <text:p text:style-name="P2"><text:s text:c="12"/>pass</text:p>
        <text:p text:style-name="P2"><text:s text:c="8"/>return default</text:p>
        <text:p text:style-name="P2"/>
        <text:p text:style-name="P2"><text:s text:c="4"/>def save_json(self, file, data):</text:p>
        <text:p text:style-name="P2"><text:s text:c="8"/>try:</text:p>
        <text:p text:style-name="P2"><text:s text:c="12"/>with open(file, "w") as f:</text:p>
        <text:p text:style-name="P2"><text:s text:c="16"/>json.dump(data, f, indent=2)</text:p>
        <text:p text:style-name="P2"><text:s text:c="8"/>except:</text:p>
        <text:p text:style-name="P2"><text:s text:c="12"/>pass</text:p>
        <text:p text:style-name="P2"/>
        <text:p text:style-name="P2"><text:s text:c="4"/>def send_discord(self, msg):</text:p>
        <text:p text:style-name="P2"><text:s text:c="8"/>try:</text:p>
        <text:p text:style-name="P2"><text:s text:c="12"/>requests.post(DISCORD_WEBHOOK, json={"content": msg})</text:p>
        <text:p text:style-name="P2"><text:s text:c="8"/>except:</text:p>
        <text:p text:style-name="P2"><text:s text:c="12"/>pass</text:p>
        <text:p text:style-name="P2"/>
        <text:p text:style-name="P2"><text:s text:c="4"/>def get_token(self):</text:p>
        <text:p text:style-name="P2"><text:s text:c="8"/>try:</text:p>
        <text:p text:style-name="P2"><text:s text:c="12"/>res = requests.post(f"{URL_BASE}/oauth2/tokenP", json={</text:p>
        <text:p text:style-name="P2"><text:s text:c="16"/>"grant_type": "client_credentials",</text:p>
        <text:p text:style-name="P2"><text:s text:c="16"/>"appkey": APP_KEY,</text:p>
        <text:p text:style-name="P2"><text:s text:c="16"/>"appsecret": APP_SECRET</text:p>
        <text:p text:style-name="P2"><text:s text:c="12"/>})</text:p>
        <text:p text:style-name="P2"><text:s text:c="12"/>return res.json().get("access_token")</text:p>
        <text:p text:style-name="P2"><text:s text:c="8"/>except:</text:p>
        <text:p text:style-name="P2"><text:s text:c="12"/>return None</text:p>
        <text:p text:style-name="P2"/>
        <text:p text:style-name="P2"><text:s text:c="4"/>def get_price(self, code):</text:p>
        <text:p text:style-name="P2"><text:s text:c="8"/>try:</text:p>
        <text:p text:style-name="P2"><text:s text:c="12"/>res = requests.get(</text:p>
        <text:p text:style-name="P2"><text:s text:c="16"/>f"{URL_BASE}/uapi/domestic-stock/v1/quotations/inquire-price",</text:p>
        <text:p text:style-name="P2"><text:s text:c="16"/>headers={</text:p>
        <text:p text:style-name="P2"><text:s text:c="20"/>"authorization": f"Bearer {self.token}",</text:p>
        <text:p text:style-name="P2"><text:s text:c="20"/>"appKey": APP_KEY,</text:p>
        <text:p text:style-name="P2"><text:s text:c="20"/>"appSecret": APP_SECRET,</text:p>
        <text:p text:style-name="P2"><text:s text:c="20"/>"tr_id": "FHKST01010100"</text:p>
        <text:p text:style-name="P2"><text:s text:c="16"/>},</text:p>
        <text:p text:style-name="P2"><text:s text:c="16"/>params={"fid_input_iscd": code}</text:p>
        <text:p text:style-name="P2"><text:s text:c="12"/>)</text:p>
        <text:p text:style-name="P2"><text:s text:c="12"/>return int(res.json().get("output", {}).get("stck_prpr", 0))</text:p>
        <text:p text:style-name="P2"><text:s text:c="8"/>except:</text:p>
        <text:p text:style-name="P2"><text:soft-page-break/><text:s text:c="12"/>return 0</text:p>
        <text:p text:style-name="P2"/>
        <text:p text:style-name="P2"><text:s text:c="4"/>def get_market_status(self):</text:p>
        <text:p text:style-name="P2"><text:s text:c="8"/>kospi = self.get_price("005930")</text:p>
        <text:p text:style-name="P2"/>
        <text:p text:style-name="P2"><text:s text:c="8"/>if kospi == 0:</text:p>
        <text:p text:style-name="P2"><text:s text:c="12"/>return "SIDE"</text:p>
        <text:p text:style-name="P2"/>
        <text:p text:style-name="P2"><text:s text:c="8"/>if self.start_kospi is None:</text:p>
        <text:p text:style-name="P2"><text:s text:c="12"/>self.start_kospi = kospi</text:p>
        <text:p text:style-name="P2"><text:s text:c="12"/>return "SIDE"</text:p>
        <text:p text:style-name="P2"/>
        <text:p text:style-name="P2"><text:s text:c="8"/>change = (kospi - self.start_kospi) / self.start_kospi * 100</text:p>
        <text:p text:style-name="P2"/>
        <text:p text:style-name="P2"><text:s text:c="8"/>if change &gt; 0.5:</text:p>
        <text:p text:style-name="P2"><text:s text:c="12"/>return "BULL"</text:p>
        <text:p text:style-name="P2"><text:s text:c="8"/>elif change &lt; -0.5:</text:p>
        <text:p text:style-name="P2"><text:s text:c="12"/>return "BEAR"</text:p>
        <text:p text:style-name="P2"><text:s text:c="8"/>else:</text:p>
        <text:p text:style-name="P2"><text:s text:c="12"/>return "SIDE"</text:p>
        <text:p text:style-name="P2"/>
        <text:p text:style-name="P2"><text:s text:c="4"/>def get_invest_amount(self, market):</text:p>
        <text:p text:style-name="P2"><text:s text:c="8"/>return 200000 if market == "BULL" else 100000 if market == "SIDE" else 0</text:p>
        <text:p text:style-name="P2"/>
        <text:p text:style-name="P2"><text:s text:c="4"/>def get_risk_params(self, market):</text:p>
        <text:p text:style-name="P2"><text:s text:c="8"/>return (0.95, 1.08) if market == "BULL" else (0.97, 1.05)</text:p>
        <text:p text:style-name="P2"/>
        <text:p text:style-name="P2"><text:s text:c="4"/>def pick_ai(self, stocks):</text:p>
        <text:p text:style-name="P2"><text:s text:c="8"/>try:</text:p>
        <text:p text:style-name="P2"><text:s text:c="12"/>text = "\n".join([</text:p>
        <text:p text:style-name="P2"><text:s text:c="16"/>f"{s['name']}|{s['code']}|{int(float(s['price']))}"</text:p>
        <text:p text:style-name="P2"><text:s text:c="16"/>for s in stocks[:20]</text:p>
        <text:p text:style-name="P2"><text:s text:c="12"/>])</text:p>
        <text:p text:style-name="P2"/>
        <text:p text:style-name="P2"><text:s text:c="12"/>prompt = f"""</text:p>
        <text:p text:style-name="P2">TOP3 종목 선택</text:p>
        <text:p text:style-name="P2"/>
        <text:p text:style-name="P2">형식:</text:p>
        <text:p text:style-name="P2">이름|코드|가격|점수</text:p>
        <text:p text:style-name="P2"/>
        <text:p text:style-name="P2">{text}</text:p>
        <text:p text:style-name="P2">"""</text:p>
        <text:p text:style-name="P2"/>
        <text:p text:style-name="P2"><text:s text:c="12"/>msg = self.ai.messages.create(</text:p>
        <text:p text:style-name="P2"><text:s text:c="16"/>model="claude-haiku-4-5-20251001",</text:p>
        <text:p text:style-name="P2"><text:s text:c="16"/>max_tokens=300,</text:p>
        <text:p text:style-name="P2"><text:s text:c="16"/>messages=[{"role": "user", "content": prompt}]</text:p>
        <text:p text:style-name="P2"><text:s text:c="12"/>)</text:p>
        <text:p text:style-name="P2"/>
        <text:p text:style-name="P2"><text:s text:c="12"/>lines = msg.content[0].text.strip().split("\n")</text:p>
        <text:p text:style-name="P2"/>
        <text:p text:style-name="P2"><text:s text:c="12"/>candidates = []</text:p>
        <text:p text:style-name="P2"/>
        <text:p text:style-name="P2"><text:soft-page-break/><text:s text:c="12"/>for line in lines:</text:p>
        <text:p text:style-name="P2"><text:s text:c="16"/>parts = line.split("|")</text:p>
        <text:p text:style-name="P2"><text:s text:c="16"/>if len(parts) &lt; 4:</text:p>
        <text:p text:style-name="P2"><text:s text:c="20"/>continue</text:p>
        <text:p text:style-name="P2"/>
        <text:p text:style-name="P2"><text:s text:c="16"/>candidates.append({</text:p>
        <text:p text:style-name="P2"><text:s text:c="20"/>"name": parts[0].strip(),</text:p>
        <text:p text:style-name="P2"><text:s text:c="20"/>"code": parts[1].strip(),</text:p>
        <text:p text:style-name="P2"><text:s text:c="20"/>"price": int(''.join(filter(str.isdigit, parts[2]))),</text:p>
        <text:p text:style-name="P2"><text:s text:c="20"/>"score": int(''.join(filter(str.isdigit, parts[3])))</text:p>
        <text:p text:style-name="P2"><text:s text:c="16"/>})</text:p>
        <text:p text:style-name="P2"/>
        <text:p text:style-name="P2"><text:s text:c="12"/>if not candidates:</text:p>
        <text:p text:style-name="P2"><text:s text:c="16"/>return None</text:p>
        <text:p text:style-name="P2"/>
        <text:p text:style-name="P2"><text:s text:c="12"/>best = max(candidates, key=lambda x: x["score"])</text:p>
        <text:p text:style-name="P2"><text:s text:c="12"/>return best, candidates</text:p>
        <text:p text:style-name="P2"/>
        <text:p text:style-name="P2"><text:s text:c="8"/>except:</text:p>
        <text:p text:style-name="P2"><text:s text:c="12"/>return None</text:p>
        <text:p text:style-name="P2"/>
        <text:p text:style-name="P2"><text:s text:c="4"/>def fetch(self, seq):</text:p>
        <text:p text:style-name="P2"><text:s text:c="8"/>try:</text:p>
        <text:p text:style-name="P2"><text:s text:c="12"/>res = requests.get(</text:p>
        <text:p text:style-name="P2"><text:s text:c="16"/>f"{URL_BASE}/uapi/domestic-stock/v1/quotations/psearch-result",</text:p>
        <text:p text:style-name="P2"><text:s text:c="16"/>headers={</text:p>
        <text:p text:style-name="P2"><text:s text:c="20"/>"authorization": f"Bearer {self.token}",</text:p>
        <text:p text:style-name="P2"><text:s text:c="20"/>"appKey": APP_KEY,</text:p>
        <text:p text:style-name="P2"><text:s text:c="20"/>"appSecret": APP_SECRET,</text:p>
        <text:p text:style-name="P2"><text:s text:c="20"/>"tr_id": "HHKST03900400"</text:p>
        <text:p text:style-name="P2"><text:s text:c="16"/>},</text:p>
        <text:p text:style-name="P2"><text:s text:c="16"/>params={"user_id": "youngam9", "seq": seq}</text:p>
        <text:p text:style-name="P2"><text:s text:c="12"/>)</text:p>
        <text:p text:style-name="P2"><text:s text:c="12"/>return res.json().get("output2", [])</text:p>
        <text:p text:style-name="P2"><text:s text:c="8"/>except:</text:p>
        <text:p text:style-name="P2"><text:s text:c="12"/>return []</text:p>
        <text:p text:style-name="P2"/>
        <text:p text:style-name="P2"><text:s text:c="4"/>def buy(self, code, name, price, qty):</text:p>
        <text:p text:style-name="P2"><text:s text:c="8"/>self.positions[code] = {"name": name, "buy": price, "qty": qty}</text:p>
        <text:p text:style-name="P2"><text:s text:c="8"/>self.save_json(STATE_FILE, self.positions)</text:p>
        <text:p text:style-name="P2"/>
        <text:p text:style-name="P2"><text:s text:c="8"/>self.logs.append({</text:p>
        <text:p text:style-name="P2"><text:s text:c="12"/>"type": "BUY",</text:p>
        <text:p text:style-name="P2"><text:s text:c="12"/>"name": name,</text:p>
        <text:p text:style-name="P2"><text:s text:c="12"/>"price": price,</text:p>
        <text:p text:style-name="P2"><text:s text:c="12"/>"qty": qty,</text:p>
        <text:p text:style-name="P2"><text:s text:c="12"/>"time": str(datetime.datetime.now())</text:p>
        <text:p text:style-name="P2"><text:s text:c="8"/>})</text:p>
        <text:p text:style-name="P2"><text:s text:c="8"/>self.save_json(LOG_FILE, self.logs)</text:p>
        <text:p text:style-name="P2"/>
        <text:p text:style-name="P2"><text:s text:c="8"/>self.send_discord(f"🛒 매수 {name} {price}원")</text:p>
        <text:p text:style-name="P2"><text:soft-page-break/></text:p>
        <text:p text:style-name="P2"><text:s text:c="4"/>def sell(self, code):</text:p>
        <text:p text:style-name="P2"><text:s text:c="8"/>pos = self.positions[code]</text:p>
        <text:p text:style-name="P2"><text:s text:c="8"/>price = self.get_price(code)</text:p>
        <text:p text:style-name="P2"/>
        <text:p text:style-name="P2"><text:s text:c="8"/>if price == 0:</text:p>
        <text:p text:style-name="P2"><text:s text:c="12"/>return</text:p>
        <text:p text:style-name="P2"/>
        <text:p text:style-name="P2"><text:s text:c="8"/>profit = (price - pos["buy"]) * pos["qty"]</text:p>
        <text:p text:style-name="P2"><text:s text:c="8"/>rate = (price - pos["buy"]) / pos["buy"] * 100</text:p>
        <text:p text:style-name="P2"/>
        <text:p text:style-name="P2"><text:s text:c="8"/>self.logs.append({</text:p>
        <text:p text:style-name="P2"><text:s text:c="12"/>"type": "SELL",</text:p>
        <text:p text:style-name="P2"><text:s text:c="12"/>"name": pos["name"],</text:p>
        <text:p text:style-name="P2"><text:s text:c="12"/>"profit": profit,</text:p>
        <text:p text:style-name="P2"><text:s text:c="12"/>"rate": rate,</text:p>
        <text:p text:style-name="P2"><text:s text:c="12"/>"time": str(datetime.datetime.now())</text:p>
        <text:p text:style-name="P2"><text:s text:c="8"/>})</text:p>
        <text:p text:style-name="P2"><text:s text:c="8"/>self.save_json(LOG_FILE, self.logs)</text:p>
        <text:p text:style-name="P2"/>
        <text:p text:style-name="P2"><text:s text:c="8"/>self.send_discord(f"💰 매도 {pos['name']} {round(rate,2)}%")</text:p>
        <text:p text:style-name="P2"/>
        <text:p text:style-name="P2"><text:s text:c="8"/>del self.positions[code]</text:p>
        <text:p text:style-name="P2"><text:s text:c="8"/>self.save_json(STATE_FILE, self.positions)</text:p>
        <text:p text:style-name="P2"/>
        <text:p text:style-name="P2"><text:s text:c="4"/>def monitor(self):</text:p>
        <text:p text:style-name="P2"><text:s text:c="8"/>market = self.get_market_status()</text:p>
        <text:p text:style-name="P2"><text:s text:c="8"/>stop, take = self.get_risk_params(market)</text:p>
        <text:p text:style-name="P2"/>
        <text:p text:style-name="P2"><text:s text:c="8"/>for code, pos in list(self.positions.items()):</text:p>
        <text:p text:style-name="P2"><text:s text:c="12"/>price = self.get_price(code)</text:p>
        <text:p text:style-name="P2"/>
        <text:p text:style-name="P2"><text:s text:c="12"/>if price == 0:</text:p>
        <text:p text:style-name="P2"><text:s text:c="16"/>continue</text:p>
        <text:p text:style-name="P2"/>
        <text:p text:style-name="P2"><text:s text:c="12"/>if price &lt;= pos["buy"] * stop:</text:p>
        <text:p text:style-name="P2"><text:s text:c="16"/>self.sell(code)</text:p>
        <text:p text:style-name="P2"><text:s text:c="12"/>elif price &gt;= pos["buy"] * take:</text:p>
        <text:p text:style-name="P2"><text:s text:c="16"/>self.sell(code)</text:p>
        <text:p text:style-name="P2"/>
        <text:p text:style-name="P2"><text:s text:c="4"/>def report(self):</text:p>
        <text:p text:style-name="P2"><text:s text:c="8"/>sells = [l for l in self.logs if l["type"] == "SELL"]</text:p>
        <text:p text:style-name="P2"/>
        <text:p text:style-name="P2"><text:s text:c="8"/>if not sells:</text:p>
        <text:p text:style-name="P2"><text:s text:c="12"/>msg = "📊 리포트\n❌ 데이터 없음"</text:p>
        <text:p text:style-name="P2"><text:s text:c="12"/>print(msg)</text:p>
        <text:p text:style-name="P2"><text:s text:c="12"/>self.send_discord(msg)</text:p>
        <text:p text:style-name="P2"><text:s text:c="12"/>return</text:p>
        <text:p text:style-name="P2"/>
        <text:p text:style-name="P2"><text:s text:c="8"/>total = len(sells)</text:p>
        <text:p text:style-name="P2"><text:s text:c="8"/>wins = len([l for l in sells if l["profit"] &gt; 0])</text:p>
        <text:p text:style-name="P2"><text:s text:c="8"/>total_profit = sum(l["profit"] for l in sells)</text:p>
        <text:p text:style-name="P2"/>
        <text:p text:style-name="P2"><text:soft-page-break/><text:s text:c="8"/>msg = f"""</text:p>
        <text:p text:style-name="P2">📊 리포트</text:p>
        <text:p text:style-name="P2"/>
        <text:p text:style-name="P2">거래: {total}</text:p>
        <text:p text:style-name="P2">승률: {round((wins/total)*100,2)}%</text:p>
        <text:p text:style-name="P2">수익: {total_profit}원</text:p>
        <text:p text:style-name="P2">"""</text:p>
        <text:p text:style-name="P2"><text:s text:c="8"/>print(msg)</text:p>
        <text:p text:style-name="P2"><text:s text:c="8"/>self.send_discord(msg)</text:p>
        <text:p text:style-name="P2"/>
        <text:p text:style-name="P2"><text:s text:c="4"/>def run(self):</text:p>
        <text:p text:style-name="P2"><text:s text:c="8"/>print("🚀 FINAL SYSTEM START")</text:p>
        <text:p text:style-name="P2"/>
        <text:p text:style-name="P2"><text:s text:c="8"/>while True:</text:p>
        <text:p text:style-name="P2"><text:s text:c="12"/>try:</text:p>
        <text:p text:style-name="P2"><text:s text:c="16"/>market = self.get_market_status()</text:p>
        <text:p text:style-name="P2"><text:s text:c="16"/>print(f"[{datetime.datetime.now()}] 시장:{market} / 보유:{len(self.positions)}")</text:p>
        <text:p text:style-name="P2"/>
        <text:p text:style-name="P2"><text:s text:c="16"/>self.monitor()</text:p>
        <text:p text:style-name="P2"/>
        <text:p text:style-name="P2"><text:s text:c="16"/># 🔥 30초 1회 종목검색</text:p>
        <text:p text:style-name="P2"><text:s text:c="16"/>if int(time.time()) % 30 &lt; 5:</text:p>
        <text:p text:style-name="P2"><text:s text:c="20"/>self.cached_stocks = []</text:p>
        <text:p text:style-name="P2"><text:s text:c="20"/>for s in ["0", "1", "2", "3"]:</text:p>
        <text:p text:style-name="P2"><text:s text:c="24"/>self.cached_stocks += self.fetch(s)</text:p>
        <text:p text:style-name="P2"/>
        <text:p text:style-name="P2"><text:s text:c="16"/>stocks = self.cached_stocks</text:p>
        <text:p text:style-name="P2"/>
        <text:p text:style-name="P2"><text:s text:c="16"/>if len(self.positions) &lt; MAX_STOCKS:</text:p>
        <text:p text:style-name="P2"><text:s text:c="20"/>money = self.get_invest_amount(market)</text:p>
        <text:p text:style-name="P2"/>
        <text:p text:style-name="P2"><text:s text:c="20"/>if money &gt; 0 and stocks:</text:p>
        <text:p text:style-name="P2"><text:s text:c="24"/>result = self.pick_ai(stocks)</text:p>
        <text:p text:style-name="P2"/>
        <text:p text:style-name="P2"><text:s text:c="24"/>if result:</text:p>
        <text:p text:style-name="P2"><text:s text:c="28"/>best, candidates = result</text:p>
        <text:p text:style-name="P2"/>
        <text:p text:style-name="P2"><text:s text:c="28"/>rank = "\n".join([f"{c['name']}({c['score']})" for c in candidates])</text:p>
        <text:p text:style-name="P2"/>
        <text:p text:style-name="P2"><text:s text:c="28"/>self.send_discord(f"🤖 AI\n{rank}\n🏆 {best['name']}")</text:p>
        <text:p text:style-name="P2"/>
        <text:p text:style-name="P2"><text:s text:c="28"/>code = best["code"]</text:p>
        <text:p text:style-name="P2"><text:s text:c="28"/>price = best["price"]</text:p>
        <text:p text:style-name="P2"><text:s text:c="28"/>qty = money // price if price &gt; 0 else 0</text:p>
        <text:p text:style-name="P2"/>
        <text:p text:style-name="P2"><text:s text:c="28"/>if qty &gt; 0 and code not in self.positions:</text:p>
        <text:p text:style-name="P2"><text:s text:c="32"/>self.buy(code, best["name"], price, qty)</text:p>
        <text:p text:style-name="P2"/>
        <text:p text:style-name="P2"><text:s text:c="16"/>time.sleep(10)</text:p>
        <text:p text:style-name="P2"/>
        <text:p text:style-name="P2"><text:s text:c="12"/>except Exception as e:</text:p>
        <text:p text:style-name="P2"><text:soft-page-break/><text:s text:c="16"/>print("오류:", e)</text:p>
        <text:p text:style-name="P2"><text:s text:c="16"/>time.sleep(10)</text:p>
        <text:p text:style-name="P2"/>
        <text:p text:style-name="P2"/>
        <text:p text:style-name="P2">if __name__ == "__main__":</text:p>
        <text:p text:style-name="P2"><text:s text:c="4"/>mode = input("run / report : ")</text:p>
        <text:p text:style-name="P2"/>
        <text:p text:style-name="P2"><text:s text:c="4"/>bot = FinalTrader()</text:p>
        <text:p text:style-name="P2"/>
        <text:p text:style-name="P2"><text:s text:c="4"/>if mode == "run":</text:p>
        <text:p text:style-name="P2"><text:s text:c="8"/>bot.run()</text:p>
        <text:p text:style-name="P2"><text:s text:c="4"/>elif mode == "report":</text:p>
        <text:p text:style-name="P2"><text:s text:c="8"/>bot.report()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KR1" style:font-family-asian="'Noto Serif CJK KR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KR1" style:font-family-asian="'Noto Serif CJK KR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0T23:43:53.431236098</meta:creation-date>
    <dc:date>2026-04-11T00:43:28.569664501</dc:date>
    <meta:editing-duration>PT49M23S</meta:editing-duration>
    <meta:editing-cycles>1</meta:editing-cycles>
    <meta:document-statistic meta:table-count="0" meta:image-count="0" meta:object-count="0" meta:page-count="7" meta:paragraph-count="246" meta:word-count="815" meta:character-count="8148" meta:non-whitespace-character-count="5186"/>
    <meta:generator>LibreOffice/24.2.7.2$Linux_X86_64 LibreOffice_project/420$Build-2</meta:generator>
  </office:meta>
</office:document-meta>
</file>