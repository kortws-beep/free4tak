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1" style:family="table">
      <style:table-properties style:width="7.518cm" table:align="left"/>
    </style:style>
    <style:style style:name="표1.A" style:family="table-column">
      <style:table-column-properties style:column-width="6.57cm"/>
    </style:style>
    <style:style style:name="표1.B" style:family="table-column">
      <style:table-column-properties style:column-width="0.947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6.907cm" table:align="left"/>
    </style:style>
    <style:style style:name="표9.A" style:family="table-column">
      <style:table-column-properties style:column-width="6.509cm"/>
    </style:style>
    <style:style style:name="표9.B" style:family="table-column">
      <style:table-column-properties style:column-width="10.398cm"/>
    </style:style>
    <style:style style:name="표9.A1" style:family="table-cell">
      <style:table-cell-properties style:vertical-align="middle" fo:padding="0.049cm" fo:border="none"/>
    </style:style>
    <style:style style:name="표10" style:family="table">
      <style:table-properties style:width="11.619cm" table:align="left"/>
    </style:style>
    <style:style style:name="표10.A" style:family="table-column">
      <style:table-column-properties style:column-width="3.787cm"/>
    </style:style>
    <style:style style:name="표10.B" style:family="table-column">
      <style:table-column-properties style:column-width="3.866cm"/>
    </style:style>
    <style:style style:name="표10.C" style:family="table-column">
      <style:table-column-properties style:column-width="3.965cm"/>
    </style:style>
    <style:style style:name="표10.A1" style:family="table-cell">
      <style:table-cell-properties style:vertical-align="middle" fo:padding="0.049cm" fo:border="none"/>
    </style:style>
    <style:style style:name="표11" style:family="table">
      <style:table-properties style:width="16.907cm" table:align="left"/>
    </style:style>
    <style:style style:name="표11.A" style:family="table-column">
      <style:table-column-properties style:column-width="6.191cm"/>
    </style:style>
    <style:style style:name="표11.B" style:family="table-column">
      <style:table-column-properties style:column-width="10.716cm"/>
    </style:style>
    <style:style style:name="표1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2" style:family="paragraph" style:parent-style-name="Heading_20_3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Preformatted_20_Text">
      <style:text-properties style:font-name="Noto Serif CJK KR" fo:font-size="14pt" fo:font-weight="bold" officeooo:paragraph-rsid="0005d6b2" style:font-name-asian="Noto Serif CJK KR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Noto Serif CJK KR" fo:font-size="14pt" fo:font-weight="bold" officeooo:rsid="0004059c" officeooo:paragraph-rsid="0005d6b2" style:font-name-asian="Noto Serif CJK KR" style:font-size-asian="14pt" style:font-weight-asian="bold" style:font-size-complex="14pt" style:font-weight-complex="bold"/>
    </style:style>
    <style:style style:name="P7" style:family="paragraph" style:parent-style-name="Heading_20_3">
      <style:text-properties style:font-name="Noto Serif CJK KR" fo:font-size="14pt" fo:font-style="italic" fo:font-weight="bold" officeooo:paragraph-rsid="00088ffe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0" style:family="paragraph" style:parent-style-name="Horizontal_20_Line">
      <style:text-properties style:font-name="Noto Serif CJK KR" fo:font-size="14pt" officeooo:paragraph-rsid="00088ffe" style:font-name-asian="Noto Serif CJK KR" style:font-size-asian="14pt" style:font-size-complex="14pt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088ffe"/>
    </style:style>
    <style:style style:name="P14" style:family="paragraph" style:parent-style-name="Heading_20_3">
      <style:text-properties style:font-name="Noto Serif CJK KR" fo:font-size="14pt" officeooo:paragraph-rsid="00088ffe" style:font-name-asian="Noto Serif CJK KR" style:font-size-asian="14pt" style:font-size-complex="14pt"/>
    </style:style>
    <style:style style:name="P15" style:family="paragraph" style:parent-style-name="Text_20_body">
      <style:text-properties style:font-name="Noto Serif CJK KR" fo:font-size="14pt" officeooo:paragraph-rsid="00088ffe" style:font-name-asian="Noto Serif CJK KR" style:font-size-asian="14pt" style:font-size-complex="14pt"/>
    </style:style>
    <style:style style:name="P16" style:family="paragraph" style:parent-style-name="Text_20_body" style:list-style-name="L4">
      <style:text-properties officeooo:paragraph-rsid="00088ffe"/>
    </style:style>
    <style:style style:name="P17" style:family="paragraph" style:parent-style-name="Text_20_body">
      <style:text-properties officeooo:paragraph-rsid="00088ffe"/>
    </style:style>
    <style:style style:name="P18" style:family="paragraph" style:parent-style-name="Text_20_body" style:list-style-name="L5">
      <style:text-properties officeooo:paragraph-rsid="00088ffe"/>
    </style:style>
    <style:style style:name="P19" style:family="paragraph" style:parent-style-name="Text_20_body" style:list-style-name="L5">
      <style:text-properties style:font-name="Noto Serif CJK KR" fo:font-size="14pt" officeooo:paragraph-rsid="00088ffe" style:font-name-asian="Noto Serif CJK KR" style:font-size-asian="14pt" style:font-size-complex="14pt"/>
    </style:style>
    <style:style style:name="P20" style:family="paragraph" style:parent-style-name="Heading_20_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 style:list-style-name="L6">
      <style:text-properties style:font-name="Noto Serif CJK KR" fo:font-size="14pt" style:font-name-asian="Noto Serif CJK KR" style:font-size-asian="14pt" style:font-size-complex="14pt"/>
    </style:style>
    <style:style style:name="P22" style:family="paragraph" style:parent-style-name="Text_20_body" style:list-style-name="L7">
      <style:text-properties style:font-name="Noto Serif CJK KR" fo:font-size="14pt" style:font-name-asian="Noto Serif CJK KR" style:font-size-asian="14pt" style:font-size-complex="14pt"/>
    </style:style>
    <style:style style:name="P23" style:family="paragraph" style:parent-style-name="Quotations">
      <style:text-properties style:font-name="Noto Serif CJK KR" fo:font-size="14pt" fo:font-style="italic" fo:font-weight="bold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7" style:family="paragraph" style:parent-style-name="Heading_20_3">
      <style:text-properties style:font-name="Noto Serif CJK KR" fo:font-size="14pt" style:font-name-asian="Noto Serif CJK KR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Noto Serif CJK KR" fo:font-size="14pt" style:font-name-asian="Noto Serif CJK KR" style:font-size-asian="14pt" style:font-size-complex="14pt"/>
    </style:style>
    <style:style style:name="P29" style:family="paragraph" style:parent-style-name="Text_20_body">
      <style:text-properties fo:font-size="12pt" fo:font-weight="bold" officeooo:rsid="0004059c" officeooo:paragraph-rsid="0005d6b2" style:font-size-asian="12pt" style:font-weight-asian="bold" style:font-size-complex="12pt" style:font-weight-complex="bold"/>
    </style:style>
    <style:style style:name="P30" style:family="paragraph" style:parent-style-name="Text_20_body" style:list-style-name="L8"/>
    <style:style style:name="P31" style:family="paragraph" style:parent-style-name="Text_20_body">
      <style:text-properties style:font-name="Noto Serif CJK KR" fo:font-size="14pt" fo:font-weight="bold" officeooo:rsid="000ad431" officeooo:paragraph-rsid="000ad431" style:font-name-asian="Noto Serif CJK KR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5" style:family="paragraph" style:parent-style-name="Heading_20_3" style:list-style-name="L11">
      <style:text-properties style:font-name="Noto Serif CJK KR" fo:font-size="14pt" style:font-name-asian="Noto Serif CJK KR" style:font-size-asian="14pt" style:font-size-complex="14pt"/>
    </style:style>
    <style:style style:name="P36" style:family="paragraph" style:parent-style-name="Table_20_Heading">
      <style:text-properties style:font-name="Noto Serif CJK KR" fo:font-size="14pt" style:font-name-asian="Noto Serif CJK KR" style:font-size-asian="14pt" style:font-size-complex="14pt"/>
    </style:style>
    <style:style style:name="P37" style:family="paragraph" style:parent-style-name="Table_20_Contents">
      <style:text-properties style:font-name="Noto Serif CJK KR" fo:font-size="14pt" style:font-name-asian="Noto Serif CJK KR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style:contextual-spacing="false"/>
      <style:text-properties style:font-name="Noto Serif CJK KR" fo:font-size="14pt" style:font-name-asian="Noto Serif CJK KR" style:font-size-asian="14pt" style:font-size-complex="14pt"/>
    </style:style>
    <style:style style:name="P39" style:family="paragraph" style:parent-style-name="Text_20_body" style:list-style-name="L12">
      <style:text-properties style:font-name="Noto Serif CJK KR" fo:font-size="14pt" style:font-name-asian="Noto Serif CJK KR" style:font-size-asian="14pt" style:font-size-complex="14pt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style:font-name="Noto Serif CJK KR" fo:font-size="14pt" fo:font-weight="bold" officeooo:rsid="000e168f" officeooo:paragraph-rsid="000e168f" style:font-name-asian="Noto Serif CJK KR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3" style:family="paragraph" style:parent-style-name="Heading_20_3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45" style:family="paragraph" style:parent-style-name="Preformatted_20_Text">
      <loext:graphic-properties draw:fill="none" draw:fill-color="#ffffff"/>
      <style:paragraph-properties fo:background-color="transparent"/>
    </style:style>
    <style:style style:name="P46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47" style:family="paragraph" style:parent-style-name="Heading_20_3">
      <style:text-properties style:font-name="FreeSans" fo:font-size="14pt" style:font-name-asian="FreeSans" style:font-size-asian="14pt" style:font-size-complex="14pt"/>
    </style:style>
    <style:style style:name="P48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33052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paragraph-rsid="0014fd68"/>
    </style:style>
    <style:style style:name="P5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4fd68"/>
    </style:style>
    <style:style style:name="P51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4fd68"/>
    </style:style>
    <style:style style:name="P53" style:family="paragraph" style:parent-style-name="표준"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4" style:family="paragraph" style:parent-style-name="Text_20_body">
      <loext:graphic-properties draw:fill="none" draw:fill-color="#ffffff"/>
      <style:paragraph-properties fo:margin-top="0cm" fo:margin-bottom="0.499cm" style:contextual-spacing="false" fo:background-color="transparent"/>
    </style:style>
    <style:style style:name="P5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753a3"/>
    </style:style>
    <style:style style:name="P56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style:font-name-asian="Noto Sans CJK KR DemiLight" style:font-size-asian="14pt" style:font-size-complex="14pt"/>
    </style:style>
    <style:style style:name="P57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a1a93"/>
    </style:style>
    <style:style style:name="P58" style:family="paragraph" style:parent-style-name="Text_20_body">
      <style:text-properties style:font-name="Noto Sans CJK KR DemiLight" fo:font-size="14pt" style:font-name-asian="Noto Sans CJK KR DemiLight" style:font-size-asian="14pt" style:font-size-complex="14pt"/>
    </style:style>
    <style:style style:name="P59" style:family="paragraph" style:parent-style-name="Text_20_body">
      <style:text-properties officeooo:paragraph-rsid="001d358e"/>
    </style:style>
    <style:style style:name="P6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61" style:family="paragraph" style:parent-style-name="Text_20_body">
      <style:text-properties officeooo:paragraph-rsid="0021c328"/>
    </style:style>
    <style:style style:name="P62" style:family="paragraph" style:parent-style-name="Text_20_body">
      <style:text-properties officeooo:paragraph-rsid="002661e6"/>
    </style:style>
    <style:style style:name="P63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64" style:family="paragraph" style:parent-style-name="Text_20_body" style:list-style-name="L13"/>
    <style:style style:name="P65" style:family="paragraph" style:parent-style-name="Text_20_body" style:list-style-name="L14"/>
    <style:style style:name="P66" style:family="paragraph" style:parent-style-name="Text_20_body" style:list-style-name="L14">
      <style:text-properties style:font-name="Noto Sans CJK KR DemiLight" fo:font-size="14pt" style:font-name-asian="Noto Sans CJK KR DemiLight" style:font-size-asian="14pt" style:font-size-complex="14pt"/>
    </style:style>
    <style:style style:name="P67" style:family="paragraph" style:parent-style-name="Text_20_body" style:list-style-name="L15"/>
    <style:style style:name="P68" style:family="paragraph" style:parent-style-name="Text_20_body" style:list-style-name="L15">
      <style:text-properties style:font-name="Noto Sans CJK KR DemiLight" fo:font-size="14pt" style:font-name-asian="Noto Sans CJK KR DemiLight" style:font-size-asian="14pt" style:font-size-complex="14pt"/>
    </style:style>
    <style:style style:name="P69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70" style:family="paragraph" style:parent-style-name="Text_20_body" style:list-style-name="L16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>
      <style:paragraph-properties fo:margin-top="0cm" fo:margin-bottom="0cm" style:contextual-spacing="false"/>
    </style:style>
    <style:style style:name="P73" style:family="paragraph" style:parent-style-name="Text_20_body" style:list-style-name="L17"/>
    <style:style style:name="P7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7" style:family="paragraph" style:parent-style-name="Text_20_body" style:list-style-name="L19">
      <style:paragraph-properties fo:margin-top="0cm" fo:margin-bottom="0cm" style:contextual-spacing="false"/>
    </style:style>
    <style:style style:name="P78" style:family="paragraph" style:parent-style-name="Text_20_body" style:list-style-name="L19"/>
    <style:style style:name="P79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0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1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2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3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84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5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87" style:family="paragraph" style:parent-style-name="Text_20_body" style:list-style-name="L2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8" style:family="paragraph" style:parent-style-name="Text_20_body" style:list-style-name="L2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9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90" style:family="paragraph" style:parent-style-name="Text_20_body" style:list-style-name="L2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1" style:family="paragraph" style:parent-style-name="Text_20_body" style:list-style-name="L21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2" style:family="paragraph" style:parent-style-name="Text_20_body" style:list-style-name="L22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3" style:family="paragraph" style:parent-style-name="Text_20_body" style:list-style-name="L23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4" style:family="paragraph" style:parent-style-name="Text_20_body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5" style:family="paragraph" style:parent-style-name="Heading_20_3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6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97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98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99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0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01" style:family="paragraph" style:parent-style-name="Text_20_body" style:list-style-name="L2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2" style:family="paragraph" style:parent-style-name="Text_20_body" style:list-style-name="L2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3" style:family="paragraph" style:parent-style-name="Text_20_body" style:list-style-name="L2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4" style:family="paragraph" style:parent-style-name="Text_20_body" style:list-style-name="L2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5" style:family="paragraph" style:parent-style-name="Text_20_body" style:list-style-name="L2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6" style:family="paragraph" style:parent-style-name="Text_20_body" style:list-style-name="L27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7" style:family="paragraph" style:parent-style-name="Text_20_body" style:list-style-name="L2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8" style:family="paragraph" style:parent-style-name="Text_20_body" style:list-style-name="L2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9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0" style:family="paragraph" style:parent-style-name="Text_20_body" style:list-style-name="L29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111" style:family="paragraph" style:parent-style-name="Text_20_body" style:list-style-name="L29">
      <style:text-properties style:font-name="Noto Sans CJK KR DemiLight" fo:font-size="14pt" style:font-name-asian="Noto Sans CJK KR DemiLight" style:font-size-asian="14pt" style:font-size-complex="14pt"/>
    </style:style>
    <style:style style:name="P112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13" style:family="paragraph" style:parent-style-name="Text_20_body" style:list-style-name="L3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4" style:family="paragraph" style:parent-style-name="Text_20_body" style:list-style-name="L3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5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116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117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118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119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2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3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4" style:family="paragraph" style:parent-style-name="Heading_20_3">
      <loext:graphic-properties draw:fill-color="#ffffff"/>
    </style:style>
    <style:style style:name="P125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8" style:family="paragraph" style:parent-style-name="Heading_20_3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129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0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1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2" style:family="paragraph" style:parent-style-name="Text_20_body" style:list-style-name="L31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3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4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5" style:family="paragraph" style:parent-style-name="Text_20_body" style:list-style-name="L32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6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7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38" style:family="paragraph" style:parent-style-name="Text_20_body" style:list-style-name="L33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9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0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1" style:family="paragraph" style:parent-style-name="Text_20_body" style:list-style-name="L34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2" style:family="paragraph" style:parent-style-name="Text_20_body" style:list-style-name="L35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3" style:family="paragraph" style:parent-style-name="Text_20_body" style:list-style-name="L35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4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5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6" style:family="paragraph" style:parent-style-name="Text_20_body">
      <loext:graphic-properties draw:fill-color="#ffffff"/>
      <style:paragraph-properties fo:margin-left="0cm" fo:margin-right="0cm" fo:orphans="1" fo:text-indent="0cm" style:auto-text-indent="false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148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9" style:family="paragraph" style:parent-style-name="Horizontal_20_Line">
      <loext:graphic-properties draw:fill-color="#ffffff"/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150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151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15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153" style:family="paragraph" style:parent-style-name="Text_20_body" style:list-style-name="L36">
      <loext:graphic-properties draw:fill-color="#ffffff"/>
      <style:paragraph-properties fo:margin-top="0cm" fo:margin-bottom="0cm" style:contextual-spacing="false"/>
      <style:text-properties fo:color="#14181f" loext:opacity="100%" style:font-name="Noto Sans CJK KR DemiLight" fo:font-size="15pt" officeooo:rsid="00689e23" style:font-name-asian="Noto Sans CJK KR DemiLight" style:font-size-asian="15pt" style:font-size-complex="15pt"/>
    </style:style>
    <style:style style:name="P154" style:family="paragraph" style:parent-style-name="Text_20_body" style:list-style-name="L36">
      <loext:graphic-properties draw:fill-color="#ffffff"/>
      <style:text-properties fo:color="#14181f" loext:opacity="100%" style:font-name="Noto Sans CJK KR DemiLight" fo:font-size="15pt" officeooo:rsid="00689e23" style:font-name-asian="Noto Sans CJK KR DemiLight" style:font-size-asian="15pt" style:font-size-complex="15pt"/>
    </style:style>
    <style:style style:name="P155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56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57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58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59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60" style:family="paragraph" style:parent-style-name="Text_20_body" style:list-style-name="L37">
      <style:text-properties officeooo:rsid="005734c7"/>
    </style:style>
    <style:style style:name="P161" style:family="paragraph" style:parent-style-name="Text_20_body" style:list-style-name="L38">
      <style:text-properties officeooo:rsid="005734c7"/>
    </style:style>
    <style:style style:name="P162" style:family="paragraph" style:parent-style-name="Heading_20_3">
      <style:paragraph-properties fo:margin-top="0cm" fo:margin-bottom="0.247cm" style:contextual-spacing="false" fo:line-height="115%"/>
    </style:style>
    <style:style style:name="P163" style:family="paragraph" style:parent-style-name="Text_20_body" style:list-style-name="L39"/>
    <style:style style:name="P164" style:family="paragraph" style:parent-style-name="Preformatted_20_Text">
      <style:paragraph-properties fo:margin-top="0cm" fo:margin-bottom="0.499cm" style:contextual-spacing="false"/>
      <style:text-properties officeooo:paragraph-rsid="00679eb3"/>
    </style:style>
    <style:style style:name="P165" style:family="paragraph" style:parent-style-name="Preformatted_20_Text">
      <style:paragraph-properties fo:margin-top="0cm" fo:margin-bottom="0.499cm" style:contextual-spacing="false" fo:break-before="page"/>
      <style:text-properties officeooo:paragraph-rsid="00679eb3"/>
    </style:style>
    <style:style style:name="T1" style:family="text">
      <style:text-properties style:font-name="Noto Serif CJK KR" fo:font-size="14pt" style:font-name-asian="Noto Serif CJK KR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name="Noto Serif CJK KR" fo:font-size="14pt" style:font-name-asian="Noto Serif CJK KR" style:font-size-asian="14pt" style:font-weight-asian="bold" style:font-size-complex="14pt"/>
    </style:style>
    <style:style style:name="T5" style:family="text">
      <style:text-properties style:font-name="Noto Serif CJK KR" fo:font-size="14pt" fo:font-weight="bold" style:font-name-asian="Noto Serif CJK KR" style:font-size-asian="14pt" style:font-size-complex="14pt"/>
    </style:style>
    <style:style style:name="T6" style:family="text">
      <style:text-properties officeooo:rsid="00088ffe"/>
    </style:style>
    <style:style style:name="T7" style:family="text">
      <style:text-properties fo:color="#14181f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8" style:family="text">
      <style:text-properties fo:color="#008080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Noto Serif CJK KR" style:font-name-asian="Noto Serif CJK KR"/>
    </style:style>
    <style:style style:name="T11" style:family="text">
      <style:text-properties fo:color="#008000" loext:opacity="100%" officeooo:rsid="00126813"/>
    </style:style>
    <style:style style:name="T12" style:family="text">
      <style:text-properties fo:color="#008000" loext:opacity="100%" style:font-name="FreeSans" officeooo:rsid="00126813" style:font-name-asian="FreeSans"/>
    </style:style>
    <style:style style:name="T13" style:family="text">
      <style:text-properties fo:color="#14181f" loext:opacity="100%" style:font-name="FreeSans" fo:font-size="14pt" fo:background-color="transparent" loext:char-shading-value="0" style:font-name-asian="FreeSans" style:font-size-asian="14pt" style:font-size-complex="14pt"/>
    </style:style>
    <style:style style:name="T14" style:family="text">
      <style:text-properties fo:color="#14181f" loext:opacity="100%" fo:font-family="'Noto Sans CJK KR Medium'" style:font-family-generic="swiss" style:font-pitch="variable" fo:font-size="14pt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5" style:family="text">
      <style:text-properties fo:color="#14181f" loext:opacity="100%" fo:font-family="'Noto Sans CJK KR Medium'" style:font-family-generic="swiss" style:font-pitch="variable" fo:font-size="14pt" officeooo:rsid="00133052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6" style:family="text">
      <style:text-properties fo:color="#14181f" loext:opacity="100%" style:font-name="Noto Sans CJK KR DemiLight" fo:font-size="14pt" fo:background-color="transparent" loext:char-shading-value="0" style:font-name-asian="Noto Sans CJK KR DemiLight" style:font-size-asian="14pt" style:font-size-complex="14pt"/>
    </style:style>
    <style:style style:name="T17" style:family="text">
      <style:text-properties fo:color="#14181f" loext:opacity="100%" style:font-name="Noto Sans CJK KR DemiLight" fo:font-size="14pt" officeooo:rsid="001753a3" fo:background-color="transparent" loext:char-shading-value="0" style:font-name-asian="Noto Sans CJK KR DemiLight" style:font-size-asian="14pt" style:font-size-complex="14pt"/>
    </style:style>
    <style:style style:name="T18" style:family="text">
      <style:text-properties fo:color="#14181f" loext:opacity="100%" style:font-name="Noto Sans CJK KR DemiLight" fo:font-size="14pt" officeooo:rsid="001a1a93" fo:background-color="transparent" loext:char-shading-value="0" style:font-name-asian="Noto Sans CJK KR DemiLight" style:font-size-asian="14pt" style:font-size-complex="14pt"/>
    </style:style>
    <style:style style:name="T19" style:family="text">
      <style:text-properties fo:color="#14181f" loext:opacity="100%" style:font-name="Noto Sans CJK KR DemiLight" fo:font-size="14pt" officeooo:rsid="001d358e" fo:background-color="transparent" loext:char-shading-value="0" style:font-name-asian="Noto Sans CJK KR DemiLight" style:font-size-asian="14pt" style:font-size-complex="14pt"/>
    </style:style>
    <style:style style:name="T20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1" style:family="text">
      <style:text-properties fo:color="#14181f" loext:opacity="100%" style:font-name="Noto Sans CJK KR DemiLight" fo:font-size="14pt" officeooo:rsid="002102d4" fo:background-color="transparent" loext:char-shading-value="0" style:font-name-asian="Noto Sans CJK KR DemiLight" style:font-size-asian="14pt" style:font-size-complex="14pt"/>
    </style:style>
    <style:style style:name="T2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2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2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2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2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28" style:family="text">
      <style:text-properties style:font-name="Noto Sans CJK KR Black" fo:font-size="14pt" style:font-name-asian="Noto Sans CJK KR Black" style:font-size-asian="14pt" style:font-size-complex="14pt"/>
    </style:style>
    <style:style style:name="T2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3" style:family="text">
      <style:text-properties fo:color="#14181f" loext:opacity="100%" style:font-name="Noto Sans CJK KR DemiLight" fo:font-size="14pt" fo:font-weight="bold" officeooo:rsid="005483e2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4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name-complex="Liberation Mono" style:font-size-complex="14pt" style:font-weight-complex="bold"/>
    </style:style>
    <style:style style:name="T35" style:family="text">
      <style:text-properties style:font-name="Noto Sans CJK KR DemiLight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6e7687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7" style:family="text">
      <style:text-properties fo:color="#0051c2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8" style:family="text">
      <style:text-properties fo:color="#008000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font-name="Noto Sans CJK KR DemiLight" fo:font-size="14pt" fo:font-weight="bold" officeooo:rsid="00611545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40" style:family="text">
      <style:text-properties style:font-name="Noto Sans CJK KR DemiLight" fo:font-size="14pt" fo:font-weight="bold" officeooo:rsid="0063878e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63878e" fo:background-color="transparent" loext:char-shading-value="0" style:font-size-asian="14pt" style:font-weight-asian="bold" style:font-name-complex="Liberation Mono" style:font-size-complex="14pt" style:font-weight-complex="bold"/>
    </style:style>
    <style:style style:name="T42" style:family="text">
      <style:text-properties style:font-name="Noto Sans CJK KR DemiLight" fo:font-size="14pt" officeooo:rsid="0063878e" fo:background-color="transparent" loext:char-shading-value="0" style:font-name-asian="Noto Sans CJK KR DemiLight" style:font-size-asian="14pt" style:font-size-complex="14pt"/>
    </style:style>
    <style:style style:name="T43" style:family="text">
      <style:text-properties fo:color="#14181f" loext:opacity="100%" style:font-name="Noto Sans CJK KR DemiLight" fo:font-size="15pt" fo:font-weight="normal" officeooo:rsid="0064f836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44" style:family="text">
      <style:text-properties fo:color="#14181f" loext:opacity="100%" style:font-name="Noto Sans CJK KR DemiLight" fo:font-size="15pt" fo:font-weight="normal" officeooo:rsid="00689e23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45" style:family="text">
      <style:text-properties fo:color="#14181f" loext:opacity="100%" style:font-name="Noto Sans CJK KR DemiLight" fo:font-size="15pt" officeooo:rsid="00689e23" fo:background-color="transparent" loext:char-shading-value="0" style:font-name-asian="Noto Sans CJK KR DemiLight" style:font-size-asian="15pt" style:font-size-complex="15pt"/>
    </style:style>
    <style:style style:name="T46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47" style:family="text">
      <style:text-properties fo:color="#0051c2" loext:opacity="100%"/>
    </style:style>
    <style:style style:name="T48" style:family="text">
      <style:text-properties fo:color="#008000" loext:opacity="100%"/>
    </style:style>
    <style:style style:name="T49" style:family="text">
      <style:text-properties fo:color="#6e7687" loext:opacity="100%"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6.05.13</text:h>
      <text:h text:style-name="P2" text:outline-level="3">오늘 추가 작업 요약</text:h>
      <text:list text:style-name="L1">
        <text:list-item>
          <text:p text:style-name="P3"><text:span text:style-name="T1">✅ </text:span><text:span text:style-name="Strong_20_Emphasis"><text:span text:style-name="T1">시장 상황 → AI 프롬프트 반영</text:span></text:span><text:span text:style-name="T1"> (약세장 감지) </text:span></text:p>
        </text:list-item>
        <text:list-item>
          <text:p text:style-name="P3"><text:span text:style-name="T1">✅ </text:span><text:span text:style-name="Strong_20_Emphasis"><text:span text:style-name="T1">약세장 AI 캐시 무효화</text:span></text:span><text:span text:style-name="T1"> (즉시 재분석) </text:span></text:p>
        </text:list-item>
        <text:list-item>
          <text:p text:style-name="P3"><text:span text:style-name="T1">✅ </text:span><text:span text:style-name="Strong_20_Emphasis"><text:span text:style-name="T1">자동 복기</text:span></text:span><text:span text:style-name="T1"> (16:10 cron, 내일 프롬프트 반영) </text:span></text:p>
        </text:list-item>
        <text:list-item>
          <text:p text:style-name="P3"><text:span text:style-name="T1">✅ </text:span><text:span text:style-name="Strong_20_Emphasis"><text:span text:style-name="T1">동적 목표가</text:span></text:span><text:span text:style-name="T1"> (약세장 +2%/+5%/+8%, 강세장 +7%/+13%/+18%) </text:span></text:p>
        </text:list-item>
        <text:list-item>
          <text:p text:style-name="P3"><text:span text:style-name="T1">✅ </text:span><text:span text:style-name="Strong_20_Emphasis"><text:span text:style-name="T1">이중매수 방지</text:span></text:span><text:span text:style-name="T1"> (_pending_orders) </text:span></text:p>
        </text:list-item>
        <text:list-item>
          <text:p text:style-name="P4"><text:span text:style-name="T1">✅ </text:span><text:span text:style-name="Strong_20_Emphasis"><text:span text:style-name="T1">종가매도 로직 수정</text:span></text:span><text:span text:style-name="T1"> (-1%~+1% 본전만)</text:span></text:p>
        </text:list-item>
      </text:list>
      <text:p text:style-name="P5">## 📋 오늘 수정/추가 목록</text:p>
      <text:p text:style-name="P5"/>
      <text:p text:style-name="P5">### 1. 시장 상황 → AI 프롬프트 반영 (ai_analyzer.py)</text:p>
      <text:p text:style-name="P5">- `analyze()` + `_build_prompt()`에 `market_status`, `market_rate` 파라미터 추가</text:p>
      <text:p text:style-name="P5">- 프롬프트에 코스피 등락률 + 시장 상태 포함</text:p>
      <text:p text:style-name="P5">- **약세장/stop 시 AI 캐시 무효화** → 즉시 재분석</text:p>
      <text:p text:style-name="P5">- `nbot.py`에서 `ai.analyze()` 호출 시 `market_status`, `market_rate` 전달</text:p>
      <text:p text:style-name="P5"/>
      <text:p text:style-name="P5">### 2. 자동 복기 시스템 (daily_review.py)</text:p>
      <text:p text:style-name="P5">- 매일 16:10 cron 실행</text:p>
      <text:p text:style-name="P5">- 오늘 매매 분석 (승률/손익/시간대/매도사유)</text:p>
      <text:p text:style-name="P5">- 7일 누적 패턴 분석 (최악/최고 시간대)</text:p>
      <text:p text:style-name="P5">- Claude가 복기 (잘한점/못한점/내일전략/주의종목)</text:p>
      <text:p text:style-name="P5">- `daily_review.json` 저장 → 내일 AI 프롬프트에 자동 반영</text:p>
      <text:p text:style-name="P5">- `_get_review_hint()` → `ai_analyzer.py`의 `_build_prompt()`에 주입</text:p>
      <text:p text:style-name="P5">- 키키 저녁 브리핑용 `daily_review_discord.txt` 생성</text:p>
      <text:p text:style-name="P5"/>
      <text:p text:style-name="P5">```bash</text:p>
      <text:p text:style-name="P5"># cron 등록 확인</text:p>
      <text:p text:style-name="P5">crontab -l | grep daily_review</text:p>
      <text:p text:style-name="P5"/>
      <text:p text:style-name="P5"># 수동 실행</text:p>
      <text:p text:style-name="P5"><text:soft-page-break/>python3 daily_review.py</text:p>
      <text:p text:style-name="P5">```</text:p>
      <text:p text:style-name="P5"/>
      <text:p text:style-name="P5">### 3. 동적 목표가 (strategy.py)</text:p>
      <text:p text:style-name="P5">- `get_dynamic_sell_rates(market_status, market_rate)` 함수 추가</text:p>
      <text:p text:style-name="P5">- 시장 상황별 익절/손절 비율 자동 조정:</text:p>
      <text:p text:style-name="P5"/>
      <text:p text:style-name="P5">| 시장 상태 | 1차 익절 | 2차 익절 | 3차 익절 | 손절 |</text:p>
      <text:p text:style-name="P5">|---|---|---|---|---|</text:p>
      <text:p text:style-name="P5">| stop (급락) | +2% | +5% | +8% | -3% |</text:p>
      <text:p text:style-name="P5">| weak (약세) | +3% | +7% | +10% | -3% |</text:p>
      <text:p text:style-name="P5">| 소폭 강세 | +6% | +11% | +16% | -5% |</text:p>
      <text:p text:style-name="P5">| 강세 (+1.5%) | +7% | +13% | +18% | -6% |</text:p>
      <text:p text:style-name="P5">| 정상 | +5% | +10% | +15% | -5% |</text:p>
      <text:p text:style-name="P5"/>
      <text:p text:style-name="P5">- `check_sell()`에 `market_rate` 파라미터 추가</text:p>
      <text:p text:style-name="P5">- `nbot.py` `check_sell()` 호출 시 `market_rate=self.market_rate` 전달</text:p>
      <text:p text:style-name="P5"/>
      <text:p text:style-name="P5">### 4. 미체결 주문 자동 취소 (kis_api.py + nbot.py)</text:p>
      <text:p text:style-name="P5">- `kis_api.py`</text:p>
      <text:p text:style-name="P5"><text:s text:c="2"/>- `buy()` → `(True/False, odno)` 반환으로 변경 (주문번호 포함)</text:p>
      <text:p text:style-name="P5"><text:s text:c="2"/>- `cancel_order(orgno, odno, code, qty)` 함수 추가 (TTTC0803U)</text:p>
      <text:p text:style-name="P5">- `nbot.py`</text:p>
      <text:p text:style-name="P5"><text:s text:c="2"/>- `_pending_orders` → `set` → `dict` 변경 `{code: (orgno, odno, qty)}`</text:p>
      <text:p text:style-name="P5"><text:s text:c="2"/>- 다음 루프에서 미체결 자동 취소 → 주문가능금액 복구</text:p>
      <text:p text:style-name="P5"/>
      <text:p text:style-name="P5">### 5. 이중매수 방지 강화 (nbot.py)</text:p>
      <text:p text:style-name="P5">- stop 모드 `continue` 전 `positions` 갱신 + `_pending_orders` 정리 추가</text:p>
      <text:p text:style-name="P5">- stop → weak 전환 시 중복 매수 방지</text:p>
      <text:p text:style-name="P5"/>
      <text:p text:style-name="P5">### 6. 켈리 최솟값 보장 (risk_manager.py)</text:p>
      <text:p text:style-name="P5">- `multiplier = max(multiplier, 0.6)` 추가</text:p>
      <text:p text:style-name="P5">- 승률 낮아도 최소 `base_buy_amt × 0.6` 보장</text:p>
      <text:p text:style-name="P5"><text:soft-page-break/></text:p>
      <text:p text:style-name="P5">### 7. psbl_cash 한도 제거 (risk_manager.py)</text:p>
      <text:p text:style-name="P5">- 기존: `amount = min(amount, psbl_cash × 0.3)`</text:p>
      <text:p text:style-name="P5">- 변경: psbl_cash 한도 제거 → 켈리 계산 금액 그대로 사용</text:p>
      <text:p text:style-name="P5">- 이유: psbl_cash는 증권사가 이미 계산한 주문가능금액 → 이중 제한 불필요</text:p>
      <text:p text:style-name="P5"/>
      <text:p text:style-name="P5">### 8. MAX_DAILY_LOSS 통일 (nbot/sbot/cbot)</text:p>
      <text:p text:style-name="P5">- 기존: 모두 2회</text:p>
      <text:p text:style-name="P5">- 변경: 모두 5회</text:p>
      <text:p text:style-name="P5"/>
      <text:p text:style-name="P5">```python</text:p>
      <text:p text:style-name="P5"># nbot.py, sbot.py, cbot.py</text:p>
      <text:p text:style-name="P5">MAX_DAILY_LOSS = 5</text:p>
      <text:p text:style-name="P5">```</text:p>
      <text:p text:style-name="P5"/>
      <text:p text:style-name="P5">### 9. 군집도 파악 — ka90001 기반 (nbot.py)</text:p>
      <text:p text:style-name="P5">- `get_theme_top()` 응답의 `rising_stk_num`, `stk_num` 활용</text:p>
      <text:p text:style-name="P5">- 군집성 판단:</text:p>
      <text:p text:style-name="P5"/>
      <text:p text:style-name="P5">| 상승비율 | 분류 | 처리 |</text:p>
      <text:p text:style-name="P5">|---|---|---|</text:p>
      <text:p text:style-name="P5">| 60% 이상 | ✅ 진짜 테마 | 테마 가산점 부여 |</text:p>
      <text:p text:style-name="P5">| 30~60% | 💤 약한 테마 | 종목 풀만 추가 |</text:p>
      <text:p text:style-name="P5">| 30% 미만 | ⚠️ 개별 이슈 | 완전 제외 |</text:p>
      <text:p text:style-name="P5"/>
      <text:p text:style-name="P5">### 10. 종가매도 로직 수정 (strategy.py)</text:p>
      <text:p text:style-name="P5">- 기존: -3% 이상 전부 종가매도</text:p>
      <text:p text:style-name="P5">- 변경: **-1%~+1% 본전 근처만** 종가매도</text:p>
      <text:p text:style-name="P5">- 15:10 이후 매수(종가매수) → 당일 종가매도 제외</text:p>
      <text:p text:style-name="P5">- 1차 익절 후(stage&gt;=1) → 무조건 청산 유지</text:p>
      <text:p text:style-name="P5"/>
      <text:p text:style-name="P5">### 11. bot.sh 개선</text:p>
      <text:p text:style-name="P5">- `start` 시 좀비 프로세스 pkill 추가 (`${bot}.py` 패턴)</text:p>
      <text:p text:style-name="P5">- `sudo systemctl daemon-reload` 자동 실행</text:p>
      <text:p text:style-name="P5"/>
      <text:p text:style-name="P5">---</text:p>
      <text:p text:style-name="P5"><text:soft-page-break/></text:p>
      <text:p text:style-name="P5">## 📌 내일 확인 사항</text:p>
      <text:p text:style-name="P5"/>
      <text:p text:style-name="P5">```bash</text:p>
      <text:p text:style-name="P5"># 군집도 로그 확인</text:p>
      <text:p text:style-name="P5">./bot.sh log nbot | grep -E "진짜 테마|약한 테마|개별 이슈"</text:p>
      <text:p text:style-name="P5"/>
      <text:p text:style-name="P5"># 미체결 취소 로그</text:p>
      <text:p text:style-name="P5">./bot.sh log nbot | grep -E "미체결|취소|cancel"</text:p>
      <text:p text:style-name="P5"/>
      <text:p text:style-name="P5"># 동적 목표가 로그</text:p>
      <text:p text:style-name="P5">./bot.sh log nbot | grep -E "익절|손절|dynamic"</text:p>
      <text:p text:style-name="P5"/>
      <text:p text:style-name="P5"># 복기 cron 작동 확인 (16:10 이후)</text:p>
      <text:p text:style-name="P5">cat /tmp/daily_review.log | tail -20</text:p>
      <text:p text:style-name="P5">```</text:p>
      <text:p text:style-name="P5"/>
      <text:p text:style-name="P5">---</text:p>
      <text:p text:style-name="P5"/>
      <text:p text:style-name="P5">## 🗓 예정 작업</text:p>
      <text:p text:style-name="P5"/>
      <text:p text:style-name="P5">| 항목 | 내용 |</text:p>
      <text:p text:style-name="P5">|---|---|</text:p>
      <text:p text:style-name="P5">| 군집도 검증 | ka90001 `rising_stk_num` 실제 응답 확인 |</text:p>
      <text:p text:style-name="P5">| 8월 재검증 | 수급 90일치 누적 후 백테스트 재실행 |</text:p>
      <text:p text:style-name="P5"/>
      <text:p text:style-name="P5">---</text:p>
      <text:p text:style-name="P5"/>
      <text:p text:style-name="P5">## 📊 현재 봇 설정 (nbot.py 주요 상수)</text:p>
      <text:p text:style-name="P5"/>
      <text:p text:style-name="P5">```python</text:p>
      <text:p text:style-name="P5">MAX_POSITIONS <text:s text:c="3"/>= 5</text:p>
      <text:p text:style-name="P5">LIMIT_PER_STOCK <text:s/>= 400000</text:p>
      <text:p text:style-name="P5">BUY_1ST_AMT_BASE = 300000</text:p>
      <text:p text:style-name="P5">BUY_SCORE_ENTER <text:s/>= 70</text:p>
      <text:p text:style-name="P5">MARKET_WEAK_THRESH = -1.5</text:p>
      <text:p text:style-name="P5"><text:soft-page-break/>MARKET_STOP_THRESH = -3.0</text:p>
      <text:p text:style-name="P5">MAX_DAILY_LOSS <text:s text:c="2"/>= 5</text:p>
      <text:p text:style-name="P5">```</text:p>
      <text:p text:style-name="P5"/>
      <text:p text:style-name="P6">*영암9 작업일지 v2 — 2026-05-13*</text:p>
      <text:p text:style-name="P6"/>
      <text:p text:style-name="P6"/>
      <text:h text:style-name="P7" text:outline-level="3">🚀 1. 섹터 간 '순환매 선점' 모델 (Money Flow Anticipation)</text:h>
      <text:p text:style-name="P8">지금 nbot이 테마를 포착했다면, 이제는 그 테마가 <text:span text:style-name="T2">'</text:span><text:span text:style-name="T3">식어갈 때</text:span><text:span text:style-name="T2">'</text:span> 다음 타자를 찾는 로직입니다.</text:p>
      <text:list text:style-name="L2">
        <text:list-item>
          <text:p text:style-name="P9"><text:span text:style-name="T3">메커니즘</text:span><text:span text:style-name="T2">:</text:span> A섹터(주도주)의 거래대금이 피크를 찍고 횡보할 때, B섹터(잠재주)에서 <text:span text:style-name="T3">거래량 미증 </text:span><text:span text:style-name="T2">+ </text:span><text:span text:style-name="T3">체결강도 급증</text:span> 현상이 나타나는지 감시합니다.</text:p>
        </text:list-item>
        <text:list-item>
          <text:p text:style-name="P9"><text:span text:style-name="T3">구현 방법</text:span><text:span text:style-name="T2">:</text:span> * <text:span text:style-name="T3">상대 강도 비교</text:span><text:span text:style-name="T2">:</text:span> 실시간으로 상위 5개 테마의 '분당 거래대금 유입 속도'를 비교합니다.</text:p>
          <text:list>
            <text:list-item>
              <text:p text:style-name="P9"><text:span text:style-name="T3">전이 감지</text:span><text:span text:style-name="T2">:</text:span> A테마의 유입 속도가 둔화되는 시점에 B테마의 속도가 가속되면, nbot은 이를 '바톤 터치'로 인식하고 선취매 리스트에 올립니다.</text:p>
            </text:list-item>
          </text:list>
        </text:list-item>
        <text:list-item>
          <text:p text:style-name="P9"><text:span text:style-name="T2">nbot</text:span><text:span text:style-name="T3">의 진화</text:span><text:span text:style-name="T2">:</text:span> "A가 죽어야 B가 산다"는 시장의 역설을 코드로 구현하는 것입니다.</text:p>
        </text:list-item>
      </text:list>
      <text:p text:style-name="P10"/>
      <text:h text:style-name="P11" text:outline-level="3">🚀 2. '대장주 교체' 실시간 대응 (Leader Rotation)</text:h>
      <text:p text:style-name="P8"/>
      <text:p text:style-name="P8">테마 내에서 대장주가 바뀌는 '왕위 찬탈'의 순간을 포착하여 수익을 극대화하는 전술입니다.</text:p>
      <text:list text:style-name="L3">
        <text:list-item>
          <text:p text:style-name="P12"><text:span text:style-name="T3">메커니즘</text:span><text:span text:style-name="T2">:</text:span> 1등주가 상한가에 안착하거나 VI에 들어가서 거래가 일시 정지될 때, 2등주의 체결 가속도($\alpha$)가 1등주의 직전 가속도를 넘어서는지 확인합니다.</text:p>
        </text:list-item>
        <text:list-item>
          <text:p text:style-name="P13"><text:span text:style-name="T4">구현 방법</text:span><text:span text:style-name="T5">:</text:span><text:span text:style-name="T1"> * </text:span><text:span text:style-name="T4">가속도 엔진</text:span><text:span text:style-name="T5">:</text:span><text:span text:style-name="T1"> </text:span><text:span text:style-name="Source_20_Text"><text:span text:style-name="T1">(현재 체결강도 - 1분 전 체결강도) / 시간</text:span></text:span><text:span text:style-name="T1">으로 에너지의 기울기를 구합니다.</text:span></text:p>
          <text:list>
            <text:list-item>
              <text:p text:style-name="P12"><text:soft-page-break/><text:span text:style-name="T3">타겟 스위칭</text:span><text:span text:style-name="T2">:</text:span> 1등주가 정체되는 순간, 가속도가 가장 높은 2등주로 nbot의 조준경을 즉시 옮깁니다.</text:p>
            </text:list-item>
          </text:list>
        </text:list-item>
        <text:list-item>
          <text:p text:style-name="P12">nbot의 진화: "고정된 대장주"라는 관념을 버리고, 실시간 에너지가 가장 센 놈을 대장으로 대우하는 유연함을 갖게 됩니다.</text:p>
        </text:list-item>
      </text:list>
      <text:h text:style-name="P14" text:outline-level="3"><text:span text:style-name="T6">3</text:span>. 테마별 분당 거래대금 변동률 (가공법)</text:h>
      <text:p text:style-name="P15">키움 API의 테마별 시세(OPT10074 등)는 테마 전체의 현재 거래대금을 줍니다. 하지만 '변동률'은 주지 않죠.</text:p>
      <text:list text:style-name="L4">
        <text:list-item>
          <text:p text:style-name="P16"><text:span text:style-name="T4">재료</text:span><text:span text:style-name="T5">:</text:span><text:span text:style-name="T1"> </text:span><text:span text:style-name="Source_20_Text"><text:span text:style-name="T1">KOA_Functions</text:span></text:span><text:span text:style-name="T1"> 혹은 실시간 TR을 통해 받는 테마별 </text:span><text:span text:style-name="T5">'</text:span><text:span text:style-name="T4">거래대금</text:span><text:span text:style-name="T5">'</text:span><text:span text:style-name="T1"> 수치.</text:span></text:p>
        </text:list-item>
        <text:list-item>
          <text:p text:style-name="P16"><text:span text:style-name="T4">제조법</text:span><text:span text:style-name="T5">:</text:span><text:span text:style-name="T1"> 1. 1분마다 해당 테마의 총 거래대금을 메모리(또는 DB)에 기록합니다. 2. </text:span><text:span text:style-name="Source_20_Text"><text:span text:style-name="T1">변동률 = (현재 거래대금 - 1분 전 거래대금) / 1분 전 거래대금</text:span></text:span><text:span text:style-name="T1"> 3. 이 수치가 급증하면 </text:span><text:span text:style-name="T5">'</text:span><text:span text:style-name="T4">돈의 유입 가속</text:span><text:span text:style-name="T5">'</text:span><text:span text:style-name="T1">, 급감하면 '순환매 이탈 신호'로 해석합니다.</text:span></text:p>
        </text:list-item>
      </text:list>
      <text:h text:style-name="P14" text:outline-level="3"><text:span text:style-name="T6">4</text:span>. 종목별 체결 가속도 (가공법)</text:h>
      <text:p text:style-name="P17"><text:span text:style-name="T1">키움의 실시간 데이터(주식체결, </text:span><text:span text:style-name="Source_20_Text"><text:span text:style-name="T1">S</text:span></text:span><text:span text:style-name="T1"> 구분)는 '현재 체결량'과 '체결강도'를 아주 빠르게 던져줍니다. 가속도는 여기서 나옵니다.</text:span></text:p>
      <text:list text:style-name="L5">
        <text:list-item>
          <text:p text:style-name="P18"><text:span text:style-name="T4">재료</text:span><text:span text:style-name="T5">:</text:span><text:span text:style-name="T1"> 실시간 </text:span><text:span text:style-name="Source_20_Text"><text:span text:style-name="T1">주식체결</text:span></text:span><text:span text:style-name="T1"> 데이터 내의 </text:span><text:span text:style-name="T5">'</text:span><text:span text:style-name="T4">체결강도</text:span><text:span text:style-name="T5">'</text:span><text:span text:style-name="T1"> 또는 </text:span><text:span text:style-name="T5">'</text:span><text:span text:style-name="T4">누적거래량</text:span><text:span text:style-name="T5">'</text:span><text:span text:style-name="T1">.</text:span></text:p>
        </text:list-item>
        <text:list-item>
          <text:p text:style-name="P19"><text:span text:style-name="T3">제조법</text:span><text:span text:style-name="T2">:</text:span></text:p>
          <text:list>
            <text:list-item>
              <text:p text:style-name="P19"><text:span text:style-name="T3">틱</text:span><text:span text:style-name="T2">(Tick) </text:span><text:span text:style-name="T3">또는 초 단위</text:span>로 체결강도를 모니터링합니다.</text:p>
            </text:list-item>
            <text:list-item>
              <text:p text:style-name="P18"><text:span text:style-name="Source_20_Text"><text:span text:style-name="T1">가속도 = (현재 체결강도 - 10초 전 체결강도) / 10초</text:span></text:span></text:p>
            </text:list-item>
            <text:list-item>
              <text:p text:style-name="P19"><text:span text:style-name="T2">nbot </text:span><text:span text:style-name="T3">필살기</text:span><text:span text:style-name="T2">:</text:span> 단순히 체결강도가 100%를 넘는 게 중요한 게 아니라, 80%였던 녀석이 10초 만에 120%로 '기울기'를 가파르게 올릴 때가 진짜 <text:span text:style-name="T3">대장주 교체의 순간</text:span>입니다.</text:p>
              <text:p text:style-name="P19"/>
            </text:list-item>
          </text:list>
        </text:list-item>
      </text:list>
      <text:h text:style-name="P20" text:outline-level="4"><text:soft-page-break/><text:span text:style-name="T1">[함수 1] </text:span><text:span text:style-name="Source_20_Text"><text:span text:style-name="T1">get_momentum_accel</text:span></text:span><text:span text:style-name="T1"> (대장주 가속도)</text:span></text:h>
      <text:list text:style-name="L6">
        <text:list-item>
          <text:p text:style-name="P21"><text:span text:style-name="T3">미션</text:span><text:span text:style-name="T2">:</text:span> "30초 전 체결강도와 현재 체결강도를 비교해. 만약 기울기가 45도 이상 꺾여 올라가면 '스퍼트 발생'으로 간주해."</text:p>
        </text:list-item>
        <text:list-item>
          <text:p text:style-name="P21"><text:span text:style-name="T3">체크</text:span><text:span text:style-name="T2">:</text:span> 1등주가 멈칫할 때 2등주 가속도가 더 높으면 nbot에게 바로 신호를 줘.</text:p>
        </text:list-item>
      </text:list>
      <text:h text:style-name="Heading_20_4" text:outline-level="4"><text:span text:style-name="T1">[함수 2] </text:span><text:span text:style-name="Source_20_Text"><text:span text:style-name="T1">get_sector_flow</text:span></text:span><text:span text:style-name="T1"> (테마 순환매)</text:span></text:h>
      <text:list text:style-name="L7">
        <text:list-item>
          <text:p text:style-name="P22"><text:span text:style-name="T3">미션</text:span><text:span text:style-name="T2">:</text:span> "키움에서 주는 테마별 거래대금을 1분 단위로 저장해. A테마가 고점에서 횡보할 때 B테마 거래대금이 바닥에서 솟구치면 '바톤 터치'라고 보고해."</text:p>
        </text:list-item>
        <text:list-item>
          <text:p text:style-name="P22"><text:span text:style-name="T3">체크</text:span><text:span text:style-name="T2">:</text:span> 이건 nbot의 30초 주기보다 조금 긴 <text:span text:style-name="T2">1</text:span><text:span text:style-name="T3">분</text:span><text:span text:style-name="T2">~3</text:span><text:span text:style-name="T3">분 단위</text:span>로 체크하는 게 더 정확해.</text:p>
        </text:list-item>
      </text:list>
      <text:p text:style-name="P23"/>
      <text:p text:style-name="P24">cp sector_monitor.py /home/free4tak/k-bot/stock_bot/</text:p>
      <text:p text:style-name="P24"/>
      <text:p text:style-name="P24"># 내일 장 시작 전 테스트</text:p>
      <text:p text:style-name="P24">cd /home/free4tak/k-bot/stock_bot</text:p>
      <text:p text:style-name="P24">source venv/bin/activate</text:p>
      <text:p text:style-name="P24">python3 sector_monitor.py</text:p>
      <text:p text:style-name="P24"/>
      <text:h text:style-name="P25" text:outline-level="3">수집되는 데이터</text:h>
      <text:p text:style-name="Text_20_body"><text:span text:style-name="Strong_20_Emphasis"><text:span text:style-name="Source_20_Text"><text:span text:style-name="T1">sector_flow</text:span></text:span></text:span><text:span text:style-name="Strong_20_Emphasis"><text:span text:style-name="T1"> 테이블 (1분마다)</text:span></text:span></text:p>
      <text:p text:style-name="P26"><text:span text:style-name="Source_20_Text"><text:span text:style-name="T7">ts, theme_cd, theme_nm, flu_rt, rising_num, total_num, trde_amt, flow_rate</text:span></text:span></text:p>
      <text:p text:style-name="Text_20_body"><text:span text:style-name="Strong_20_Emphasis"><text:span text:style-name="Source_20_Text"><text:span text:style-name="T1">stock_momentum</text:span></text:span></text:span><text:span text:style-name="Strong_20_Emphasis"><text:span text:style-name="T1"> 테이블 (30초마다)</text:span></text:span></text:p>
      <text:p text:style-name="P26"><text:span text:style-name="Source_20_Text"><text:span text:style-name="T7">ts, code, theme_cd, theme_nm, change_rate, vol_ratio, trde_amt, cntg_str, accel</text:span></text:span></text:p>
      <text:h text:style-name="P27" text:outline-level="3"><text:soft-page-break/>10일 후 리포트</text:h>
      <text:p text:style-name="P28">bash</text:p>
      <text:p text:style-name="P26"><text:span text:style-name="Source_20_Text"><text:span text:style-name="T7">python3 sector_monitor.py report </text:span></text:span><text:span text:style-name="Source_20_Text"><text:span text:style-name="T8">10</text:span></text:span></text:p>
      <text:p text:style-name="P24"/>
      <text:p text:style-name="P24"># 테스트 실행 후 데이터 확인</text:p>
      <text:p text:style-name="P24">sqlite3 /home/free4tak/k-bot/stock_bot/sector_monitor.db "</text:p>
      <text:p text:style-name="P24">SELECT theme_nm, trde_amt, flow_rate </text:p>
      <text:p text:style-name="P24">FROM sector_flow </text:p>
      <text:p text:style-name="P24">ORDER BY ts DESC </text:p>
      <text:p text:style-name="P24">LIMIT 10;</text:p>
      <text:p text:style-name="P24">"</text:p>
      <text:p text:style-name="P29"><text:span text:style-name="T1">10일 뒤 </text:span><text:span text:style-name="Source_20_Text"><text:span text:style-name="T1">report</text:span></text:span><text:span text:style-name="T1"> 인자를 넣어 분석하실 때, 아래 3가지를 중점적으로 확인해 보세요.</text:span></text:p>
      <text:list text:style-name="L8">
        <text:list-item>
          <text:p text:style-name="P30"><text:span text:style-name="T4">시간대별 군집성</text:span><text:span text:style-name="T5">(Clustering):</text:span><text:span text:style-name="T1"> 오늘 복기에서 나온 '10시의 저주' 구간에서 실제 테마들의 </text:span><text:span text:style-name="Source_20_Text"><text:span text:style-name="T1">flow_rate</text:span></text:span><text:span text:style-name="T1">가 어떻게 흔들리는지 데이터로 확인 가능합니다.</text:span></text:p>
        </text:list-item>
        <text:list-item>
          <text:p text:style-name="P30"><text:span text:style-name="T4">가속도의 유효 수명</text:span><text:span text:style-name="T5">:</text:span><text:span text:style-name="T1"> </text:span><text:span text:style-name="Source_20_Text"><text:span text:style-name="T1">accel</text:span></text:span><text:span text:style-name="T1">이 발생한 후 시세가 몇 분 동안 지속되는지 분석하면, nbot의 '익절 시간'을 최적화할 수 있습니다.</text:span></text:p>
        </text:list-item>
        <text:list-item>
          <text:p text:style-name="P30"><text:span text:style-name="T4">테마 내 확산성</text:span><text:span text:style-name="T5">:</text:span><text:span text:style-name="T1"> 대장주의 </text:span><text:span text:style-name="Source_20_Text"><text:span text:style-name="T1">accel</text:span></text:span><text:span text:style-name="T1">이 터질 때 2, 3등주의 </text:span><text:span text:style-name="Source_20_Text"><text:span text:style-name="T1">accel</text:span></text:span><text:span text:style-name="T1">이 동반 상승하는 테마만 골라내면, 그게 바로 마스터가 찾던 '진짜 잔칫집'입니다.</text:span></text:p>
        </text:list-item>
      </text:list>
      <text:p text:style-name="P31">2026.05.15</text:p>
      <text:p text:style-name="P31">MAX_POSITIONS=3 첫 적용 </text:p>
      <text:list text:style-name="L9">
        <text:list-item>
          <text:p text:style-name="P32">미체결 자동 취소 첫 적용 </text:p>
        </text:list-item>
      </text:list>
      <text:list text:style-name="L10">
        <text:list-item>
          <text:p text:style-name="P33">동적 목표가 첫 적용 </text:p>
        </text:list-item>
      </text:list>
      <text:list text:style-name="L11">
        <text:list-item>
          <text:p text:style-name="P34">복기 → AI 프롬프트 반영</text:p>
          <text:list>
            <text:list-item>
              <text:list>
                <text:list-item>
                  <text:h text:style-name="P35" text:outline-level="3"><text:soft-page-break/><text:span text:style-name="T9">✅ 오늘 젬마 제안 반영 완료</text:span></text:h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1">오늘 추가 작업 (젬마 제안 반영)</text:span></text:span></text:h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P36">항목</text:p>
            </table:table-cell>
            <table:table-cell table:style-name="표1.A1" office:value-type="string">
              <text:p text:style-name="P36">상태</text:p>
            </table:table-cell>
          </table:table-row>
        </table:table-header-rows>
        <table:table-row>
          <table:table-cell table:style-name="표1.A1" office:value-type="string">
            <text:p text:style-name="P37">백테스터 max_daily_loss 하드코딩 수정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분할매도 트랜잭션 원자성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TR=0 Safe Fallback (3% 기본값)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current_price=0 ZeroDivision 방어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I 캐시 실점수 백테스트 모드 추가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MAX_POSITIONS=3 적용</text:p>
          </table:table-cell>
          <table:table-cell table:style-name="표1.A1" office:value-type="string">
            <text:p text:style-name="P37">✅</text:p>
          </table:table-cell>
        </table:table-row>
      </table:table>
      <text:list text:style-name="L12">
        <text:list-item>
          <text:p text:style-name="P38">비동기 API 호출 (150종목 병렬) </text:p>
        </text:list-item>
        <text:list-item>
          <text:p text:style-name="P39">피드백 루프 편향 방지 가드레일</text:p>
        </text:list-item>
      </text:list>
      <text:p text:style-name="P24">차후 작업</text:p>
      <text:p text:style-name="P40"><text:span text:style-name="T10">비동기 API 호출없음 (코드 개선)여유 있을 때피드백 루프 편향 방지daily_review.json 누적1~2주 후순환매 nbot 통합sector_monitor.db 10일치</text:span><text:span text:style-name="Strong_20_Emphasis"><text:span text:style-name="T10">10일 후</text:span></text:span><text:span text:style-name="T10">수급 포함 백테스트 재검증daily_flow 90일치</text:span><text:span text:style-name="Strong_20_Emphasis"><text:span text:style-name="T10">8월</text:span></text:span></text:p>
      <text:p text:style-name="P24"/>
      <text:p text:style-name="P24">토요일 루틴</text:p>
      <text:p text:style-name="P24">cd /home/free4tak/k-bot/stock_bot/backtest</text:p>
      <text:p text:style-name="P24">bash weekly_review.sh</text:p>
      <text:p text:style-name="P6"/>
      <text:p text:style-name="P6"/>
      <text:p text:style-name="P41">2026.05.18</text:p>
      <text:p text:style-name="P41">✅ get_hoga() 추가 (KIS FHKST01010200) </text:p>
      <text:p text:style-name="P41">✅ 호가 가산점 (매도/매수 3배+ → +10점) </text:p>
      <text:p text:style-name="P41">✅ 병렬 API 호출 (시세+호가 동시) </text:p>
      <text:p text:style-name="P41"><text:soft-page-break/>✅ 병렬 종목 분석 (5개씩 동시) </text:p>
      <text:p text:style-name="P41">✅ 젬마 제안 4가지 반영 </text:p>
      <text:p text:style-name="P41">✅ MAX_POSITIONS=3 적용 </text:p>
      <text:p text:style-name="P41">✅ 백테스트 확인</text:p>
      <text:p text:style-name="P41"/>
      <text:p text:style-name="P41"># 1. 병렬 처리 정상 작동 확인</text:p>
      <text:p text:style-name="P41">./bot.sh log nbot | grep -E "룰분석|호가|ask_bid"</text:p>
      <text:p text:style-name="P41"/>
      <text:p text:style-name="P41"># 2. 호가 가산점 종목 확인</text:p>
      <text:p text:style-name="P41">./bot.sh log nbot | grep -E "점수|ask_bid_ratio"</text:p>
      <text:p text:style-name="P41"/>
      <text:p text:style-name="P41"># 3. 분석 속도 개선 확인 (기존 45초 → 9초 예상)</text:p>
      <text:p text:style-name="P41">./bot.sh log nbot | grep -E "TOP|분석"</text:p>
      <text:p text:style-name="P41"/>
      <text:p text:style-name="P41"/>
      <text:p text:style-name="P42"><text:span text:style-name="Strong_20_Emphasis"><text:span text:style-name="T11">05.18일 작업 내역</text:span></text:span></text:p>
      <text:p text:style-name="P42"><text:span text:style-name="Strong_20_Emphasis"><text:span text:style-name="T11"/></text:span></text:p>
      <text:h text:style-name="P43" text:outline-level="3"><text:span text:style-name="Strong_20_Emphasis"><text:span text:style-name="T12">오늘 전체 작업 요약</text:span></text:span></text:h>
      <text:p text:style-name="P44"><text:span text:style-name="Source_20_Text"><text:span text:style-name="T13">✅ 호가잔량 API + 가산점 (nbot/sbot)</text:span></text:span></text:p>
      <text:p text:style-name="P45"><text:span text:style-name="Source_20_Text"><text:span text:style-name="T13">✅ 병렬 API 호출 (속도 개선)</text:span></text:span></text:p>
      <text:p text:style-name="P45"><text:span text:style-name="Source_20_Text"><text:span text:style-name="T13">✅ 브리핑 수치 정확도 개선</text:span></text:span></text:p>
      <text:p text:style-name="P45"><text:span text:style-name="Source_20_Text"><text:span text:style-name="T13">✅ 저녁 브리핑 수정</text:span></text:span></text:p>
      <text:p text:style-name="P45"><text:span text:style-name="Source_20_Text"><text:span text:style-name="T13">✅ 미실현 손익 반영</text:span></text:span></text:p>
      <text:p text:style-name="P45"><text:span text:style-name="Source_20_Text"><text:span text:style-name="T13">✅ Death Spiral 가드레일</text:span></text:span></text:p>
      <text:p text:style-name="P45"><text:span text:style-name="Source_20_Text"><text:span text:style-name="T13">✅ market_status 동적화 ← 오늘 최대 성과!</text:span></text:span></text:p>
      <text:p text:style-name="P46"><text:span text:style-name="Source_20_Text"><text:span text:style-name="T13"><text:s text:c="3"/>→ 백테스트 +13.07% → +18.07% (+5%)</text:span></text:span></text:p>
      <text:h text:style-name="P47" text:outline-level="3">다음 작업 (5월 25일~)</text:h>
      <text:p text:style-name="P44"><text:span text:style-name="Source_20_Text"><text:span text:style-name="T13">1. 군집도 평가 (데이터 수집 중)</text:span></text:span></text:p>
      <text:p text:style-name="P45"><text:span text:style-name="Source_20_Text"><text:span text:style-name="T13">2. 지표 상관관계 정리 -- 완료</text:span></text:span></text:p>
      <text:p text:style-name="P45"><text:span text:style-name="Source_20_Text"><text:span text:style-name="T13">3. 멀티 에이전트 (장기)</text:span></text:span></text:p>
      <text:p text:style-name="P46"><text:span text:style-name="Source_20_Text"><text:span text:style-name="T13">4. 단타 백테스터 최종 (8월)</text:span></text:span></text:p>
      <text:p text:style-name="P46"><text:span text:style-name="Source_20_Text"><text:span text:style-name="T14"/></text:span></text:p>
      <text:p text:style-name="P46"><text:soft-page-break/><text:span text:style-name="Source_20_Text"><text:span text:style-name="T14"/></text:span></text:p>
      <text:p text:style-name="P46"><text:span text:style-name="Source_20_Text"><text:span text:style-name="T14"/></text:span></text:p>
      <text:p text:style-name="P48"><text:span text:style-name="Source_20_Text"><text:span text:style-name="T15">2026.05.19</text:span></text:span></text:p>
      <text:p text:style-name="P48"><text:span text:style-name="Source_20_Text"><text:span text:style-name="T15"/></text:span></text:p>
      <text:p text:style-name="P46"><text:span text:style-name="Source_20_Text"><text:span text:style-name="T14">✅ 오늘 확정 변경사항 (strategy.py, kis_api.py)</text:span></text:span></text:p>
      <text:p text:style-name="P46"><text:span text:style-name="Source_20_Text"><text:span text:style-name="T14"><text:s text:c="2"/>1. RSI +8 → +3</text:span></text:span></text:p>
      <text:p text:style-name="P46"><text:span text:style-name="Source_20_Text"><text:span text:style-name="T14"><text:s text:c="2"/>2. 스토캐스틱 +6/-6 → +3/-3</text:span></text:span></text:p>
      <text:p text:style-name="P46"><text:span text:style-name="Source_20_Text"><text:span text:style-name="T14"><text:s text:c="2"/>3. weak/stop 손절선 -3% → -5% 유지</text:span></text:span></text:p>
      <text:p text:style-name="P46"><text:span text:style-name="Source_20_Text"><text:span text:style-name="T14"><text:s text:c="2"/>4. kis_api.py 수급 금액 → 수량 기준</text:span></text:span></text:p>
      <text:p text:style-name="P46"><text:span text:style-name="Source_20_Text"><text:span text:style-name="T14"><text:s text:c="2"/>5. KRX 수급 53종목 × 2년치 수집 완료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4">📊 백테스트 성과 (2024-05 ~ 2026-05):</text:span></text:span></text:p>
      <text:p text:style-name="P46"><text:span text:style-name="Source_20_Text"><text:span text:style-name="T14"><text:s text:c="2"/>원본: <text:s/>-3.23% / MDD -15.29% / PF 0.94</text:span></text:span></text:p>
      <text:p text:style-name="P46"><text:span text:style-name="Source_20_Text"><text:span text:style-name="T14"><text:s text:c="2"/>현재: +7.28% / MDD <text:s/>-6.67% / PF 1.11</text:span></text:span></text:p>
      <text:p text:style-name="P46"><text:span text:style-name="Source_20_Text"><text:span text:style-name="T14"/></text:span></text:p>
      <text:p text:style-name="P49"><text:span text:style-name="Source_20_Text"><text:span text:style-name="T16"/></text:span></text:p>
      <text:p text:style-name="P49"><text:span text:style-name="Source_20_Text"><text:span text:style-name="T16">KiKi 브리핑 업그레이드:</text:span></text:span></text:p>
      <text:p text:style-name="P50"><text:span text:style-name="Source_20_Text"><text:span text:style-name="T16"><text:s text:c="2"/>🇺🇸 미국 지수 (Yahoo Finance 직접)</text:span></text:span></text:p>
      <text:p text:style-name="P50"><text:span text:style-name="Source_20_Text"><text:span text:style-name="T16"><text:s text:c="2"/>📊 주요 실적 발표 (Finnhub)</text:span></text:span></text:p>
      <text:p text:style-name="P50"><text:span text:style-name="Source_20_Text"><text:span text:style-name="T16"><text:s text:c="2"/>📅 연준/경제지표 이벤트 (Finnhub) <text:s/></text:span></text:span></text:p>
      <text:p text:style-name="P50"><text:span text:style-name="Source_20_Text"><text:span text:style-name="T16"><text:s text:c="2"/>📰 어젯밤 발표 결과 (웹서치)</text:span></text:span></text:p>
      <text:p text:style-name="P50"><text:span text:style-name="Source_20_Text"><text:span text:style-name="T16"><text:s text:c="2"/>💰 외국인 수급 누적</text:span></text:span></text:p>
      <text:p text:style-name="P50"><text:span text:style-name="Source_20_Text"><text:span text:style-name="T16"><text:s text:c="2"/>🤖 AI 종합 전망</text:span></text:span></text:p>
      <text:p text:style-name="P50"><text:span text:style-name="Source_20_Text"><text:span text:style-name="T16"><text:s text:c="2"/>⚙️ nbot 임계치 권장 (기본값 ±5점 제한)</text:span></text:span></text:p>
      <text:p text:style-name="P51"/>
      <text:p text:style-name="P50"><text:soft-page-break/><text:span text:style-name="Source_20_Text"><text:span text:style-name="T16">내일 검증 포인트:</text:span></text:span></text:p>
      <text:p text:style-name="P50"><text:span text:style-name="Source_20_Text"><text:span text:style-name="T16"><text:s text:c="2"/>NVDA 실적 결과가 브리핑에 반영되는지</text:span></text:span></text:p>
      <text:p text:style-name="P50"><text:span text:style-name="Source_20_Text"><text:span text:style-name="T16"><text:s text:c="2"/>AI 권장 임계치가 합리적인지</text:span></text:span></text:p>
      <text:p text:style-name="P50"><text:span text:style-name="Source_20_Text"><text:span text:style-name="T16"><text:s text:c="2"/>한국장 특성과 맞는지</text:span></text:span></text:p>
      <text:p text:style-name="P51"/>
      <text:p text:style-name="P50"><text:span text:style-name="Source_20_Text"><text:span text:style-name="T16">데이터 축적 후:</text:span></text:span></text:p>
      <text:p text:style-name="P50"><text:span text:style-name="Source_20_Text"><text:span text:style-name="T16"><text:s text:c="2"/>±5점 → ±10점으로 확대</text:span></text:span></text:p>
      <text:p text:style-name="P50"><text:span text:style-name="Source_20_Text"><text:span text:style-name="T16"><text:s text:c="2"/>한국장 특성 패턴 학습</text:span></text:span></text:p>
      <text:p text:style-name="P52"><text:span text:style-name="Source_20_Text"><text:span text:style-name="T16"><text:s text:c="2"/>전면 자동 적용</text:span></text:span></text:p>
      <text:p text:style-name="P52"><text:span text:style-name="Source_20_Text"><text:span text:style-name="T16">✅ attribution 분석 엔진 </text:span></text:span></text:p>
      <text:p text:style-name="P52"><text:span text:style-name="Source_20_Text"><text:span text:style-name="T16">✅ KRX 수급 2년치 수집 </text:span></text:span></text:p>
      <text:p text:style-name="P52"><text:span text:style-name="Source_20_Text"><text:span text:style-name="T16">✅ RSI/스토캐스틱 가중치 조정 </text:span></text:span></text:p>
      <text:p text:style-name="P52"><text:span text:style-name="Source_20_Text"><text:span text:style-name="T16">✅ kis_api 수급 수량 기준 </text:span></text:span></text:p>
      <text:p text:style-name="P52"><text:span text:style-name="Source_20_Text"><text:span text:style-name="T16">✅ sector_monitor 연계 </text:span></text:span></text:p>
      <text:p text:style-name="P52"><text:span text:style-name="Source_20_Text"><text:span text:style-name="T16">✅ 테마 방어 매수 </text:span></text:span></text:p>
      <text:p text:style-name="P52"><text:span text:style-name="Source_20_Text"><text:span text:style-name="T16">✅ KiKi 브리핑 업그레이드 </text:span></text:span></text:p>
      <text:p text:style-name="P52"><text:span text:style-name="Source_20_Text"><text:span text:style-name="T16">✅ Finnhub 실적/이벤트 </text:span></text:span></text:p>
      <text:p text:style-name="P52"><text:span text:style-name="Source_20_Text"><text:span text:style-name="T16">✅ AI 임계치 자동 조정</text:span></text:span></text:p>
      <text:p text:style-name="P53"><text:span text:style-name="Source_20_Text"><text:span text:style-name="T16"/></text:span></text:p>
      <text:p text:style-name="P46"><text:span text:style-name="Source_20_Text"><text:span text:style-name="T14">📅 내일 확인사항:</text:span></text:span></text:p>
      <text:p text:style-name="P46"><text:span text:style-name="Source_20_Text"><text:span text:style-name="T14"><text:s text:c="2"/>장 시작 후 foreign_today 값 확인</text:span></text:span></text:p>
      <text:p text:style-name="P46"><text:span text:style-name="Source_20_Text"><text:span text:style-name="T14"><text:s text:c="2"/>nbot 정상 매수 진입 여부</text:span></text:span></text:p>
      <text:p text:style-name="P46"><text:span text:style-name="Source_20_Text"><text:span text:style-name="T14"/></text:span></text:p>
      <text:p text:style-name="P54"><text:span text:style-name="Strong_20_Emphasis"><text:span text:style-name="T14">디렉토리 구조 재편 완료</text:span></text:span></text:p>
      <text:p text:style-name="P44"><text:span text:style-name="Source_20_Text"><text:span text:style-name="T16">stock_bot/</text:span></text:span></text:p>
      <text:p text:style-name="P45"><text:soft-page-break/><text:span text:style-name="Source_20_Text"><text:span text:style-name="T16">├── bots/ <text:s text:c="9"/>← nbot, sbot, ebot, cbot</text:span></text:span></text:p>
      <text:p text:style-name="P45"><text:span text:style-name="Source_20_Text"><text:span text:style-name="T16">├── core/ <text:s text:c="9"/>← kis_api, kiwoom_api, strategy, risk_manager, db_manager...</text:span></text:span></text:p>
      <text:p text:style-name="P45"><text:span text:style-name="Source_20_Text"><text:span text:style-name="T16">├── intelligence/ <text:s/>← ai_analyzer, sector_monitor, fetch_stocks_v2</text:span></text:span></text:p>
      <text:p text:style-name="P45"><text:span text:style-name="Source_20_Text"><text:span text:style-name="T16">├── interface/ <text:s text:c="4"/>← kiki, daily_review, notifier</text:span></text:span></text:p>
      <text:p text:style-name="P45"><text:span text:style-name="Source_20_Text"><text:span text:style-name="T16">├── data/ <text:s text:c="9"/>← DB 파일들 (나중에 이동)</text:span></text:span></text:p>
      <text:p text:style-name="P45"><text:span text:style-name="Source_20_Text"><text:span text:style-name="T16">├── backtest/ <text:s text:c="5"/>← 백테스트 모듈</text:span></text:span></text:p>
      <text:p text:style-name="P45"><text:span text:style-name="Source_20_Text"><text:span text:style-name="T16">├── archive/ <text:s text:c="6"/>← 백업 파일들</text:span></text:span></text:p>
      <text:p text:style-name="P46"><text:span text:style-name="Source_20_Text"><text:span text:style-name="T16">└── logs/ <text:s text:c="9"/>← 로그</text:span></text:span></text:p>
      <text:p text:style-name="P55"><text:span text:style-name="Source_20_Text"><text:span text:style-name="T17">2026.05.20</text:span></text:span></text:p>
      <text:p text:style-name="P55"><text:span text:style-name="Source_20_Text"><text:span text:style-name="T17">✅ AI 임계치 72점 정상 적용 확인</text:span></text:span></text:p>
      <text:p text:style-name="P55"><text:span text:style-name="Source_20_Text"><text:span text:style-name="T17">✅ 키움 API ka10008 외국인 수급 연동</text:span></text:span></text:p>
      <text:p text:style-name="P55"><text:span text:style-name="Source_20_Text"><text:span text:style-name="T17">✅ foreign_today: 75,752주 정상 수집</text:span></text:span></text:p>
      <text:p text:style-name="P55"><text:span text:style-name="Source_20_Text"><text:span text:style-name="T17">✅ foreign_5d: -4,528,646주 정상 수집</text:span></text:span></text:p>
      <text:p text:style-name="P55"><text:span text:style-name="Source_20_Text"><text:span text:style-name="T17">✅ strategy.py 임계치와 스케일 일치 확인</text:span></text:span></text:p>
      <text:p text:style-name="P44"><text:span text:style-name="Strong_20_Emphasis"><text:span text:style-name="T17"/></text:span></text:p>
      <text:p text:style-name="P44"><text:span text:style-name="Source_20_Text"><text:span text:style-name="T16">kiki 분리 완료:</text:span></text:span></text:p>
      <text:p text:style-name="P45"><text:span text:style-name="Source_20_Text"><text:span text:style-name="T16"><text:s text:c="2"/>kiki.py <text:s text:c="9"/>1746줄 (기존 3226줄 → 46% 감소)</text:span></text:span></text:p>
      <text:p text:style-name="P45"><text:span text:style-name="Source_20_Text"><text:span text:style-name="T16"><text:s text:c="2"/>kiki_briefing.py <text:s/>640줄</text:span></text:span></text:p>
      <text:p text:style-name="P45"><text:span text:style-name="Source_20_Text"><text:span text:style-name="T16"><text:s text:c="2"/>kiki_cmd.py <text:s text:c="5"/>1015줄 <text:s/></text:span></text:span></text:p>
      <text:p text:style-name="P45"><text:span text:style-name="Source_20_Text"><text:span text:style-name="T16"><text:s text:c="2"/>kiki_data.py <text:s text:c="5"/>191줄</text:span></text:span></text:p>
      <text:p text:style-name="P56"/>
      <text:p text:style-name="P45"><text:span text:style-name="Source_20_Text"><text:span text:style-name="T16">기능 정상 확인:</text:span></text:span></text:p>
      <text:p text:style-name="P45"><text:span text:style-name="Source_20_Text"><text:span text:style-name="T16"><text:s text:c="2"/>✅ !상태</text:span></text:span></text:p>
      <text:p text:style-name="P45"><text:span text:style-name="Source_20_Text"><text:span text:style-name="T16"><text:s text:c="2"/>✅ !브리핑 (NVDA 실적, FOMC, AI 전망 포함)</text:span></text:span></text:p>
      <text:p text:style-name="P45"><text:span text:style-name="Source_20_Text"><text:span text:style-name="T16"><text:s text:c="2"/>✅ 자동 복기</text:span></text:span></text:p>
      <text:p text:style-name="P46"><text:span text:style-name="Source_20_Text"><text:span text:style-name="T16"><text:s text:c="2"/>✅ 6개 봇 전부 정상 가동</text:span></text:span></text:p>
      <text:p text:style-name="P46"><text:span text:style-name="Source_20_Text"><text:span text:style-name="T16">nbot:</text:span></text:span></text:p>
      <text:p text:style-name="P46"><text:span text:style-name="Source_20_Text"><text:span text:style-name="T16"><text:s text:c="2"/>✅ 키움 API 재연결 (reset_token)</text:span></text:span></text:p>
      <text:p text:style-name="P46"><text:soft-page-break/><text:span text:style-name="Source_20_Text"><text:span text:style-name="T16"><text:s text:c="2"/>✅ 수급 데이터 키움 연동</text:span></text:span></text:p>
      <text:p text:style-name="P46"><text:span text:style-name="Source_20_Text"><text:span text:style-name="T16"><text:s text:c="2"/>✅ AI 임계치 ±5점 제한 적용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sbot:</text:span></text:span></text:p>
      <text:p text:style-name="P46"><text:span text:style-name="Source_20_Text"><text:span text:style-name="T16"><text:s text:c="2"/>✅ market_status "normal" 고정 (조기 손절 방지)</text:span></text:span></text:p>
      <text:p text:style-name="P46"><text:span text:style-name="Source_20_Text"><text:span text:style-name="T16"><text:s text:c="2"/>✅ 11영업일 초과 +2% 이내 자동 청산</text:span></text:span></text:p>
      <text:p text:style-name="P46"><text:span text:style-name="Source_20_Text"><text:span text:style-name="T16"><text:s text:c="2"/>✅ 키움 API 재연결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cbot:</text:span></text:span></text:p>
      <text:p text:style-name="P46"><text:span text:style-name="Source_20_Text"><text:span text:style-name="T16"><text:s text:c="2"/>✅ 야간 매수 금지 (BTC +2% + 탐욕 60 이상 시 허용)</text:span></text:span></text:p>
      <text:p text:style-name="P46"><text:span text:style-name="Source_20_Text"><text:span text:style-name="T16"><text:s text:c="2"/>✅ 야간 손절선 -3% → -5%</text:span></text:span></text:p>
      <text:p text:style-name="P46"><text:span text:style-name="Source_20_Text"><text:span text:style-name="T16"><text:s text:c="2"/>✅ 거래대금 50억 → 100억 (잡코인 필터)</text:span></text:span></text:p>
      <text:p text:style-name="P46"><text:span text:style-name="Source_20_Text"><text:span text:style-name="T16"><text:s text:c="2"/>✅ 포지션 영속화 (재시작 복구)</text:span></text:span></text:p>
      <text:p text:style-name="P46"><text:span text:style-name="Source_20_Text"><text:span text:style-name="T16"><text:s text:c="2"/>✅ 루프 5분 → 90초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kiwoom_api:</text:span></text:span></text:p>
      <text:p text:style-name="P46"><text:span text:style-name="Source_20_Text"><text:span text:style-name="T16"><text:s text:c="2"/>✅ 토큰 재시도 3회 + exponential backoff</text:span></text:span></text:p>
      <text:p text:style-name="P46"><text:span text:style-name="Source_20_Text"><text:span text:style-name="T16"><text:s text:c="2"/>✅ reset_token 함수 추가</text:span></text:span></text:p>
      <text:p text:style-name="P46"><text:span text:style-name="Source_20_Text"><text:span text:style-name="T16"/></text:span></text:p>
      <text:p text:style-name="P57"><text:span text:style-name="Source_20_Text"><text:span text:style-name="T18">2026.05.21</text:span></text:span></text:p>
      <text:p text:style-name="P58">✅ master_trades.db 생성 및 268건 마이그레이션</text:p>
      <text:p text:style-name="P58"><text:soft-page-break/>✅ core/master_db.py 모듈 생성</text:p>
      <text:p text:style-name="P58">✅ nbot/sbot/cbot 매도 시 자동 기록</text:p>
      <text:p text:style-name="P58">✅ !전체성과 명령 추가</text:p>
      <text:p text:style-name="P58">✅ ebot 서비스 종료/비활성화</text:p>
      <text:p text:style-name="P58">✅ kiki 분리 잔재 버그들 수정</text:p>
      <text:p text:style-name="P58"/>
      <text:p text:style-name="Text_20_body"><text:span text:style-name="Source_20_Text"><text:span text:style-name="T16"># 영암9 작업 내역 — 2026-05-22</text:span></text:span></text:p>
      <text:p text:style-name="Text_20_body"><text:span text:style-name="Source_20_Text"><text:span text:style-name="T16">## 1. nbot 모듈 분리 (order.py / position.py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nbot.py 1685줄 → 단일 파일에 매수/매도/포지션/분석 뒤섞임</text:span></text:span></text:p>
      <text:p text:style-name="Text_20_body"><text:span text:style-name="Source_20_Text"><text:span text:style-name="T16">- 실전 대응 속도 + 유지보수성 개선 목적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ots/nbot_order.py` | 매수/매도/손절카운터/디스코드명령 처리 | 319줄 |</text:span></text:span></text:p>
      <text:p text:style-name="Text_20_body"><text:span text:style-name="Source_20_Text"><text:span text:style-name="T16">| `bots/nbot_position.py` | ATR계산/매도체크/상태저장 | 198줄 |</text:span></text:span></text:p>
      <text:p text:style-name="Text_20_body"><text:span text:style-name="Source_20_Text"><text:span text:style-name="T16">| `bots/nbot.py` (수정) | 메인루프/분석/업종테마 | 1,461줄 (-224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설계 원칙</text:span></text:span></text:p>
      <text:p text:style-name="Text_20_body"><text:span text:style-name="Source_20_Text"><text:span text:style-name="T16">- **하위 호환 100%** — `_do_buy()`, `_do_sell()` 등 기존 메서드명 유지 (래퍼 방식)</text:span></text:span></text:p>
      <text:p text:style-name="Text_20_body"><text:span text:style-name="Source_20_Text"><text:span text:style-name="T16">- `positions`, `peak_tracker` 등 공유 상태는 **레퍼런스 공유** → 데이터 불일치 없음</text:span></text:span></text:p>
      <text:p text:style-name="Text_20_body"><text:span text:style-name="Source_20_Text"><text:span text:style-name="T16">- `OrderManager`: `do_buy()`, `do_sell()`, `do_loss()`, `handle_pending_command()`</text:span></text:span></text:p>
      <text:p text:style-name="Text_20_body"><text:soft-page-break/><text:span text:style-name="Source_20_Text"><text:span text:style-name="T16">- `PositionManager`: `check_all_sells()`, `get_atr_rate()`, `save_status()`</text:span></text:span></text:p>
      <text:p text:style-name="Text_20_body"><text:span text:style-name="Source_20_Text"><text:span text:style-name="T16">- `daily_loss_count` 동기화 — `_do_loss()` 래퍼에서 `self.order.daily_loss_count` 동기화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 2. kiki_monitor.py 분리 (모니터링/능동알림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kiki.py 1755줄 → 모니터링 로직 분리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interface/kiki_monitor.py` | 모니터링/능동알림 5종 태스크 | 586줄 |</text:span></text:span></text:p>
      <text:p text:style-name="Text_20_body"><text:span text:style-name="Source_20_Text"><text:span text:style-name="T16">| `interface/kiki.py` (수정) | 디스코드 명령/브리핑/HTS동기화 | 1,326줄 (-428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분리된 태스크 5종</text:span></text:span></text:p>
      <text:p text:style-name="Text_20_body"><text:span text:style-name="Source_20_Text"><text:span text:style-name="T16">- `status_listener()` — 10초 손익 변동 감지</text:span></text:span></text:p>
      <text:p text:style-name="Text_20_body"><text:span text:style-name="Source_20_Text"><text:span text:style-name="T16">- `proactive_danger_watcher()` — 5분 위험신호 (연속손절/BTC급락)</text:span></text:span></text:p>
      <text:p text:style-name="Text_20_body"><text:span text:style-name="Source_20_Text"><text:span text:style-name="T16">- `proactive_watch_monitor()` — 30분 주의신호 (승률저하/시장변화)</text:span></text:span></text:p>
      <text:p text:style-name="Text_20_body"><text:span text:style-name="Source_20_Text"><text:span text:style-name="T16">- `proactive_insight_provider()` — 1시간 인사이트</text:span></text:span></text:p>
      <text:p text:style-name="Text_20_body"><text:span text:style-name="Source_20_Text"><text:span text:style-name="T16">- `proactive_daily_review()` — 15:35 일일리뷰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핵심 설계</text:span></text:span></text:p>
      <text:p text:style-name="Text_20_body"><text:span text:style-name="Source_20_Text"><text:span text:style-name="T16">- `init_monitor()` 한 번 호출로 의존성 주입 (bot, ai, read_state 등)</text:span></text:span></text:p>
      <text:p text:style-name="Text_20_body"><text:span text:style-name="Source_20_Text"><text:span text:style-name="T16">- 순환 import 없음 — `kiki_briefing._claude_call`은 함수 내부에서만 import</text:span></text:span></text:p>
      <text:p text:style-name="Text_20_body"><text:soft-page-break/><text:span text:style-name="Source_20_Text"><text:span text:style-name="T16">- 모든 태스크에 `try/except` + `if not ch` 방어</text:span></text:span></text:p>
      <text:p text:style-name="Text_20_body"><text:span text:style-name="Source_20_Text"><text:span text:style-name="T16">## 3. sbot 백테스터 구축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acktest/sbot_backtest_engine.py` | 스윙봇 전용 백테스트 엔진 | 687줄 |</text:span></text:span></text:p>
      <text:p text:style-name="Text_20_body"><text:span text:style-name="Source_20_Text"><text:span text:style-name="T16">| `backtest/run_sbot_backtest.py` | 실행 진입점 + 시나리오 5개 | 264줄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nbot 엔진과의 핵심 차이</text:span></text:span></text:p>
      <text:p text:style-name="Text_20_body"><text:span text:style-name="Source_20_Text"><text:span text:style-name="T16">| 항목 | nbot | sbot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익절선 | +5/+10/+15% | +8/+15/+25% |</text:span></text:span></text:p>
      <text:p text:style-name="Text_20_body"><text:span text:style-name="Source_20_Text"><text:span text:style-name="T16">| 손절선 | -5% | -7% (1차후 본절 -3%) |</text:span></text:span></text:p>
      <text:p text:style-name="Text_20_body"><text:span text:style-name="Source_20_Text"><text:span text:style-name="T16">| 트레일링 | 고점 -2.5%/-2% | 고점 -5%/-7% |</text:span></text:span></text:p>
      <text:p text:style-name="Text_20_body"><text:span text:style-name="Source_20_Text"><text:span text:style-name="T16">| 보유기간 | 당일 종가매도 | 최대 11영업일 |</text:span></text:span></text:p>
      <text:p text:style-name="Text_20_body"><text:span text:style-name="Source_20_Text"><text:span text:style-name="T16">| market_status | 동적 반영 | "normal" 고정 |</text:span></text:span></text:p>
      <text:p text:style-name="Text_20_body"><text:span text:style-name="Source_20_Text"><text:span text:style-name="T16">| 전략 클래스 | Strategy | SwingStrategy |</text:span></text:span></text:p>
      <text:p text:style-name="Text_20_body"><text:span text:style-name="Source_20_Text"><text:span text:style-name="T16">| 매수 필터 | is_sector_match | is_new |</text:span></text:span></text:p>
      <text:p text:style-name="Text_20_body"><text:span text:style-name="Source_20_Text"><text:span text:style-name="T16">| 시총 필터 | 없음 | 거래대금 100억↑ (hts_avls DB에 없음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결론 및 실전 적용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sbot.py 변경 (백테스트 근거)</text:span></text:span></text:p>
      <text:p text:style-name="Text_20_body"><text:span text:style-name="Source_20_Text"><text:span text:style-name="T16">BUY_SCORE_ENTER = 80 <text:s text:c="2"/># 70 → 80</text:span></text:span></text:p>
      <text:p text:style-name="Text_20_body"><text:soft-page-break/><text:span text:style-name="Source_20_Text"><text:span text:style-name="T16">MAX_POSITIONS <text:s text:c="2"/>= 3 <text:s text:c="3"/># 2 → 3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 현재 실전 운영 조건 (소액 데이터 축적용)</text:span></text:span></text:p>
      <text:p text:style-name="Text_20_body"><text:span text:style-name="Source_20_Text"><text:span text:style-name="T16">초기자본: 100만원</text:span></text:span></text:p>
      <text:p text:style-name="Text_20_body"><text:span text:style-name="Source_20_Text"><text:span text:style-name="T16">매수금액: 33만원 × 3종목</text:span></text:span></text:p>
      <text:p text:style-name="Text_20_body"><text:span text:style-name="Source_20_Text"><text:span text:style-name="T16">목적: 데이터 쌓기 (본격 투자 전 검증)</text:span></text:span></text:p>
      <text:p text:style-name="Text_20_body"><text:span text:style-name="Source_20_Text"><text:span text:style-name="T16">## 6. 토요일 루틴 통합 (weekly_review.sh 업데이트)</text:span></text:span></text:p>
      <text:p text:style-name="Text_20_body"><text:span text:style-name="Source_20_Text"><text:span text:style-name="T16">### 변경 내용</text:span></text:span></text:p>
      <text:p text:style-name="Text_20_body"><text:span text:style-name="Source_20_Text"><text:span text:style-name="T16">- **Step 3 추가**: sbot 백테스트 자동 실행</text:span></text:span></text:p>
      <text:p text:style-name="Text_20_body"><text:span text:style-name="Source_20_Text"><text:span text:style-name="T16">- **HTML 리포트**: nbot + sbot 통합 (generate_combined_report.py)</text:span></text:span></text:p>
      <text:p text:style-name="Text_20_body"><text:span text:style-name="Source_20_Text"><text:span text:style-name="T16">- **브라우저 자동 오픈**: xdg-open 자동 실행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</text:span></text:span></text:p>
      <text:p text:style-name="Text_20_body"><text:span text:style-name="Source_20_Text"><text:span text:style-name="T16">|---|---|</text:span></text:span></text:p>
      <text:p text:style-name="Text_20_body"><text:span text:style-name="Source_20_Text"><text:span text:style-name="T16">| `backtest/weekly_review.sh` (수정) | nbot+sbot 통합 루틴 (4단계) |</text:span></text:span></text:p>
      <text:p text:style-name="Text_20_body"><text:span text:style-name="Source_20_Text"><text:span text:style-name="T16">| `backtest/generate_combined_report.py` | Chart.js 통합 HTML 리포트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토요일 루틴 4단계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[1/4] OHLCV 최신화 (fetch_history_fdr.py)</text:span></text:span></text:p>
      <text:p text:style-name="Text_20_body"><text:span text:style-name="Source_20_Text"><text:span text:style-name="T16">[2/4] 수급 최신화 (fetch_investor.py)</text:span></text:span></text:p>
      <text:p text:style-name="Text_20_body"><text:span text:style-name="Source_20_Text"><text:span text:style-name="T16">[3/4] nbot 백테스트 (run_backtest.py --compare)</text:span></text:span></text:p>
      <text:p text:style-name="Text_20_body"><text:span text:style-name="Source_20_Text"><text:span text:style-name="T16">[4/4] sbot 백테스트 (run_sbot_backtest.py --compare)</text:span></text:span></text:p>
      <text:p text:style-name="Text_20_body"><text:span text:style-name="Source_20_Text"><text:span text:style-name="T16">→ 통합 HTML 리포트 자동 생성 + 브라우저 오픈</text:span></text:span></text:p>
      <text:p text:style-name="Text_20_body"><text:soft-page-break/><text:span text:style-name="Source_20_Text"><text:span text:style-name="T16">```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실행 방법</text:span></text:span></text:p>
      <text:p text:style-name="Text_20_body"><text:span text:style-name="Source_20_Text"><text:span text:style-name="T16">```bash</text:span></text:span></text:p>
      <text:p text:style-name="Text_20_body"><text:span text:style-name="Source_20_Text"><text:span text:style-name="T16">cd /home/free4tak/k-bot/stock_bot/backtest</text:span></text:span></text:p>
      <text:p text:style-name="Text_20_body"><text:span text:style-name="Source_20_Text"><text:span text:style-name="T16">chmod +x weekly_review.sh</text:span></text:span></text:p>
      <text:p text:style-name="Text_20_body"><text:span text:style-name="Source_20_Text"><text:span text:style-name="T16">bash weekly_review.sh <text:s text:c="2"/># 또는 ./weekly_review.sh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 토요일 루틴</text:span></text:span></text:p>
      <text:p text:style-name="Text_20_body"><text:span text:style-name="Source_20_Text"><text:span text:style-name="T16">cp weekly_review.sh \</text:span></text:span></text:p>
      <text:p text:style-name="Text_20_body"><text:span text:style-name="Source_20_Text"><text:span text:style-name="T16"><text:s text:c="3"/>/home/free4tak/k-bot/stock_bot/backtest/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sbot.py 실전 파라미터 변경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/home/free4tak/k-bot/stock_bot/bots/sbot.py</text:span></text:span></text:p>
      <text:p text:style-name="Text_20_body"><text:span text:style-name="Source_20_Text"><text:span text:style-name="T16">BUY_SCORE_ENTER = 80 <text:s text:c="2"/># 70 → 80 (점수체계 개선 반영)</text:span></text:span></text:p>
      <text:p text:style-name="Text_20_body"><text:span text:style-name="Source_20_Text"><text:span text:style-name="T16">MAX_POSITIONS <text:s text:c="2"/>= 3 <text:s text:c="3"/># 2 → 3 <text:s/>(백테스트 근거)</text:span></text:span></text:p>
      <text:p text:style-name="Text_20_body"><text:span text:style-name="Source_20_Text"><text:span text:style-name="T16">BUY_1ST_AMT_BASE = 330_000 <text:s/># 33만원 (100만원 / 3종목)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# 8. 다음 작업 예정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중 확인 (내일 장 시작 후)</text:span></text:span></text:p>
      <text:p text:style-name="Text_20_body"><text:span text:style-name="Source_20_Text"><text:span text:style-name="T16">- nbot 분리 모듈 (`nbot_order`, `nbot_position`) 실전 동작 확인</text:span></text:span></text:p>
      <text:p text:style-name="Text_20_body"><text:span text:style-name="Source_20_Text"><text:span text:style-name="T16">- 매도 시 `master_db` 자동 기록 확인</text:span></text:span></text:p>
      <text:p text:style-name="Text_20_body"><text:soft-page-break/><text:span text:style-name="Source_20_Text"><text:span text:style-name="T16">- `!매도`, `!매수` 명령어 OrderManager 경유 확인</text:span></text:span></text:p>
      <text:p text:style-name="Text_20_body"><text:span text:style-name="Source_20_Text"><text:span text:style-name="T16">- 15:35 `proactive_daily_review` 동작 확인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단기 (5월 25일~)</text:span></text:span></text:p>
      <text:p text:style-name="Text_20_body"><text:span text:style-name="Source_20_Text"><text:span text:style-name="T16">- `kiki_monitor.py` 분리 (모니터링/알림) ✅ 완료</text:span></text:span></text:p>
      <text:p text:style-name="Text_20_body"><text:span text:style-name="Source_20_Text"><text:span text:style-name="T16">- `nbot` 분리 (order.py, position.py) ✅ 완료</text:span></text:span></text:p>
      <text:p text:style-name="Text_20_body"><text:span text:style-name="Source_20_Text"><text:span text:style-name="T16">- sbot 실전 데이터 축적 시작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중기 (8월 수급 90일치 누적 후)</text:span></text:span></text:p>
      <text:p text:style-name="Text_20_body"><text:span text:style-name="Source_20_Text"><text:span text:style-name="T16">- nbot + sbot 통합 재백테스트</text:span></text:span></text:p>
      <text:p text:style-name="Text_20_body"><text:span text:style-name="Source_20_Text"><text:span text:style-name="T16">- 임계치/손절비율 종합 재조정</text:span></text:span></text:p>
      <text:p text:style-name="Text_20_body"><text:span text:style-name="Source_20_Text"><text:span text:style-name="T16">- 군집도 평가 (sector_monitor 10일치 데이터 활용)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기</text:span></text:span></text:p>
      <text:p text:style-name="Text_20_body"><text:span text:style-name="Source_20_Text"><text:span text:style-name="T16">- 멀티 에이전트 구조</text:span></text:span></text:p>
      <text:p text:style-name="Text_20_body"><text:span text:style-name="Source_20_Text"><text:span text:style-name="T16">- nbot 테마 가산점 → sbot 이식</text:span></text:span></text:p>
      <text:p text:style-name="P59"><text:span text:style-name="Source_20_Text"><text:span text:style-name="T19"/></text:span></text:p>
      <text:p text:style-name="P59"><text:span text:style-name="Source_20_Text"><text:span text:style-name="T19">2026.05.22</text:span></text:span></text:p>
      <text:p text:style-name="Text_20_body"><text:span text:style-name="Source_20_Text"><text:span text:style-name="T16">✅ nbot/sbot positions 레퍼런스 버그</text:span></text:span></text:p>
      <text:p text:style-name="Text_20_body"><text:span text:style-name="Source_20_Text"><text:span text:style-name="T16">✅ sbot load_dotenv 경로 버그</text:span></text:span></text:p>
      <text:p text:style-name="Text_20_body"><text:span text:style-name="Source_20_Text"><text:span text:style-name="T16">✅ sbot pending_orders 무한루프 버그</text:span></text:span></text:p>
      <text:p text:style-name="Text_20_body"><text:span text:style-name="Source_20_Text"><text:span text:style-name="T16">✅ nbot/sbot 수동매도 감지 자동 반영</text:span></text:span></text:p>
      <text:p text:style-name="Text_20_body"><text:span text:style-name="Source_20_Text"><text:span text:style-name="T16">✅ !매도 실계좌 조회 루틴</text:span></text:span></text:p>
      <text:p text:style-name="Text_20_body"><text:span text:style-name="Source_20_Text"><text:span text:style-name="T16">✅ !상태 현재가/등락률 (sbot)</text:span></text:span></text:p>
      <text:p text:style-name="Text_20_body"><text:soft-page-break/><text:span text:style-name="Source_20_Text"><text:span text:style-name="T16">✅ daily_review cron 경로 수정</text:span></text:span></text:p>
      <text:p text:style-name="Text_20_body"><text:span text:style-name="Source_20_Text"><text:span text:style-name="T16">✅ performance.py master_trades 수정</text:span></text:span></text:p>
      <text:p text:style-name="Text_20_body"><text:span text:style-name="Source_20_Text"><text:span text:style-name="T16">✅ bot.sh 개별 재시작 기능</text:span></text:span></text:p>
      <text:p text:style-name="Text_20_body"><text:span text:style-name="Source_20_Text"><text:span text:style-name="T16">✅ weekly_review.sh 완전 자동화</text:span></text:span></text:p>
      <text:p text:style-name="Text_20_body"><text:span text:style-name="Source_20_Text"><text:span text:style-name="T16">✅ nbot+sbot 통합 HTML 리포트</text:span></text:span></text:p>
      <text:p text:style-name="P45"><text:span text:style-name="Source_20_Text"><text:span text:style-name="T16"/></text:span></text:p>
      <text:p text:style-name="P60"><text:span text:style-name="Source_20_Text"><text:span text:style-name="T20">2026.05.24</text:span></text:span></text:p>
      <text:p text:style-name="P60"><text:span text:style-name="Source_20_Text"><text:span text:style-name="T20"/></text:span></text:p>
      <text:p text:style-name="P60"><text:span text:style-name="Source_20_Text"><text:span text:style-name="T20">✅ ebot 관련 완전 제거 (kiki.py/kiki_cmd.py/kiki_briefing.py/kiki_data.py/kiki_monitor.py)</text:span></text:span></text:p>
      <text:p text:style-name="P60"><text:span text:style-name="Source_20_Text"><text:span text:style-name="T20">✅ !전체상태 3개 봇만 정상 출력</text:span></text:span></text:p>
      <text:p text:style-name="P60"><text:span text:style-name="Source_20_Text"><text:span text:style-name="T20">✅ !도움말 ebot 섹션 제거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nbot/sbot positions 레퍼런스 버그</text:span></text:span></text:p>
      <text:p text:style-name="P60"><text:span text:style-name="Source_20_Text"><text:span text:style-name="T20">✅ sbot load_dotenv 경로 버그</text:span></text:span></text:p>
      <text:p text:style-name="P60"><text:span text:style-name="Source_20_Text"><text:span text:style-name="T20">✅ sbot pending_orders 무한루프 버그</text:span></text:span></text:p>
      <text:p text:style-name="P60"><text:span text:style-name="Source_20_Text"><text:span text:style-name="T20">✅ 수동매도 sold_today 자동 반영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봇 헬스체크 + 자동 재시작</text:span></text:span><text:span text:style-name="Source_20_Text"><text:span text:style-name="T21">(nbot,cbot,sbot)</text:span></text:span><text:span text:style-name="Source_20_Text"><text:span text:style-name="T20"> (키키 2단계)</text:span></text:span></text:p>
      <text:p text:style-name="P60"><text:span text:style-name="Source_20_Text"><text:span text:style-name="T20"><text:s text:c="6"/>5분 무응답 <text:s/>→ 🚨 알림 (10분 경과시 자동재시작 예고)</text:span></text:span></text:p>
      <text:p text:style-name="P60"><text:span text:style-name="Source_20_Text"><text:span text:style-name="T20"><text:s text:c="5"/>10분 무응답 → 🔄 자동 재시작 시도</text:span></text:span></text:p>
      <text:p text:style-name="P60"><text:span text:style-name="Source_20_Text"><text:span text:style-name="T20"><text:s text:c="5"/>재시작 후 <text:s text:c="2"/>→ 30초 대기 → 상태 확인</text:span></text:span></text:p>
      <text:p text:style-name="P60"><text:span text:style-name="Source_20_Text"><text:span text:style-name="T20"><text:s text:c="5"/>복구 성공 <text:s text:c="2"/>→ ✅ 정상 복구 알림</text:span></text:span></text:p>
      <text:p text:style-name="P60"><text:span text:style-name="Source_20_Text"><text:span text:style-name="T20"><text:s text:c="4"/>복구 실패 <text:s text:c="2"/>→ ❌ 수동 확인 필요 알림</text:span></text:span></text:p>
      <text:p text:style-name="P60"><text:span text:style-name="Source_20_Text"><text:span text:style-name="T20"><text:s text:c="4"/>재시작 방지 → 5분 이내 중복 재시작 방지</text:span></text:span></text:p>
      <text:p text:style-name="P60"><text:span text:style-name="Source_20_Text"><text:span text:style-name="T20"/></text:span></text:p>
      <text:p text:style-name="P61"><text:span text:style-name="Source_20_Text"><text:span text:style-name="T20"><text:s/></text:span></text:span><text:span text:style-name="Source_20_Text"><text:span text:style-name="T22">2026.05.26 cbot개선</text:span></text:span></text:p>
      <text:p text:style-name="Text_20_body"><text:span text:style-name="Source_20_Text"><text:span text:style-name="T20">✅ positions 레퍼런스 버그 수정</text:span></text:span></text:p>
      <text:p text:style-name="Text_20_body"><text:span text:style-name="Source_20_Text"><text:span text:style-name="T20">✅ load_dotenv 경로 수정</text:span></text:span></text:p>
      <text:p text:style-name="Text_20_body"><text:soft-page-break/><text:span text:style-name="Source_20_Text"><text:span text:style-name="T20">✅ DB 정합성 체크 추가</text:span></text:span></text:p>
      <text:p text:style-name="Text_20_body"><text:span text:style-name="Source_20_Text"><text:span text:style-name="T20">✅ master_db profit_rate 오류 수정</text:span></text:span></text:p>
      <text:p text:style-name="Text_20_body"><text:span text:style-name="Source_20_Text"><text:span text:style-name="T20">✅ 야간 급락감지 완화 (-5% → -8%)</text:span></text:span></text:p>
      <text:p text:style-name="Text_20_body"><text:span text:style-name="Source_20_Text"><text:span text:style-name="T20">✅ 야간 시간대 조정 (00~06 → 01~05시)</text:span></text:span></text:p>
      <text:p text:style-name="Text_20_body"><text:span text:style-name="Source_20_Text"><text:span text:style-name="T20">✅ BTC 디커플링 대응 (알트 자체 상태)</text:span></text:span></text:p>
      <text:p text:style-name="Text_20_body"><text:span text:style-name="Source_20_Text"><text:span text:style-name="T20">✅ 1시간봉 매수 조건 추가 (멀티 타임프레임)</text:span></text:span></text:p>
      <text:p text:style-name="Text_20_body"><text:span text:style-name="Source_20_Text"><text:span text:style-name="T20">✅ WebSocket 실시간 현재가 (90초 → 즉시)</text:span></text:span></text:p>
      <text:p text:style-name="P60"><text:span text:style-name="Source_20_Text"><text:span text:style-name="T20">✅ sector_monitor accel 가산점 (nbot)</text:span></text:span></text:p>
      <text:p text:style-name="P60"><text:span text:style-name="Source_20_Text"><text:span text:style-name="T20">✅ 스윙 테마 지속성 가산점 (sbot)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cbot WebSocket 실시간 현재가</text:span></text:span></text:p>
      <text:p text:style-name="P60"><text:span text:style-name="Source_20_Text"><text:span text:style-name="T20">✅ cbot 야간 급락감지 완화</text:span></text:span></text:p>
      <text:p text:style-name="P60"><text:span text:style-name="Source_20_Text"><text:span text:style-name="T20">✅ cbot 루프 30초 단축</text:span></text:span></text:p>
      <text:p text:style-name="P60"><text:span text:style-name="Source_20_Text"><text:span text:style-name="T20">✅ cbot BTC 디커플링 대응</text:span></text:span></text:p>
      <text:p text:style-name="P60"><text:span text:style-name="Source_20_Text"><text:span text:style-name="T20">✅ cbot 1시간봉 매수 조건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!매도 sold_today — 이미 do_sell에서 처리 중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sbot peak_tracker 잔량 동기화 (실전)</text:span></text:span></text:p>
      <text:p text:style-name="P60"><text:span text:style-name="Source_20_Text"><text:span text:style-name="T20">✅ nbot/sbot 백테스터 peak_tracker 버그 수정</text:span></text:span></text:p>
      <text:p text:style-name="P60"><text:span text:style-name="Source_20_Text"><text:span text:style-name="T20">✅ sbot 백테스터 now_t 인자 추가</text:span></text:span></text:p>
      <text:p text:style-name="P60"><text:span text:style-name="Source_20_Text"><text:span text:style-name="T20">✅ sbot_strategy.py ATR 손절 로직 수정 (max→min)</text:span></text:span></text:p>
      <text:p text:style-name="P60"><text:span text:style-name="Source_20_Text"><text:span text:style-name="T20">✅ sbot 2차 매수 조건 강화 (MA20+시장normal)</text:span></text:span></text:p>
      <text:p text:style-name="P60"><text:span text:style-name="Source_20_Text"><text:span text:style-name="T20">✅ sbot 2차 매수 금액 수정 (100만→10만)</text:span></text:span></text:p>
      <text:p text:style-name="P60"><text:span text:style-name="Source_20_Text"><text:span text:style-name="T20">✅ nbot/sbot 슬롯 없으면 신규 분석 스킵</text:span></text:span></text:p>
      <text:p text:style-name="P60"><text:span text:style-name="Source_20_Text"><text:span text:style-name="T20">✅ daily_review score_enter 자동 조정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nbot buy_tags 누락 버그 수정 (do_buy에서 buy_tags 저장)</text:span></text:span></text:p>
      <text:p text:style-name="P60"><text:span text:style-name="Source_20_Text"><text:span text:style-name="T20">✅ AI 프롬프트 개선 (점수 기준 현실화, 기본 60점)</text:span></text:span></text:p>
      <text:p text:style-name="P60"><text:span text:style-name="Source_20_Text"><text:span text:style-name="T20">✅ AI 캐시 초기화 (새 프롬프트 반영)</text:span></text:span></text:p>
      <text:p text:style-name="P60"><text:span text:style-name="Source_20_Text"><text:span text:style-name="T20">✅ 백테스트 시나리오 추가 (익절상향, 매수시작0930, 가산점하향, 일손실금액한도)</text:span></text:span></text:p>
      <text:p text:style-name="P60"><text:span text:style-name="Source_20_Text"><text:span text:style-name="T20">✅ 백테스트 시나리오 간 상수 격리 (importlib.reload)</text:span></text:span></text:p>
      <text:p text:style-name="P60"><text:soft-page-break/><text:span text:style-name="Source_20_Text"><text:span text:style-name="T20">✅ BacktestConfig 필드 추가 (sell_1st_rate, trail 등)</text:span></text:span></text:p>
      <text:p text:style-name="P60"><text:span text:style-name="Source_20_Text"><text:span text:style-name="T20">✅ sbot 미너비니 방식 1종목 추가 (_get_minervini_pick)</text:span></text:span></text:p>
      <text:p text:style-name="P60"><text:span text:style-name="Source_20_Text"><text:span text:style-name="T20">✅ 미너비니 종목 20영업일 보유 + 200일선 이탈 청산</text:span></text:span></text:p>
      <text:p text:style-name="P60"><text:span text:style-name="Source_20_Text"><text:span text:style-name="T20">✅ ebot 완전 제거 (kiki.py/kiki_cmd.py/kiki_data.py/kiki_briefing.py/kiki_monitor.py)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B 정합성 체크 (account_sync.py — nbot/sbot/cbot)</text:span></text:span></text:p>
      <text:p text:style-name="P60"><text:span text:style-name="Source_20_Text"><text:span text:style-name="T20">✅ 봇 헬스체크 + 자동 재시작 (키키 2단계)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!전체상태 정리 (종가봇 제거)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sbot _save_status 현재가/등락률 추가</text:span></text:span></text:p>
      <text:p text:style-name="P60"><text:span text:style-name="Source_20_Text"><text:span text:style-name="T20">✅ sector_monitor 분석 (accel 최적 구간 1~5)</text:span></text:span></text:p>
      <text:p text:style-name="P60"><text:span text:style-name="Source_20_Text"><text:span text:style-name="T20">✅ sbot 스윙 테마 지속성 함수 (get_swing_theme_bonus)</text:span></text:span></text:p>
      <text:p text:style-name="P60"><text:span text:style-name="Source_20_Text"><text:span text:style-name="T20">✅ weekly_review.sh NBOT_LATEST 수정</text:span></text:span></text:p>
      <text:p text:style-name="P60">키키</text:p>
      <text:p text:style-name="P60">✅ cmd_buy 종목명 변환 추가</text:p>
      <text:p text:style-name="P60">✅ 승률 계산 오류 수정 (list/dict 구분)</text:p>
      <text:p text:style-name="P60">✅ _get_ai() None 처리 (6군데)</text:p>
      <text:p text:style-name="P60"><text:span text:style-name="Source_20_Text"><text:span text:style-name="T20"/></text:span></text:p>
      <text:p text:style-name="P62"><text:span text:style-name="Source_20_Text"><text:span text:style-name="T23">로드맵</text:span></text:span></text:p>
      <text:p text:style-name="P62"><text:span text:style-name="Source_20_Text"><text:span text:style-name="T23"/></text:span></text:p>
      <text:p text:style-name="P60"><text:span text:style-name="Source_20_Text"><text:span text:style-name="T20">📅 30일 후: 시간대별 테마 패턴, 순환매 분석</text:span></text:span></text:p>
      <text:p text:style-name="P60"><text:span text:style-name="Source_20_Text"><text:span text:style-name="T20">📅 본격 시드 투입 시: 통합 리스크 매니저</text:span></text:span></text:p>
      <text:p text:style-name="P60"><text:span text:style-name="Source_20_Text"><text:span text:style-name="T20">📅 6개월: Redis</text:span></text:span></text:p>
      <text:p text:style-name="P60"><text:span text:style-name="Source_20_Text"><text:span text:style-name="T20">📅 1년: 로컬 AI</text:span></text:span></text:p>
      <text:h text:style-name="P63" text:outline-level="4"><text:span text:style-name="Source_20_Text"><text:span text:style-name="T20">📅 </text:span></text:span><text:span text:style-name="Source_20_Text"><text:span text:style-name="Strong_20_Emphasis"><text:span text:style-name="T20">단기 (1-2주) — 안정화</text:span></text:span></text:span></text:h>
      <text:list text:style-name="L13">
        <text:list-item>
          <text:p text:style-name="P64"><text:span text:style-name="Strong_20_Emphasis"><text:span text:style-name="T24">위 치명적 버그 수정</text:span></text:span><text:span text:style-name="T24"> (경로 문제, 손절 중복, </text:span><text:span text:style-name="Source_20_Text"><text:span text:style-name="T24">buy_tags</text:span></text:span><text:span text:style-name="T24">)</text:span></text:p>
        </text:list-item>
        <text:list-item>
          <text:p text:style-name="P64"><text:span text:style-name="Strong_20_Emphasis"><text:span text:style-name="T24">단타봇 익절선 최적화</text:span></text:span><text:span text:style-name="T24"> (백테스트로 5% vs 6% vs 7% 비교)</text:span></text:p>
        </text:list-item>
        <text:list-item>
          <text:p text:style-name="P64"><text:span text:style-name="Strong_20_Emphasis"><text:span text:style-name="T24">kiki 자연어 명령 속도 개선</text:span></text:span><text:span text:style-name="T24"> (패턴 매칭 레이어 추가)</text:span></text:p>
        </text:list-item>
        <text:list-item>
          <text:p text:style-name="P64"><text:span text:style-name="Strong_20_Emphasis"><text:span text:style-name="T24">nbot 백테스트 전용 엔진 제작</text:span></text:span><text:span text:style-name="T24"> (</text:span><text:span text:style-name="Source_20_Text"><text:span text:style-name="T24">nbot_backtest_engine.py</text:span></text:span><text:span text:style-name="T24">)</text:span></text:p>
        </text:list-item>
      </text:list>
      <text:h text:style-name="Heading_20_4" text:outline-level="4"><text:soft-page-break/><text:span text:style-name="T24">📅 </text:span><text:span text:style-name="Strong_20_Emphasis"><text:span text:style-name="T24">중기 (1-2개월) — 전략 고도화</text:span></text:span></text:h>
      <text:list text:style-name="L14">
        <text:list-item>
          <text:p text:style-name="P65"><text:span text:style-name="Strong_20_Emphasis"><text:span text:style-name="T24">멀티 타임프레임 진입 필터</text:span></text:span></text:p>
          <text:list>
            <text:list-item>
              <text:p text:style-name="P66">일봉: 추세(MA 정배열) 확인 → 분봉(15분): 눌림목/돌파 매수 타이밍</text:p>
            </text:list-item>
          </text:list>
        </text:list-item>
        <text:list-item>
          <text:p text:style-name="P65"><text:span text:style-name="Strong_20_Emphasis"><text:span text:style-name="T24">자산 배분 로직</text:span></text:span></text:p>
          <text:list>
            <text:list-item>
              <text:p text:style-name="P66">nbot, sbot, cbot 간 자금 분배 비율 동적 조정 (예: 변동성 역가중)</text:p>
            </text:list-item>
          </text:list>
        </text:list-item>
        <text:list-item>
          <text:p text:style-name="P65"><text:span text:style-name="Strong_20_Emphasis"><text:span text:style-name="T24">AI 모델 최적화</text:span></text:span></text:p>
          <text:list>
            <text:list-item>
              <text:p text:style-name="P66">Claude API 비용 절감: 로컬 Llama 3 미세조정 또는 캐시 수명 연장(24h)</text:p>
            </text:list-item>
          </text:list>
        </text:list-item>
        <text:list-item>
          <text:p text:style-name="P65"><text:span text:style-name="Strong_20_Emphasis"><text:span text:style-name="T24">실시간 뉴스 감성 분석</text:span></text:span></text:p>
          <text:list>
            <text:list-item>
              <text:p text:style-name="P66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24">📅 </text:span><text:span text:style-name="Strong_20_Emphasis"><text:span text:style-name="T24">장기 (3-6개월) — 시스템 확장</text:span></text:span></text:h>
      <text:list text:style-name="L15">
        <text:list-item>
          <text:p text:style-name="P67"><text:span text:style-name="Strong_20_Emphasis"><text:span text:style-name="T24">통합 대시보드</text:span></text:span></text:p>
          <text:list>
            <text:list-item>
              <text:p text:style-name="P68">Flask + SocketIO로 웹 실시간 모니터링, 차트, 수동 개입</text:p>
            </text:list-item>
          </text:list>
        </text:list-item>
        <text:list-item>
          <text:p text:style-name="P67"><text:span text:style-name="Strong_20_Emphasis"><text:span text:style-name="T24">머신러닝 신호 생성기</text:span></text:span></text:p>
          <text:list>
            <text:list-item>
              <text:p text:style-name="P68">XGBoost/LSTM으로 일봉 데이터 학습, 전통 지표와 결합</text:p>
            </text:list-item>
          </text:list>
        </text:list-item>
        <text:list-item>
          <text:p text:style-name="P67"><text:span text:style-name="Strong_20_Emphasis"><text:span text:style-name="T24">자동 전략 전환</text:span></text:span></text:p>
          <text:list>
            <text:list-item>
              <text:p text:style-name="P68">시장 변동성(VIX), 거래대금 급증 시 nbot↔sbot 전환 자동화</text:p>
            </text:list-item>
          </text:list>
        </text:list-item>
        <text:list-item>
          <text:p text:style-name="P67"><text:span text:style-name="Strong_20_Emphasis"><text:span text:style-name="T24">멀티 계좌/멀티 브로커</text:span></text:span></text:p>
          <text:list>
            <text:list-item>
              <text:p text:style-name="P68">키움+한투+해외 주식 연동, 포트폴리오 통합 관리</text:p>
            </text:list-item>
          </text:list>
        </text:list-item>
      </text:list>
      <text:h text:style-name="P69" text:outline-level="3"><text:span text:style-name="Source_20_Text"><text:span text:style-name="T2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26">1. vol_ratio 2차 매수 실제 연동 (sbot)</text:span></text:span></text:p>
      <text:list text:style-name="L16">
        <text:list-item>
          <text:p text:style-name="P70"><text:span text:style-name="Source_20_Text"><text:span text:style-name="T26">sbot_strategy.py</text:span></text:span><text:span text:style-name="T26"> check_sell() — </text:span><text:span text:style-name="Source_20_Text"><text:span text:style-name="T26">vol_ratio</text:span></text:span><text:span text:style-name="T26"> 파라미터 추가 </text:span></text:p>
        </text:list-item>
        <text:list-item>
          <text:p text:style-name="P70"><text:span text:style-name="Source_20_Text"><text:span text:style-name="T26">vol_ok = True</text:span></text:span><text:span text:style-name="T26"> 고정 → 실제 조건 (전일 대비 150% 이상)으로 교체 </text:span></text:p>
        </text:list-item>
        <text:list-item>
          <text:p text:style-name="P71"><text:soft-page-break/><text:span text:style-name="Source_20_Text"><text:span text:style-name="T26">sbot.py</text:span></text:span><text:span text:style-name="T26"> — </text:span><text:span text:style-name="Source_20_Text"><text:span text:style-name="T26">_get_vol_ratio()</text:span></text:span><text:span text:style-name="T26"> 신규 추가 (sector_monitor.db → KIS vol_inrt 순서) </text:span></text:p>
        </text:list-item>
      </text:list>
      <text:p text:style-name="Text_20_body"><text:span text:style-name="Strong_20_Emphasis"><text:span text:style-name="T26">2. master_db v2 전면 개선</text:span></text:span></text:p>
      <text:list text:style-name="L17">
        <text:list-item>
          <text:p text:style-name="P72"><text:span text:style-name="Source_20_Text"><text:span text:style-name="T26">master_trades</text:span></text:span><text:span text:style-name="T26"> — </text:span><text:span text:style-name="Source_20_Text"><text:span text:style-name="T26">is_partial</text:span></text:span><text:span text:style-name="T26"> 컬럼 추가 (분할매도 구분) </text:span></text:p>
        </text:list-item>
        <text:list-item>
          <text:p text:style-name="P72"><text:span text:style-name="Source_20_Text"><text:span text:style-name="T26">master_positions</text:span></text:span><text:span text:style-name="T26"> — 보유중 포지션 실시간 테이블 신규 </text:span></text:p>
        </text:list-item>
        <text:list-item>
          <text:p text:style-name="P72"><text:span text:style-name="Source_20_Text"><text:span text:style-name="T26">master_risk</text:span></text:span><text:span text:style-name="T26"> — 합산 리스크 상태 테이블 신규 </text:span></text:p>
        </text:list-item>
        <text:list-item>
          <text:p text:style-name="P73"><text:span text:style-name="T26">nbot/sbot/cbot 매수 시 </text:span><text:span text:style-name="Source_20_Text"><text:span text:style-name="T26">upsert_position</text:span></text:span><text:span text:style-name="T26">, 매도 시 </text:span><text:span text:style-name="Source_20_Text"><text:span text:style-name="T26">remove_position</text:span></text:span><text:span text:style-name="T26"> 연동 </text:span></text:p>
        </text:list-item>
      </text:list>
      <text:p text:style-name="Text_20_body"><text:span text:style-name="Strong_20_Emphasis"><text:span text:style-name="T26">3. unified_risk.py — 통합 리스크 매니저</text:span></text:span></text:p>
      <text:list text:style-name="L18">
        <text:list-item>
          <text:p text:style-name="P74">일일 손실 한도: 266,000원 (380만 × 7%) </text:p>
        </text:list-item>
        <text:list-item>
          <text:p text:style-name="P74">경고선: 186,200원 (70%) </text:p>
        </text:list-item>
        <text:list-item>
          <text:p text:style-name="P74">리스크 레벨 자동 산출 (normal/warning/danger) </text:p>
        </text:list-item>
        <text:list-item>
          <text:p text:style-name="P75">한도 초과 시 전봇 자동 중단 + 디스코드 알림 </text:p>
        </text:list-item>
      </text:list>
      <text:p text:style-name="Text_20_body"><text:span text:style-name="Strong_20_Emphasis"><text:span text:style-name="T26">4. dashboard.py — 통합 대시보드</text:span></text:span></text:p>
      <text:list text:style-name="L19">
        <text:list-item>
          <text:p text:style-name="P76">Flask + 모바일 반응형 UI </text:p>
        </text:list-item>
        <text:list-item>
          <text:p text:style-name="P76">실시간 세 봇 합산 손익 (5초 갱신) </text:p>
        </text:list-item>
        <text:list-item>
          <text:p text:style-name="P76">포지션 통합 현황 + 수익률/손익 </text:p>
        </text:list-item>
        <text:list-item>
          <text:p text:style-name="P76">리스크 한도 게이지 </text:p>
        </text:list-item>
        <text:list-item>
          <text:p text:style-name="P76">sector_monitor 테마 TOP5 </text:p>
        </text:list-item>
        <text:list-item>
          <text:p text:style-name="P76">긴급 전봇 중단/재개 버튼 </text:p>
        </text:list-item>
        <text:list-item>
          <text:p text:style-name="P76">손실 한도 설정 UI </text:p>
        </text:list-item>
        <text:list-item>
          <text:p text:style-name="P77"><text:span text:style-name="T26">systemd 서비스 등록 (</text:span><text:span text:style-name="Source_20_Text"><text:span text:style-name="T26">yeongam9-dashboard</text:span></text:span><text:span text:style-name="T26">) </text:span></text:p>
        </text:list-item>
        <text:list-item>
          <text:p text:style-name="P78"><text:span text:style-name="Source_20_Text"><text:span text:style-name="T26">bot.sh</text:span></text:span><text:span text:style-name="T26">에 dashboard 추가 </text:span></text:p>
        </text:list-item>
      </text:list>
      <text:p text:style-name="P79"/>
      <text:h text:style-name="P80" text:outline-level="4"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81">이슈</text:p>
            </table:table-cell>
            <table:table-cell table:style-name="표2.A1" office:value-type="string">
              <text:p text:style-name="P81">원인</text:p>
            </table:table-cell>
            <table:table-cell table:style-name="표2.A1" office:value-type="string">
              <text:p text:style-name="P81">조치</text:p>
            </table:table-cell>
          </table:table-row>
        </table:table-header-rows>
        <table:table-row>
          <table:table-cell table:style-name="표2.A1" office:value-type="string">
            <text:p text:style-name="P82">동진쎄미켐/에프엔에스테크 손절 안됨</text:p>
          </table:table-cell>
          <table:table-cell table:style-name="표2.A1" office:value-type="string">
            <text:p text:style-name="P82">패치 중 sbot 크래시 (장 시작 타이밍)</text:p>
          </table:table-cell>
          <table:table-cell table:style-name="표2.A1" office:value-type="string">
            <text:p text:style-name="P82">수동매도</text:p>
          </table:table-cell>
        </table:table-row>
        <table:table-row>
          <table:table-cell table:style-name="표2.A1" office:value-type="string">
            <text:p text:style-name="P82">미체결 한온시스템 취소 안됨</text:p>
          </table:table-cell>
          <table:table-cell table:style-name="표2.A1" office:value-type="string">
            <text:p text:style-name="P82">KIS API cancel 함수 없음</text:p>
          </table:table-cell>
          <table:table-cell table:style-name="표2.A1" office:value-type="string">
            <text:p text:style-name="P82">HTS 수동취소</text:p>
          </table:table-cell>
        </table:table-row>
        <text:soft-page-break/>
        <table:table-row>
          <table:table-cell table:style-name="표2.A1" office:value-type="string">
            <text:p text:style-name="Table_20_Contents"><text:span text:style-name="T26">nbot/sbot </text:span><text:span text:style-name="Source_20_Text"><text:span text:style-name="T26">_master_upsert</text:span></text:span><text:span text:style-name="T26"> NameError</text:span></text:p>
          </table:table-cell>
          <table:table-cell table:style-name="표2.A1" office:value-type="string">
            <text:p text:style-name="P82">import 누락</text:p>
          </table:table-cell>
          <table:table-cell table:style-name="표2.A1" office:value-type="string">
            <text:p text:style-name="P82">각각 수동 추가</text:p>
          </table:table-cell>
        </table:table-row>
        <table:table-row>
          <table:table-cell table:style-name="표2.A1" office:value-type="string">
            <text:p text:style-name="P82">루트 master_db.py 충돌</text:p>
          </table:table-cell>
          <table:table-cell table:style-name="표2.A1" office:value-type="string">
            <text:p text:style-name="P82">옛날 파일 잔존</text:p>
          </table:table-cell>
          <table:table-cell table:style-name="표2.A1" office:value-type="string">
            <text:p text:style-name="P82">archive로 이동</text:p>
          </table:table-cell>
        </table:table-row>
      </table:table>
      <text:p text:style-name="Text_20_body"><text:span text:style-name="Strong_20_Emphasis"><text:span text:style-name="T26">교훈: 패치는 장 마감 후에!</text:span></text:span><text:span text:style-name="T26"> 😅</text:span></text:p>
      <text:p text:style-name="P79"/>
      <text:h text:style-name="P80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81">항목</text:p>
            </table:table-cell>
            <table:table-cell table:style-name="표3.A1" office:value-type="string">
              <text:p text:style-name="P81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26">is_paused()</text:span></text:span><text:span text:style-name="T26"> 봇 연동</text:span></text:p>
          </table:table-cell>
          <table:table-cell table:style-name="표3.A1" office:value-type="string">
            <text:p text:style-name="P82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26">키키 </text:span><text:span text:style-name="Source_20_Text"><text:span text:style-name="T26">!리스크</text:span></text:span><text:span text:style-name="T26"> 명령</text:span></text:p>
          </table:table-cell>
          <table:table-cell table:style-name="표3.A1" office:value-type="string">
            <text:p text:style-name="P82">디스코드에서 리스크 상태 조회</text:p>
          </table:table-cell>
        </table:table-row>
        <table:table-row>
          <table:table-cell table:style-name="표3.A1" office:value-type="string">
            <text:p text:style-name="P82">011210 종목명</text:p>
          </table:table-cell>
          <table:table-cell table:style-name="표3.A1" office:value-type="string">
            <text:p text:style-name="P82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sbot !상태</text:span></text:span><text:span text:style-name="T26"> 등락률 실시간</text:span></text:p>
          </table:table-cell>
          <table:table-cell table:style-name="표3.A1" office:value-type="string">
            <text:p text:style-name="P82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master_trades</text:span></text:span><text:span text:style-name="T26"> 통합</text:span></text:p>
          </table:table-cell>
          <table:table-cell table:style-name="표3.A1" office:value-type="string">
            <text:p text:style-name="P82">분할매도 포함 완료, 키키 연동 남음</text:p>
          </table:table-cell>
        </table:table-row>
      </table:table>
      <text:p text:style-name="P79"/>
      <text:p text:style-name="P83">vol_ratio sbot 2차 추매 조건 강화✅</text:p>
      <text:p text:style-name="P83">master_db v2 전면 개선✅</text:p>
      <text:p text:style-name="P83">unified_risk.py 통합 리스크 매니저✅</text:p>
      <text:p text:style-name="P83">dashboard.py 통합 대시보드✅</text:p>
      <text:p text:style-name="P83">cbot 2차 추매 조건 강화✅</text:p>
      <text:p text:style-name="P83">stock_bot 폴더 정리✅</text:p>
      <text:p text:style-name="P83">daily_review 경로 수정✅</text:p>
      <text:p text:style-name="P83">HTS 색상 (상승=빨강, 하락=파랑)✅</text:p>
      <text:p text:style-name="P83"/>
      <text:p text:style-name="P83">2026.05.28</text:p>
      <text:p text:style-name="P83">✅ news_crawler.py — sector_monitor DB 기반 동적 수집</text:p>
      <text:p text:style-name="P83"><text:soft-page-break/>✅ intelligence/news_sentiment.db 저장</text:p>
      <text:p text:style-name="P83">✅ cron 08:30 자동 수집 (평일)</text:p>
      <text:p text:style-name="P83">✅ ai_analyzer.py _get_news_hint() 프롬프트 주입</text:p>
      <text:p text:style-name="P83">✅ 키키 !뉴스 명령 추가</text:p>
      <text:h text:style-name="P80" text:outline-level="4"/>
      <text:h text:style-name="P84" text:outline-level="3"><text:span text:style-name="Source_20_Text"><text:span text:style-name="T27">2026.05.29 (토)</text:span></text:span></text:h>
      <text:p text:style-name="P85"><text:span text:style-name="Source_20_Text"><text:span text:style-name="T27">✅ cbot ws_prices/buy_price 오류 수정</text:span></text:span></text:p>
      <text:p text:style-name="P85"><text:span text:style-name="Source_20_Text"><text:span text:style-name="T27">✅ 봇 재시작 시 자동 실계좌 동기화 (account_sync)</text:span></text:span></text:p>
      <text:p text:style-name="P85"><text:span text:style-name="Source_20_Text"><text:span text:style-name="T27">✅ is_paused() 통합 리스크 연동 (nbot/sbot/cbot)</text:span></text:span></text:p>
      <text:p text:style-name="P85"><text:span text:style-name="Source_20_Text"><text:span text:style-name="T27">✅ 키키 !리스크/!리스크중단/!리스크재개 명령</text:span></text:span></text:p>
      <text:p text:style-name="P85"><text:span text:style-name="Source_20_Text"><text:span text:style-name="T27">✅ master_trades 분할매도 기록 (nbot)</text:span></text:span></text:p>
      <text:p text:style-name="P85"><text:span text:style-name="Source_20_Text"><text:span text:style-name="T27">✅ sbot 백테스트 now_t 오류 수정 (+18.09%)</text:span></text:span></text:p>
      <text:p text:style-name="P85"><text:span text:style-name="Source_20_Text"><text:span text:style-name="T27">✅ 저녁 브리핑 코스피/코스닥 네이버 API 직접 조회</text:span></text:span></text:p>
      <text:p text:style-name="P85"><text:span text:style-name="Source_20_Text"><text:span text:style-name="T27">✅ 브리핑 소수점/내일전망 수정</text:span></text:span></text:p>
      <text:p text:style-name="P85"><text:span text:style-name="Source_20_Text"><text:span text:style-name="T27">✅ 모닝 브리핑 뉴스 감성 섹션 추가</text:span></text:span></text:p>
      <text:p text:style-name="P85"><text:span text:style-name="Source_20_Text"><text:span text:style-name="T27">✅ news_crawler DB 경로 수정</text:span></text:span></text:p>
      <text:p text:style-name="P85"><text:span text:style-name="Source_20_Text"><text:span text:style-name="T27">✅ cron 08:30 → 07:50으로 변경</text:span></text:span></text:p>
      <text:p text:style-name="P85"/>
      <text:p text:style-name="P86">2026.05.30</text:p>
      <text:p text:style-name="P86">🎉 데탑 완전 이전 성공!</text:p>
      <text:list text:style-name="L20">
        <text:list-item>
          <text:p text:style-name="P87">실계좌 동기화 ✅ </text:p>
        </text:list-item>
        <text:list-item>
          <text:p text:style-name="P87">키움 토큰 발급 ✅ </text:p>
        </text:list-item>
        <text:list-item>
          <text:p text:style-name="P87">테마 로딩 ✅ </text:p>
        </text:list-item>
        <text:list-item>
          <text:p text:style-name="P87">로컬 AI (qwen2.5:14b) ✅ </text:p>
        </text:list-item>
        <text:list-item>
          <text:p text:style-name="P88">주말 대기 중 ✅</text:p>
        </text:list-item>
      </text:list>
      <text:p text:style-name="P89"><text:soft-page-break/>2026.06.01</text:p>
      <text:list text:style-name="L21">
        <text:list-item>
          <text:p text:style-name="P90">데탑 이전 시 DB 동기화 필수 </text:p>
        </text:list-item>
        <text:list-item>
          <text:p text:style-name="P90">ETF 필터 강화 </text:p>
        </text:list-item>
        <text:list-item>
          <text:p text:style-name="P90">대형주 제한 해제 </text:p>
        </text:list-item>
        <text:list-item>
          <text:p text:style-name="P91">포지션 사이징 개선</text:p>
        </text:list-item>
      </text:list>
      <text:p text:style-name="P89">✅ 종가매도 비활성화 </text:p>
      <text:list text:style-name="L22">
        <text:list-item>
          <text:p text:style-name="P92">✅ 장후(1530~2000) 매도 체크 추가 (nbot/sbot) </text:p>
        </text:list-item>
      </text:list>
      <text:list text:style-name="L23">
        <text:list-item>
          <text:p text:style-name="P93">✅ 대형주 제한 해제 (시총 700억 이하만 제외) </text:p>
        </text:list-item>
      </text:list>
      <text:list text:style-name="L24">
        <text:list-item>
          <text:p text:style-name="P94">✅ 포지션 사이징 90%로 상향</text:p>
        </text:list-item>
        <text:list-item>
          <text:h text:style-name="P95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81">작업</text:p>
            </table:table-cell>
            <table:table-cell table:style-name="표4.A1" office:value-type="string">
              <text:p text:style-name="P81">상태</text:p>
            </table:table-cell>
          </table:table-row>
        </table:table-header-rows>
        <table:table-row>
          <table:table-cell table:style-name="표4.A1" office:value-type="string">
            <text:p text:style-name="P82">데탑 이전 + 로컬 AI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ETF 필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대형주 제한 해제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종가매도 비활성화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장후 매도 체크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BUY_START_TIME 09:10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new 그룹 제외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텔레그램 빅 이벤트 모니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ai_analyzer 이벤트 가산점 연동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키키 !이벤트 명령어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crontab 등록</text:p>
          </table:table-cell>
          <table:table-cell table:style-name="표4.A1" office:value-type="string">
            <text:p text:style-name="P82">✅</text:p>
          </table:table-cell>
        </table:table-row>
      </table:table>
      <text:list text:continue-numbering="true" text:style-name="L24">
        <text:list-item>
          <text:p text:style-name="P94"/>
        </text:list-item>
      </text:list>
      <text:h text:style-name="P84" text:outline-level="3">📋 2026.06.02 작업 내역</text:h>
      <text:h text:style-name="P96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97">파일</text:p>
            </table:table-cell>
            <table:table-cell table:style-name="표5.A1" office:value-type="string">
              <text:p text:style-name="P97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98">strategy.py</text:p>
          </table:table-cell>
          <table:table-cell table:style-name="표5.A1" office:value-type="string">
            <text:p text:style-name="P98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nbot.py</text:p>
          </table:table-cell>
          <table:table-cell table:style-name="표5.A1" office:value-type="string">
            <text:p text:style-name="P98">BUY_SCORE_MIN 55, 약세장 -1.0%, 순서 수정, SSL 재시도, <text:soft-page-break/>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risk_manager.py</text:p>
          </table:table-cell>
          <table:table-cell table:style-name="표5.A1" office:value-type="string">
            <text:p text:style-name="P98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.py</text:p>
          </table:table-cell>
          <table:table-cell table:style-name="표5.A1" office:value-type="string">
            <text:p text:style-name="P98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_analyzer.py</text:p>
          </table:table-cell>
          <table:table-cell table:style-name="표5.A1" office:value-type="string">
            <text:p text:style-name="P98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ki_cmd.py</text:p>
          </table:table-cell>
          <table:table-cell table:style-name="표5.A1" office:value-type="string">
            <text:p text:style-name="P98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s_api.py</text:p>
          </table:table-cell>
          <table:table-cell table:style-name="표5.A1" office:value-type="string">
            <text:p text:style-name="P98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account_sync.py</text:p>
          </table:table-cell>
          <table:table-cell table:style-name="표5.A1" office:value-type="string">
            <text:p text:style-name="P98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99"/>
      <text:h text:style-name="P96" text:outline-level="3">📋 오늘 2026.06.02 전체 작업 완료</text:h>
      <text:h text:style-name="P100" text:outline-level="4">🔧 긴급 버그 수정</text:h>
      <text:list text:style-name="L25">
        <text:list-item>
          <text:p text:style-name="P101"><text:span text:style-name="Source_20_Text">kis_api.py</text:span> — token.dat 만료 체크 + API 파라미터 완비 </text:p>
        </text:list-item>
        <text:list-item>
          <text:p text:style-name="P101"><text:span text:style-name="Source_20_Text">account_sync.py</text:span> — 토큰 재발급 재시도 </text:p>
        </text:list-item>
        <text:list-item>
          <text:p text:style-name="P101"><text:span text:style-name="Source_20_Text">nbot.py</text:span> — 실계좌 동기화 순서, 수동매도 오감지 방지 </text:p>
        </text:list-item>
        <text:list-item>
          <text:p text:style-name="P102"><text:span text:style-name="Source_20_Text">kiki_cmd.py</text:span> — !매도 잔재 클리어 </text:p>
        </text:list-item>
      </text:list>
      <text:h text:style-name="P100" text:outline-level="4">📈 수익률 개선</text:h>
      <text:list text:style-name="L26">
        <text:list-item>
          <text:p text:style-name="P103">종가매도 활성화 (-3% 손절) </text:p>
        </text:list-item>
        <text:list-item>
          <text:p text:style-name="P103">BUY_SCORE_MIN, 약세장 기준 강화 </text:p>
        </text:list-item>
        <text:list-item>
          <text:p text:style-name="P104">MACD/호가잔량 가산점 조정 </text:p>
        </text:list-item>
      </text:list>
      <text:h text:style-name="P100" text:outline-level="4">🎯 단타 진입 강화</text:h>
      <text:list text:style-name="L27">
        <text:list-item>
          <text:p text:style-name="P105">호가잔량 3배↑ 최우선 진입 </text:p>
        </text:list-item>
        <text:list-item>
          <text:p text:style-name="P105">눌림목/거래량폭발 초기 포착 </text:p>
        </text:list-item>
        <text:list-item>
          <text:p text:style-name="P106">accel 가산점 상향 </text:p>
        </text:list-item>
      </text:list>
      <text:h text:style-name="P100" text:outline-level="4">📊 백테스트 기반 최적화</text:h>
      <text:list text:style-name="L28">
        <text:list-item>
          <text:p text:style-name="P107">손절선 -5% → <text:span text:style-name="Strong_20_Emphasis">-7%</text:span> </text:p>
        </text:list-item>
        <text:list-item>
          <text:p text:style-name="P107">MAX_POSITIONS <text:span text:style-name="Strong_20_Emphasis">5</text:span> </text:p>
        </text:list-item>
        <text:list-item>
          <text:p text:style-name="P107"><text:soft-page-break/>매수금액 150만 → <text:span text:style-name="Strong_20_Emphasis">100만</text:span> </text:p>
        </text:list-item>
        <text:list-item>
          <text:p text:style-name="P108">마지막 슬롯 잔여자금 전액</text:p>
        </text:list-item>
      </text:list>
      <text:h text:style-name="P96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81">파일</text:p>
            </table:table-cell>
            <table:table-cell table:style-name="표6.A1" office:value-type="string">
              <text:p text:style-name="P81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26">cbot.py</text:span></text:span></text:p>
          </table:table-cell>
          <table:table-cell table:style-name="표6.A1" office:value-type="string">
            <text:p text:style-name="P82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mbngold_crawler.py</text:span></text:span></text:p>
          </table:table-cell>
          <table:table-cell table:style-name="표6.A1" office:value-type="string">
            <text:p text:style-name="P82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nbot.py</text:span></text:span></text:p>
          </table:table-cell>
          <table:table-cell table:style-name="표6.A1" office:value-type="string">
            <text:p text:style-name="P82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sbot.py</text:span></text:span></text:p>
          </table:table-cell>
          <table:table-cell table:style-name="표6.A1" office:value-type="string">
            <text:p text:style-name="P82">전문가 추천 가산점 +15점 (D+2까지)</text:p>
          </table:table-cell>
        </table:table-row>
      </table:table>
      <text:p text:style-name="P109"/>
      <text:h text:style-name="P100" text:outline-level="4">🆕 신규 기능</text:h>
      <text:list text:style-name="L29">
        <text:list-item>
          <text:p text:style-name="P110"><text:span text:style-name="Source_20_Text">mbngold_crawler.py</text:span> — 전문가 추천 4종목 자동 크롤링 </text:p>
        </text:list-item>
        <text:list-item>
          <text:p text:style-name="P110">nbot/sbot 전문가 추천 +15점 (D+1/D+2 유효) </text:p>
        </text:list-item>
        <text:list-item>
          <text:p text:style-name="P111">cbot BTC 양봉 시 극단공포 예외 허용</text:p>
        </text:list-item>
      </text:list>
      <text:p text:style-name="P112"/>
      <text:h text:style-name="P100" text:outline-level="4">내일 확인할 것들</text:h>
      <text:list text:style-name="L30">
        <text:list-item>
          <text:p text:style-name="P113"><text:span text:style-name="Source_20_Text">전문가추천[MBN골드](당일)</text:span> 로그 나오는지 </text:p>
        </text:list-item>
        <text:list-item>
          <text:p text:style-name="P113"><text:span text:style-name="Source_20_Text">⚡ BTC 양봉</text:span> cbot 정상 작동 </text:p>
        </text:list-item>
        <text:list-item>
          <text:p text:style-name="P113">nbot 슬롯 5개 활용되는지 </text:p>
        </text:list-item>
        <text:list-item>
          <text:p text:style-name="P114">손절선 -7% 실전 적용 확인</text:p>
        </text:list-item>
      </text:list>
      <text:h text:style-name="P96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115">파일</text:p>
            </table:table-cell>
            <table:table-cell table:style-name="표7.A1" office:value-type="string">
              <text:p text:style-name="P115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28">kis_websocket.py</text:span></text:span></text:p>
          </table:table-cell>
          <table:table-cell table:style-name="표7.A1" office:value-type="string">
            <text:p text:style-name="P116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s_api.py</text:span></text:span></text:p>
          </table:table-cell>
          <table:table-cell table:style-name="표7.A1" office:value-type="string">
            <text:p text:style-name="P116">계좌별 token.dat 분리, 잔고 캐시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nbot.py</text:span></text:span></text:p>
          </table:table-cell>
          <table:table-cell table:style-name="표7.A1" office:value-type="string">
            <text:p text:style-name="P116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sbot.py</text:span></text:span></text:p>
          </table:table-cell>
          <table:table-cell table:style-name="표7.A1" office:value-type="string">
            <text:p text:style-name="P116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ki.py/kiki_cmd.py</text:span></text:span></text:p>
          </table:table-cell>
          <table:table-cell table:style-name="표7.A1" office:value-type="string">
            <text:p text:style-name="P116">!전체재시작 명령 추가</text:p>
          </table:table-cell>
        </table:table-row>
      </table:table>
      <text:p text:style-name="P99"/>
      <text:h text:style-name="P117" text:outline-level="4"><text:soft-page-break/><text:span text:style-name="Source_20_Text"><text:span text:style-name="T29">2026.06.05</text:span></text:span></text:h>
      <text:h text:style-name="P118" text:outline-level="4"><text:span text:style-name="Source_20_Text"><text:span text:style-name="T30">🛡️ 폭락장 방어 로직 신규 추가</text:span></text:span></text:h>
      <text:p text:style-name="P119"><text:span text:style-name="Strong_20_Emphasis"><text:span text:style-name="T31">장 초반 급락 안전장치</text:span></text:span></text:p>
      <text:p text:style-name="P120"><text:span text:style-name="Source_20_Text"><text:span text:style-name="T32">nbot: 09:00~09:10 | sbot: 09:00~09:20</text:span></text:span></text:p>
      <text:p text:style-name="P121"><text:span text:style-name="Source_20_Text"><text:span text:style-name="T32">코스피 -3% 이하 + 계속 하락 중</text:span></text:span></text:p>
      <text:p text:style-name="P121"><text:span text:style-name="Source_20_Text"><text:span text:style-name="T32">→ stop 강제 전환 + 최저점 추적 시작</text:span></text:span></text:p>
      <text:p text:style-name="P119"><text:span text:style-name="Strong_20_Emphasis"><text:span text:style-name="T31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81">케이스</text:p>
            </table:table-cell>
            <table:table-cell table:style-name="표8.A1" office:value-type="string">
              <text:p text:style-name="P81">조건</text:p>
            </table:table-cell>
            <table:table-cell table:style-name="표8.A1" office:value-type="string">
              <text:p text:style-name="P81">반등 확인</text:p>
            </table:table-cell>
            <table:table-cell table:style-name="표8.A1" office:value-type="string">
              <text:p text:style-name="P81">종목 우선</text:p>
            </table:table-cell>
          </table:table-row>
        </table:table-header-rows>
        <table:table-row>
          <table:table-cell table:style-name="표8.A1" office:value-type="string">
            <text:p text:style-name="P82">1</text:p>
          </table:table-cell>
          <table:table-cell table:style-name="표8.A1" office:value-type="string">
            <text:p text:style-name="P82">코스피↓ + 코스닥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닥 우선</text:p>
          </table:table-cell>
        </table:table-row>
        <table:table-row>
          <table:table-cell table:style-name="표8.A1" office:value-type="string">
            <text:p text:style-name="P82">2</text:p>
          </table:table-cell>
          <table:table-cell table:style-name="표8.A1" office:value-type="string">
            <text:p text:style-name="P82">코스닥↓ + 코스피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피 우선</text:p>
          </table:table-cell>
        </table:table-row>
        <table:table-row>
          <table:table-cell table:style-name="표8.A1" office:value-type="string">
            <text:p text:style-name="P82">3</text:p>
          </table:table-cell>
          <table:table-cell table:style-name="표8.A1" office:value-type="string">
            <text:p text:style-name="P82">둘다↓ (오늘)</text:p>
          </table:table-cell>
          <table:table-cell table:style-name="표8.A1" office:value-type="string">
            <text:p text:style-name="P82">2번</text:p>
          </table:table-cell>
          <table:table-cell table:style-name="표8.A1" office:value-type="string">
            <text:p text:style-name="P82">덜 빠진 쪽</text:p>
          </table:table-cell>
        </table:table-row>
      </table:table>
      <text:p text:style-name="P122"/>
      <text:h text:style-name="P123" text:outline-level="4"/>
      <text:h text:style-name="P124" text:outline-level="3"><text:span text:style-name="Source_20_Text"><text:span text:style-name="T33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P81">파일</text:p>
            </table:table-cell>
            <table:table-cell table:style-name="표9.A1" office:value-type="string">
              <text:p text:style-name="P81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<text:span text:style-name="T26">build_sector_db.py</text:span></text:span></text:p>
          </table:table-cell>
          <table:table-cell table:style-name="표9.A1" office:value-type="string">
            <text:p text:style-name="P82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backtest_engine.py</text:span></text:span></text:p>
          </table:table-cell>
          <table:table-cell table:style-name="표9.A1" office:value-type="string">
            <text:p text:style-name="P82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strategy.py</text:span></text:span></text:p>
          </table:table-cell>
          <table:table-cell table:style-name="표9.A1" office:value-type="string">
            <text:p text:style-name="P82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run_backtest.py</text:span></text:span></text:p>
          </table:table-cell>
          <table:table-cell table:style-name="표9.A1" office:value-type="string">
            <text:p text:style-name="P82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26">run_walk_forward.py</text:span></text:span></text:p>
          </table:table-cell>
          <table:table-cell table:style-name="표9.A1" office:value-type="string">
            <text:p text:style-name="P82">파라미터 확장, 결과 요약</text:p>
          </table:table-cell>
        </table:table-row>
      </table:table>
      <text:p text:style-name="P125"><text:span text:style-name="Strong_20_Emphasis"><text:span text:style-name="T31">백테스트 최종 결과:</text:span></text:span></text:p>
      <text:p text:style-name="P126"><text:span text:style-name="Source_20_Text"><text:span text:style-name="T32">손절-10%+시간청산5일+주도섹터필터 → +43%대</text:span></text:span></text:p>
      <text:p text:style-name="P127"><text:span text:style-name="Source_20_Text"><text:span text:style-name="T32">현재 설정 손절-10% → +31.42%, 샤프 1.89 ✅</text:span></text:span></text:p>
      <text:p text:style-name="P127"><text:span text:style-name="Source_20_Text"><text:span text:style-name="T32"/></text:span></text:p>
      <text:h text:style-name="P128" text:outline-level="3"><text:soft-page-break/><text:span text:style-name="Source_20_Text"><text:span text:style-name="T34">📋 2026.06.07 작업 내역</text:span></text:span></text:h>
      <text:h text:style-name="P129" text:outline-level="4">cbot 진입 조건 완화</text:h>
      <table:table table:name="표10" table:style-name="표10">
        <table:table-column table:style-name="표10.A"/>
        <table:table-column table:style-name="표10.B"/>
        <table:table-column table:style-name="표10.C"/>
        <table:table-header-rows>
          <table:table-row>
            <table:table-cell table:style-name="표10.A1" office:value-type="string">
              <text:p text:style-name="P81">항목</text:p>
            </table:table-cell>
            <table:table-cell table:style-name="표10.A1" office:value-type="string">
              <text:p text:style-name="P81">변경 전</text:p>
            </table:table-cell>
            <table:table-cell table:style-name="표10.A1" office:value-type="string">
              <text:p text:style-name="P81">변경 후</text:p>
            </table:table-cell>
          </table:table-row>
        </table:table-header-rows>
        <table:table-row>
          <table:table-cell table:style-name="표10.A1" office:value-type="string">
            <text:p text:style-name="P82">RSI_MIN</text:p>
          </table:table-cell>
          <table:table-cell table:style-name="표10.A1" office:value-type="string">
            <text:p text:style-name="P82">45</text:p>
          </table:table-cell>
          <table:table-cell table:style-name="표10.A1" office:value-type="string">
            <text:p text:style-name="P82">40 (눌림목 진입 허용)</text:p>
          </table:table-cell>
        </table:table-row>
        <table:table-row>
          <table:table-cell table:style-name="표10.A1" office:value-type="string">
            <text:p text:style-name="P82">본절 보호</text:p>
          </table:table-cell>
          <table:table-cell table:style-name="표10.A1" office:value-type="string">
            <text:p text:style-name="P82">-2%</text:p>
          </table:table-cell>
          <table:table-cell table:style-name="표10.A1" office:value-type="string">
            <text:p text:style-name="P82">-3% (코인 노이즈 대응)</text:p>
          </table:table-cell>
        </table:table-row>
        <table:table-row>
          <table:table-cell table:style-name="표10.A1" office:value-type="string">
            <text:p text:style-name="P82">야간 조건</text:p>
          </table:table-cell>
          <table:table-cell table:style-name="표10.A1" office:value-type="string">
            <text:p text:style-name="P82">BTC +2% AND 탐욕 60</text:p>
          </table:table-cell>
          <table:table-cell table:style-name="표10.A1" office:value-type="string">
            <text:p text:style-name="P82">BTC +1% OR 탐욕 50</text:p>
          </table:table-cell>
        </table:table-row>
        <table:table-row>
          <table:table-cell table:style-name="표10.A1" office:value-type="string">
            <text:p text:style-name="P82">POOL_SIZE</text:p>
          </table:table-cell>
          <table:table-cell table:style-name="표10.A1" office:value-type="string">
            <text:p text:style-name="P82">20</text:p>
          </table:table-cell>
          <table:table-cell table:style-name="표10.A1" office:value-type="string">
            <text:p text:style-name="P82">30 (회복장 대비)</text:p>
          </table:table-cell>
        </table:table-row>
        <table:table-row>
          <table:table-cell table:style-name="표10.A1" office:value-type="string">
            <text:p text:style-name="P82">MIN_TRADE_AMT_B</text:p>
          </table:table-cell>
          <table:table-cell table:style-name="표10.A1" office:value-type="string">
            <text:p text:style-name="P82">100억</text:p>
          </table:table-cell>
          <table:table-cell table:style-name="표10.A1" office:value-type="string">
            <text:p text:style-name="P82">50억 (극단공포 장 대응)</text:p>
          </table:table-cell>
        </table:table-row>
        <table:table-row>
          <table:table-cell table:style-name="표10.A1" office:value-type="string">
            <text:p text:style-name="P82">WebSocket 구독</text:p>
          </table:table-cell>
          <table:table-cell table:style-name="표10.A1" office:value-type="string">
            <text:p text:style-name="P82">15개</text:p>
          </table:table-cell>
          <table:table-cell table:style-name="표10.A1" office:value-type="string">
            <text:p text:style-name="P82">25개</text:p>
          </table:table-cell>
        </table:table-row>
      </table:table>
      <text:h text:style-name="P129" text:outline-level="4">sbot 미체결 취소 강화</text:h>
      <text:list text:style-name="L31">
        <text:list-item>
          <text:p text:style-name="P130">체결 완료 종목 pending 우선 제거 (nbot 방식 통일) </text:p>
        </text:list-item>
        <text:list-item>
          <text:p text:style-name="P131"><text:span text:style-name="T35">취소 후 </text:span><text:span text:style-name="Source_20_Text"><text:span text:style-name="T26">sold_today</text:span></text:span><text:span text:style-name="T35"> 등록 → 당일 재매수 차단 </text:span></text:p>
        </text:list-item>
        <text:list-item>
          <text:p text:style-name="P131"><text:span text:style-name="Source_20_Text"><text:span text:style-name="T26">buy_context</text:span></text:span><text:span text:style-name="T35">, </text:span><text:span text:style-name="Source_20_Text"><text:span text:style-name="T26">peak_tracker</text:span></text:span><text:span text:style-name="T35"> 잔재 정리 </text:span></text:p>
        </text:list-item>
        <text:list-item>
          <text:p text:style-name="P132">취소 성공 시 디스코드 알림 추가 </text:p>
        </text:list-item>
      </text:list>
      <text:h text:style-name="P129" text:outline-level="4">갭상승 눌림목 진입 포착 (nbot/strategy)</text:h>
      <text:list text:style-name="L32">
        <text:list-item>
          <text:p text:style-name="P133"><text:span text:style-name="Source_20_Text"><text:span text:style-name="T26">stck_oprc</text:span></text:span><text:span text:style-name="T35">(시가), </text:span><text:span text:style-name="Source_20_Text"><text:span text:style-name="T26">prdy_clpr</text:span></text:span><text:span text:style-name="T35">(전일종가) 데이터 수집 추가 </text:span></text:p>
        </text:list-item>
        <text:list-item>
          <text:p text:style-name="P134">갭+5% 이상 + 시가 눌림 → +12점 </text:p>
        </text:list-item>
        <text:list-item>
          <text:p text:style-name="P134">갭+3% 이상 + 약한 눌림 → +8점 </text:p>
        </text:list-item>
        <text:list-item>
          <text:p text:style-name="P135"><text:span text:style-name="T35">갭상승 종목은 </text:span><text:span text:style-name="Source_20_Text"><text:span text:style-name="T26">change &gt; 15%</text:span></text:span><text:span text:style-name="T35"> 과열 제외 면제 </text:span></text:p>
        </text:list-item>
      </text:list>
      <text:h text:style-name="P129" text:outline-level="4">VI 발동 종목 매수 제외 (nbot/sbot/strategy/sbot_strategy)</text:h>
      <text:list text:style-name="L33">
        <text:list-item>
          <text:p text:style-name="P136"><text:span text:style-name="Source_20_Text"><text:span text:style-name="T26">iscd_stat_cls_code = "51"</text:span></text:span><text:span text:style-name="T35"> → 단일가매매 중 매수 차단 </text:span></text:p>
        </text:list-item>
        <text:list-item>
          <text:p text:style-name="P137">nbot/sbot 데이터 수집에 VI 상태 코드 추가 </text:p>
        </text:list-item>
        <text:list-item>
          <text:p text:style-name="P138"><text:span text:style-name="T35">strategy/sbot_strategy </text:span><text:span text:style-name="Source_20_Text"><text:span text:style-name="T26">passes_buy_filter</text:span></text:span><text:span text:style-name="T35"> 최우선 필터로 적용 </text:span></text:p>
        </text:list-item>
      </text:list>
      <text:h text:style-name="P129" text:outline-level="4">공시 실시간 가산점 연동</text:h>
      <text:list text:style-name="L34">
        <text:list-item>
          <text:p text:style-name="P139"><text:span text:style-name="Source_20_Text"><text:span text:style-name="T26">telegram_monitor.py</text:span></text:span><text:span text:style-name="T35"> v2 전면 개선 </text:span></text:p>
          <text:list>
            <text:list-item>
              <text:p text:style-name="P140"><text:soft-page-break/>KIND 채널 공시 → 종목코드(6자리) 정규식 추출 </text:p>
            </text:list-item>
            <text:list-item>
              <text:p text:style-name="P140">공시 타입 17종 판별 (호재 12 / 악재 5) </text:p>
            </text:list-item>
            <text:list-item>
              <text:p text:style-name="P139"><text:span text:style-name="Source_20_Text"><text:span text:style-name="T26">consensus.py</text:span></text:span><text:span text:style-name="T35"> 리포트 가산점 자동 합산 </text:span></text:p>
            </text:list-item>
            <text:list-item>
              <text:p text:style-name="P139"><text:span text:style-name="Source_20_Text"><text:span text:style-name="T26">stock_event_bonus</text:span></text:span><text:span text:style-name="T35"> 테이블 신규 (종목코드 단위, 2~24h 유효) </text:span></text:p>
            </text:list-item>
            <text:list-item>
              <text:p text:style-name="P140">악재 공시 마이너스 가산점 (-15 ~ -25점) </text:p>
            </text:list-item>
          </text:list>
        </text:list-item>
        <text:list-item>
          <text:p text:style-name="P141"><text:span text:style-name="T35">nbot/sbot 분석 루프에 </text:span><text:span text:style-name="Source_20_Text"><text:span text:style-name="T26">_get_disclosure_bonus</text:span></text:span><text:span text:style-name="T35"> 연결 </text:span></text:p>
        </text:list-item>
      </text:list>
      <text:h text:style-name="P129" text:outline-level="4">generate_combined_report.py 재작성</text:h>
      <text:list text:style-name="L35">
        <text:list-item>
          <text:p text:style-name="P142">nbot + sbot 통합 단일 HTML (기존 따로 출력되던 문제 해결) </text:p>
        </text:list-item>
        <text:list-item>
          <text:p text:style-name="P143">요약 카드 / Equity Curve 비교 차트 / 월별 수익률 / 시나리오 테이블 탭 </text:p>
        </text:list-item>
      </text:list>
      <text:p text:style-name="P144"/>
      <text:p text:style-name="P145">수고하셨습니다! 내일 장 시작 후 로그에서 확인할 포인트:</text:p>
      <text:p text:style-name="P146">bash</text:p>
      <text:p text:style-name="P147"><text:span text:style-name="Source_20_Text"><text:span text:style-name="T36"># 갭상승 눌림목</text:span></text:span></text:p>
      <text:p text:style-name="P147"><text:span text:style-name="Source_20_Text"><text:span text:style-name="T32">bot log nbot | </text:span></text:span><text:span text:style-name="Source_20_Text"><text:span text:style-name="T37">grep</text:span></text:span><text:span text:style-name="Source_20_Text"><text:span text:style-name="T32"> </text:span></text:span><text:span text:style-name="Source_20_Text"><text:span text:style-name="T38">"갭상승눌림목"</text:span></text:span></text:p>
      <text:p text:style-name="P147"><text:span text:style-name="Source_20_Text"><text:span text:style-name="T36"># VI 필터</text:span></text:span></text:p>
      <text:p text:style-name="P147"><text:span text:style-name="Source_20_Text"><text:span text:style-name="T32">bot log nbot | </text:span></text:span><text:span text:style-name="Source_20_Text"><text:span text:style-name="T37">grep</text:span></text:span><text:span text:style-name="Source_20_Text"><text:span text:style-name="T32"> </text:span></text:span><text:span text:style-name="Source_20_Text"><text:span text:style-name="T38">"VI 발동"</text:span></text:span></text:p>
      <text:p text:style-name="P147"><text:span text:style-name="Source_20_Text"><text:span text:style-name="T36"># 공시 가산점</text:span></text:span></text:p>
      <text:p text:style-name="P147"><text:span text:style-name="Source_20_Text"><text:span text:style-name="T32">bot log nbot | </text:span></text:span><text:span text:style-name="Source_20_Text"><text:span text:style-name="T37">grep</text:span></text:span><text:span text:style-name="Source_20_Text"><text:span text:style-name="T32"> </text:span></text:span><text:span text:style-name="Source_20_Text"><text:span text:style-name="T38">"공시호재\|공시악재"</text:span></text:span></text:p>
      <text:p text:style-name="P147"><text:span text:style-name="Source_20_Text"><text:span text:style-name="T36"># sbot 미체결 취소</text:span></text:span></text:p>
      <text:p text:style-name="P147"><text:span text:style-name="Source_20_Text"><text:span text:style-name="T32">bot log sbot | </text:span></text:span><text:span text:style-name="Source_20_Text"><text:span text:style-name="T37">grep</text:span></text:span><text:span text:style-name="Source_20_Text"><text:span text:style-name="T32"> </text:span></text:span><text:span text:style-name="Source_20_Text"><text:span text:style-name="T38">"미체결 취소"</text:span></text:span></text:p>
      <text:p text:style-name="P148"><text:span text:style-name="Source_20_Text"><text:span text:style-name="T39"/></text:span></text:p>
      <text:p text:style-name="P149"/>
      <text:p text:style-name="P150"><text:span text:style-name="Source_20_Text"><text:span text:style-name="T40">2026.06.08</text:span></text:span></text:p>
      <text:p text:style-name="P151"><text:span text:style-name="Strong_20_Emphasis"><text:span text:style-name="T41">kiki 브리핑 개선 내역</text:span></text:span></text:p>
      <table:table table:name="표11" table:style-name="표11">
        <table:table-column table:style-name="표11.A"/>
        <table:table-column table:style-name="표11.B"/>
        <table:table-header-rows>
          <table:table-row>
            <table:table-cell table:style-name="표11.A1" office:value-type="string">
              <text:p text:style-name="P97">항목</text:p>
            </table:table-cell>
            <table:table-cell table:style-name="표11.A1" office:value-type="string">
              <text:p text:style-name="P97">결과</text:p>
            </table:table-cell>
          </table:table-row>
        </table:table-header-rows>
        <table:table-row>
          <table:table-cell table:style-name="표11.A1" office:value-type="string">
            <text:p text:style-name="P98">모닝 브리핑 시간</text:p>
          </table:table-cell>
          <table:table-cell table:style-name="표11.A1" office:value-type="string">
            <text:p text:style-name="Table_20_Contents"><text:span text:style-name="Source_20_Text"><text:span text:style-name="T24">while</text:span></text:span><text:span text:style-name="T24"> 30초 루프 → 정확한 타임트리거 방식</text:span></text:p>
          </table:table-cell>
        </table:table-row>
        <text:soft-page-break/>
        <table:table-row>
          <table:table-cell table:style-name="표11.A1" office:value-type="string">
            <text:p text:style-name="P98">엔비디아 하드코딩</text:p>
          </table:table-cell>
          <table:table-cell table:style-name="표11.A1" office:value-type="string">
            <text:p text:style-name="P98">제거 → Finnhub 실제 발표 종목으로 동적 생성</text:p>
          </table:table-cell>
        </table:table-row>
        <table:table-row>
          <table:table-cell table:style-name="표11.A1" office:value-type="string">
            <text:p text:style-name="P98">미국 지수</text:p>
          </table:table-cell>
          <table:table-cell table:style-name="표11.A1" office:value-type="string">
            <text:p text:style-name="Table_20_Contents"><text:span text:style-name="T24">Yahoo Finance(차단) → KIS API </text:span><text:span text:style-name="Source_20_Text"><text:span text:style-name="T24">FHKST03030100</text:span></text:span></text:p>
          </table:table-cell>
        </table:table-row>
        <table:table-row>
          <table:table-cell table:style-name="표11.A1" office:value-type="string">
            <text:p text:style-name="P98">나스닥/SOX/S&amp;P500</text:p>
          </table:table-cell>
          <table:table-cell table:style-name="표11.A1" office:value-type="string">
            <text:p text:style-name="P98">✅ 정확하게 조회</text:p>
          </table:table-cell>
        </table:table-row>
        <table:table-row>
          <table:table-cell table:style-name="표11.A1" office:value-type="string">
            <text:p text:style-name="P98">다우</text:p>
          </table:table-cell>
          <table:table-cell table:style-name="표11.A1" office:value-type="string">
            <text:p text:style-name="P98">KIS 미지원 → 제외</text:p>
          </table:table-cell>
        </table:table-row>
        <table:table-row>
          <table:table-cell table:style-name="표11.A1" office:value-type="string">
            <text:p text:style-name="P98">월요일 금요일 종가</text:p>
          </table:table-cell>
          <table:table-cell table:style-name="표11.A1" office:value-type="string">
            <text:p text:style-name="P98">✅ 자동 처리</text:p>
          </table:table-cell>
        </table:table-row>
      </table:table>
      <text:p text:style-name="P150"><text:span text:style-name="Source_20_Text"><text:span text:style-name="T42"/></text:span></text:p>
      <text:p text:style-name="P152"><text:span text:style-name="Source_20_Text"><text:span text:style-name="T43">2026.06.11</text:span></text:span></text:p>
      <text:p text:style-name="P152"><text:span text:style-name="Source_20_Text"><text:span text:style-name="T43">nbot종료 sbot2 시</text:span></text:span><text:span text:style-name="Source_20_Text"><text:span text:style-name="T44">작</text:span></text:span></text:p>
      <text:p text:style-name="P152"><text:span text:style-name="Source_20_Text"><text:span text:style-name="Strong_20_Emphasis"><text:span text:style-name="T45"><text:s/>작업 요약:</text:span></text:span></text:span></text:p>
      <text:list text:style-name="L36">
        <text:list-item>
          <text:p text:style-name="P153">sbot2 <text:span text:style-name="Source_20_Text">_handle_pending_command</text:span> 추가 (키키 매도/매수/시작 명령) </text:p>
        </text:list-item>
        <text:list-item>
          <text:p text:style-name="P153">sbot/sbot2 루프 60초→30초 단축 </text:p>
        </text:list-item>
        <text:list-item>
          <text:p text:style-name="P153">sbot/sbot2 시간대별 동작 (08시 매도체크, 09:10 매수, 20시 장외) </text:p>
        </text:list-item>
        <text:list-item>
          <text:p text:style-name="P153"><text:span text:style-name="Strong_20_Emphasis">sbot2 전략 v2 전면 개편</text:span> </text:p>
          <text:list>
            <text:list-item>
              <text:p text:style-name="P153">MA200 정배열 필수 </text:p>
            </text:list-item>
            <text:list-item>
              <text:p text:style-name="P153">15일 누적 수급 (KIS API 추가) </text:p>
            </text:list-item>
            <text:list-item>
              <text:p text:style-name="P153">ROE 펀더멘탈 가산점 </text:p>
            </text:list-item>
            <text:list-item>
              <text:p text:style-name="P153">손절 -10%, 트레일 -8%, 청산 20일 </text:p>
            </text:list-item>
          </text:list>
        </text:list-item>
        <text:list-item>
          <text:p text:style-name="P153"><text:span text:style-name="Strong_20_Emphasis">sbot2 종목풀 교체</text:span> </text:p>
          <text:list>
            <text:list-item>
              <text:p text:style-name="P153">sector_monitor.db 주도섹터 </text:p>
            </text:list-item>
            <text:list-item>
              <text:p text:style-name="P153">키움 실적호전 조건식 + new그룹 </text:p>
            </text:list-item>
          </text:list>
        </text:list-item>
        <text:list-item>
          <text:p text:style-name="P153">kiki_cmd nbot→sbot2 교체 </text:p>
        </text:list-item>
        <text:list-item>
          <text:p text:style-name="P154">trades 테이블 생성</text:p>
        </text:list-item>
      </text:list>
      <text:p text:style-name="P152"><text:span text:style-name="Source_20_Text"><text:span text:style-name="T44"/></text:span></text:p>
      <text:p text:style-name="P155"><text:span text:style-name="Source_20_Text"><text:span text:style-name="T46">alias 등록 (추천)</text:span></text:span></text:p>
      <text:p text:style-name="P155"><text:span text:style-name="Source_20_Text"><text:span text:style-name="T46">echo "alias bot='~/k-bot/stock_bot/bot.sh'" &gt;&gt; ~/.bashrc</text:span></text:span></text:p>
      <text:p text:style-name="P155"><text:soft-page-break/><text:span text:style-name="Source_20_Text"><text:span text:style-name="T46">source ~/.bashrc</text:span></text:span></text:p>
      <text:p text:style-name="P155"><text:span text:style-name="Source_20_Text"><text:span text:style-name="T46">/bin/bash ~/backup_bot.sh</text:span></text:span></text:p>
      <text:p text:style-name="P155"><text:span text:style-name="Source_20_Text"><text:span text:style-name="T46">ollama run qwen2.5:14b</text:span></text:span></text:p>
      <text:p text:style-name="P156"/>
      <text:p text:style-name="P157">bot <text:span text:style-name="T47">git</text:span> <text:span text:style-name="T48">"</text:span>데이터 기반의 주도주 필터링<text:span text:style-name="T48">"</text:span></text:p>
      <text:p text:style-name="P156"/>
      <text:p text:style-name="P158">kortws-beep</text:p>
      <text:p text:style-name="P158"/>
      <text:p text:style-name="P159"><text:span text:style-name="Source_20_Text"><text:span text:style-name="T2">git add .</text:span></text:span> (수정한 파일들을 장바구니에 몽땅 담기)</text:p>
      <text:list text:style-name="L37">
        <text:list-item>
          <text:p text:style-name="P160"><text:span text:style-name="Source_20_Text"><text:span text:style-name="T2">git commit -m "</text:span></text:span><text:span text:style-name="Source_20_Text"><text:span text:style-name="T3">시간 청산 로직 추가</text:span></text:span><text:span text:style-name="Source_20_Text"><text:span text:style-name="T2">"</text:span></text:span> (어떤 작업을 했는지 메모를 적고 버전 확정하기)</text:p>
        </text:list-item>
      </text:list>
      <text:list text:style-name="L38">
        <text:list-item>
          <text:p text:style-name="P161"><text:span text:style-name="Source_20_Text"><text:span text:style-name="T2">git push</text:span></text:span> (GitHub 온라인 서버로 밀어 올리기)</text:p>
        </text:list-item>
      </text:list>
      <text:p text:style-name="Text_20_body"/>
      <text:h text:style-name="P162" text:outline-level="3">🔍 지금 당장 추가할 만한 것들</text:h>
      <text:list text:style-name="L39">
        <text:list-item>
          <text:p text:style-name="P163"><text:span text:style-name="Strong_20_Emphasis">sbot 익절 후 재진입 허용</text:span> — 현재 당일 sold_today로 재매수 차단인데, sbot은 며칠 보유라 재진입 의미 있을 수 있음</text:p>
        </text:list-item>
      </text:list>
      <text:p text:style-name="Text_20_body">tail -f /home/free4tak/k-bot/stock_bot/logs/sector_monitor.log</text:p>
      <text:p text:style-name="P164"><text:span text:style-name="Source_20_Text"><text:span text:style-name="T49">tail -f /home/free4tak/k-bot/stock_bot/logs/cbot.log</text:span></text:span></text:p>
      <text:p text:style-name="P165"><text:span text:style-name="Source_20_Text"><text:span text:style-name="T49"/>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11T20:12:30.006501175</dc:date>
    <meta:editing-duration>P9DT8H57M39S</meta:editing-duration>
    <meta:editing-cycles>43</meta:editing-cycles>
    <meta:generator>LibreOffice/26.2.3.2$Linux_X86_64 LibreOffice_project/620$Build-2</meta:generator>
    <meta:document-statistic meta:table-count="11" meta:image-count="0" meta:object-count="0" meta:page-count="36" meta:paragraph-count="881" meta:word-count="4585" meta:character-count="21554" meta:non-whitespace-character-count="17643"/>
  </office:meta>
</office:document-meta>
</file>