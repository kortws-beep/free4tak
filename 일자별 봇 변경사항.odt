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6.907cm" table:align="left"/>
    </style:style>
    <style:style style:name="표9.A" style:family="table-column">
      <style:table-column-properties style:column-width="6.509cm"/>
    </style:style>
    <style:style style:name="표9.B" style:family="table-column">
      <style:table-column-properties style:column-width="10.398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6.907cm" table:align="left"/>
    </style:style>
    <style:style style:name="표11.A" style:family="table-column">
      <style:table-column-properties style:column-width="6.191cm"/>
    </style:style>
    <style:style style:name="표11.B" style:family="table-column">
      <style:table-column-properties style:column-width="10.716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21c328"/>
    </style:style>
    <style:style style:name="P2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3" style:family="paragraph" style:parent-style-name="Text_20_body">
      <style:text-properties officeooo:paragraph-rsid="002661e6"/>
    </style:style>
    <style:style style:name="P4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Noto Sans CJK KR DemiLight" fo:font-size="14pt" style:font-name-asian="Noto Sans CJK KR DemiLight" style:font-size-asian="14pt" style:font-size-complex="14pt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style:font-name="Noto Sans CJK KR DemiLight" fo:font-size="14pt" style:font-name-asian="Noto Sans CJK KR DemiLight" style:font-size-asian="14pt" style:font-size-complex="14pt"/>
    </style:style>
    <style:style style:name="P10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6" style:family="paragraph" style:parent-style-name="Text_20_body" style:list-style-name="L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1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2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9" style:family="paragraph" style:parent-style-name="Text_20_body" style:list-style-name="L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0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5" style:family="paragraph" style:parent-style-name="Text_20_body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6" style:family="paragraph" style:parent-style-name="Heading_20_3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7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8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39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40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1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3" style:family="paragraph" style:parent-style-name="Text_20_body" style:list-style-name="L13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4" style:family="paragraph" style:parent-style-name="Text_20_body" style:list-style-name="L14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5" style:family="paragraph" style:parent-style-name="Text_20_body" style:list-style-name="L1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6" style:family="paragraph" style:parent-style-name="Text_20_body" style:list-style-name="L1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7" style:family="paragraph" style:parent-style-name="Text_20_body" style:list-style-name="L1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8" style:family="paragraph" style:parent-style-name="Text_20_body" style:list-style-name="L1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9" style:family="paragraph" style:parent-style-name="Text_20_body" style:list-style-name="L1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0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1" style:family="paragraph" style:parent-style-name="Text_20_body" style:list-style-name="L17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52" style:family="paragraph" style:parent-style-name="Text_20_body" style:list-style-name="L17">
      <style:text-properties style:font-name="Noto Sans CJK KR DemiLight" fo:font-size="14pt" style:font-name-asian="Noto Sans CJK KR DemiLight" style:font-size-asian="14pt" style:font-size-complex="14pt"/>
    </style:style>
    <style:style style:name="P53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6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57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58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59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60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1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2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3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4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5" style:family="paragraph" style:parent-style-name="Heading_20_3">
      <loext:graphic-properties draw:fill-color="#ffffff"/>
    </style:style>
    <style:style style:name="P66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8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9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70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1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2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3" style:family="paragraph" style:parent-style-name="Text_20_body" style:list-style-name="L19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4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5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6" style:family="paragraph" style:parent-style-name="Text_20_body" style:list-style-name="L20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7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8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9" style:family="paragraph" style:parent-style-name="Text_20_body" style:list-style-name="L21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0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1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2" style:family="paragraph" style:parent-style-name="Text_20_body" style:list-style-name="L2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3" style:family="paragraph" style:parent-style-name="Text_20_body" style:list-style-name="L2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4" style:family="paragraph" style:parent-style-name="Text_20_body" style:list-style-name="L23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5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6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7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8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89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90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9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3" style:family="paragraph" style:parent-style-name="Heading_20_2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94" style:family="paragraph" style:parent-style-name="Heading_20_3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5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6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7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8" style:family="paragraph" style:parent-style-name="Text_20_body" style:list-style-name="L2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9" style:family="paragraph" style:parent-style-name="Text_20_body" style:list-style-name="L2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0" style:family="paragraph" style:parent-style-name="Text_20_body" style:list-style-name="L25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1" style:family="paragraph" style:parent-style-name="Text_20_body" style:list-style-name="L25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2" style:family="paragraph" style:parent-style-name="Text_20_body" style:list-style-name="L26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3" style:family="paragraph" style:parent-style-name="Text_20_body" style:list-style-name="L26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4" style:family="paragraph" style:parent-style-name="Text_20_body" style:list-style-name="L27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5" style:family="paragraph" style:parent-style-name="Text_20_body" style:list-style-name="L27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6" style:family="paragraph" style:parent-style-name="Text_20_body" style:list-style-name="L28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7" style:family="paragraph" style:parent-style-name="Text_20_body" style:list-style-name="L28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8" style:family="paragraph" style:parent-style-name="Text_20_body" style:list-style-name="L2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9" style:family="paragraph" style:parent-style-name="Text_20_body" style:list-style-name="L29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0" style:family="paragraph" style:parent-style-name="Text_20_body" style:list-style-name="L3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1" style:family="paragraph" style:parent-style-name="Text_20_body" style:list-style-name="L30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2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3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4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5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6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7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8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9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orphans="1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24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25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26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28" style:family="paragraph" style:parent-style-name="Text_20_body" style:list-style-name="L35">
      <style:text-properties officeooo:rsid="005734c7"/>
    </style:style>
    <style:style style:name="P129" style:family="paragraph" style:parent-style-name="Text_20_body" style:list-style-name="L36">
      <style:text-properties officeooo:rsid="005734c7"/>
    </style:style>
    <style:style style:name="P130" style:family="paragraph" style:parent-style-name="Heading_20_3">
      <style:paragraph-properties fo:margin-top="0cm" fo:margin-bottom="0.247cm" style:contextual-spacing="false" fo:line-height="115%"/>
    </style:style>
    <style:style style:name="P131" style:family="paragraph" style:parent-style-name="Text_20_body" style:list-style-name="L37"/>
    <style:style style:name="P132" style:family="paragraph" style:parent-style-name="Preformatted_20_Text">
      <style:paragraph-properties fo:margin-top="0cm" fo:margin-bottom="0.499cm" style:contextual-spacing="false"/>
      <style:text-properties officeooo:paragraph-rsid="00679eb3"/>
    </style:style>
    <style:style style:name="P133" style:family="paragraph" style:parent-style-name="Text_20_body">
      <style:paragraph-properties fo:margin-top="0cm" fo:margin-bottom="0.499cm" style:contextual-spacing="false"/>
      <style:text-properties fo:color="#6e7687" loext:opacity="100%" style:font-name="Noto Sans CJK KR DemiLight" fo:font-size="14pt" fo:font-weight="bold" officeooo:paragraph-rsid="00679eb3" style:font-name-asian="Noto Sans CJK KR DemiLight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margin-top="0cm" fo:margin-bottom="0.499cm" style:contextual-spacing="false"/>
      <style:text-properties officeooo:paragraph-rsid="00679eb3"/>
    </style:style>
    <style:style style:name="T1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8" style:family="text">
      <style:text-properties style:font-name="Noto Sans CJK KR Black" fo:font-size="14pt" style:font-name-asian="Noto Sans CJK KR Black" style:font-size-asian="14pt" style:font-size-complex="14pt"/>
    </style:style>
    <style:style style:name="T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3" style:family="text">
      <style:text-properties fo:color="#14181f" loext:opacity="100%" style:font-name="Noto Sans CJK KR DemiLight" fo:font-size="14pt" fo:font-weight="bold" officeooo:rsid="005483e2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4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15" style:family="text">
      <style:text-properties style:font-name="Noto Sans CJK KR DemiLight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e7687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7" style:family="text">
      <style:text-properties fo:color="#0051c2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8" style:family="text">
      <style:text-properties fo:color="#008000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Noto Sans CJK KR DemiLight" fo:font-size="14pt" fo:font-weight="bold" officeooo:rsid="00611545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0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63878e" fo:background-color="transparent" loext:char-shading-value="0" style:font-size-asian="14pt" style:font-weight-asian="bold" style:font-name-complex="Liberation Mono" style:font-size-complex="14pt" style:font-weight-complex="bold"/>
    </style:style>
    <style:style style:name="T22" style:family="text">
      <style:text-properties style:font-name="Noto Sans CJK KR DemiLight" fo:font-size="14pt" officeooo:rsid="0063878e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5pt" fo:font-weight="normal" officeooo:rsid="0064f836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24" style:family="text">
      <style:text-properties style:font-name="var font-mono" fo:background-color="transparent" loext:char-shading-value="0"/>
    </style:style>
    <style:style style:name="T25" style:family="text">
      <style:text-properties fo:background-color="transparent" loext:char-shading-value="0" style:font-name-asian="var font-mono"/>
    </style:style>
    <style:style style:name="T26" style:family="text">
      <style:text-properties fo:background-color="transparent" loext:char-shading-value="0"/>
    </style:style>
    <style:style style:name="T27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28" style:family="text">
      <style:text-properties fo:color="#0051c2" loext:opacity="100%"/>
    </style:style>
    <style:style style:name="T29" style:family="text">
      <style:text-properties fo:color="#008000" loext:opacity="100%"/>
    </style:style>
    <style:style style:name="T30" style:family="text">
      <style:text-properties fo:font-weight="bold"/>
    </style:style>
    <style:style style:name="T31" style:family="text">
      <style:text-properties style:font-weight-asian="bold"/>
    </style:style>
    <style:style style:name="T32" style:family="text">
      <style:text-properties fo:color="#6e7687" loext:opacity="100%"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33" style:family="text">
      <style:text-properties style:font-name="Noto Sans CJK KR DemiLight" style:font-name-asian="Noto Sans CJK KR DemiLigh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<text:s/></text:span></text:span><text:span text:style-name="Source_20_Text"><text:span text:style-name="T2">2026.05.26 cbot개선</text:span></text:span></text:p>
      <text:p text:style-name="Text_20_body"><text:span text:style-name="Source_20_Text"><text:span text:style-name="T1">✅ positions 레퍼런스 버그 수정</text:span></text:span></text:p>
      <text:p text:style-name="Text_20_body"><text:span text:style-name="Source_20_Text"><text:span text:style-name="T1">✅ load_dotenv 경로 수정</text:span></text:span></text:p>
      <text:p text:style-name="Text_20_body"><text:span text:style-name="Source_20_Text"><text:span text:style-name="T1">✅ DB 정합성 체크 추가</text:span></text:span></text:p>
      <text:p text:style-name="Text_20_body"><text:span text:style-name="Source_20_Text"><text:span text:style-name="T1">✅ master_db profit_rate 오류 수정</text:span></text:span></text:p>
      <text:p text:style-name="Text_20_body"><text:span text:style-name="Source_20_Text"><text:span text:style-name="T1">✅ 야간 급락감지 완화 (-5% → -8%)</text:span></text:span></text:p>
      <text:p text:style-name="Text_20_body"><text:span text:style-name="Source_20_Text"><text:span text:style-name="T1">✅ 야간 시간대 조정 (00~06 → 01~05시)</text:span></text:span></text:p>
      <text:p text:style-name="Text_20_body"><text:span text:style-name="Source_20_Text"><text:span text:style-name="T1">✅ BTC 디커플링 대응 (알트 자체 상태)</text:span></text:span></text:p>
      <text:p text:style-name="Text_20_body"><text:span text:style-name="Source_20_Text"><text:span text:style-name="T1">✅ 1시간봉 매수 조건 추가 (멀티 타임프레임)</text:span></text:span></text:p>
      <text:p text:style-name="Text_20_body"><text:span text:style-name="Source_20_Text"><text:span text:style-name="T1">✅ WebSocket 실시간 현재가 (90초 → 즉시)</text:span></text:span></text:p>
      <text:p text:style-name="P2"><text:span text:style-name="Source_20_Text"><text:span text:style-name="T1">✅ sector_monitor accel 가산점 (nbot)</text:span></text:span></text:p>
      <text:p text:style-name="P2"><text:span text:style-name="Source_20_Text"><text:span text:style-name="T1">✅ 스윙 테마 지속성 가산점 (sbot)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cbot WebSocket 실시간 현재가</text:span></text:span></text:p>
      <text:p text:style-name="P2"><text:span text:style-name="Source_20_Text"><text:span text:style-name="T1">✅ cbot 야간 급락감지 완화</text:span></text:span></text:p>
      <text:p text:style-name="P2"><text:span text:style-name="Source_20_Text"><text:span text:style-name="T1">✅ cbot 루프 30초 단축</text:span></text:span></text:p>
      <text:p text:style-name="P2"><text:span text:style-name="Source_20_Text"><text:span text:style-name="T1">✅ cbot BTC 디커플링 대응</text:span></text:span></text:p>
      <text:p text:style-name="P2"><text:span text:style-name="Source_20_Text"><text:span text:style-name="T1">✅ cbot 1시간봉 매수 조건</text:span></text:span></text:p>
      <text:p text:style-name="P2"><text:span text:style-name="Source_20_Text"><text:span text:style-name="T1">✅ nbot/sbot 교차 보유 방지</text:span></text:span></text:p>
      <text:p text:style-name="P2"><text:span text:style-name="Source_20_Text"><text:span text:style-name="T1">✅ !매도 sold_today — 이미 do_sell에서 처리 중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sbot peak_tracker 잔량 동기화 (실전)</text:span></text:span></text:p>
      <text:p text:style-name="P2"><text:span text:style-name="Source_20_Text"><text:span text:style-name="T1">✅ nbot/sbot 백테스터 peak_tracker 버그 수정</text:span></text:span></text:p>
      <text:p text:style-name="P2"><text:span text:style-name="Source_20_Text"><text:span text:style-name="T1">✅ sbot 백테스터 now_t 인자 추가</text:span></text:span></text:p>
      <text:p text:style-name="P2"><text:span text:style-name="Source_20_Text"><text:span text:style-name="T1">✅ sbot_strategy.py ATR 손절 로직 수정 (max→min)</text:span></text:span></text:p>
      <text:p text:style-name="P2"><text:span text:style-name="Source_20_Text"><text:span text:style-name="T1">✅ sbot 2차 매수 조건 강화 (MA20+시장normal)</text:span></text:span></text:p>
      <text:p text:style-name="P2"><text:span text:style-name="Source_20_Text"><text:span text:style-name="T1">✅ sbot 2차 매수 금액 수정 (100만→10만)</text:span></text:span></text:p>
      <text:p text:style-name="P2"><text:span text:style-name="Source_20_Text"><text:span text:style-name="T1">✅ nbot/sbot 슬롯 없으면 신규 분석 스킵</text:span></text:span></text:p>
      <text:p text:style-name="P2"><text:span text:style-name="Source_20_Text"><text:span text:style-name="T1">✅ daily_review score_enter 자동 조정</text:span></text:span></text:p>
      <text:p text:style-name="P2"><text:span text:style-name="Source_20_Text"><text:span text:style-name="T1">✅ nbot/sbot 교차 보유 방지</text:span></text:span></text:p>
      <text:p text:style-name="P2"><text:soft-page-break/><text:span text:style-name="Source_20_Text"><text:span text:style-name="T1">✅ nbot buy_tags 누락 버그 수정 (do_buy에서 buy_tags 저장)</text:span></text:span></text:p>
      <text:p text:style-name="P2"><text:span text:style-name="Source_20_Text"><text:span text:style-name="T1">✅ AI 프롬프트 개선 (점수 기준 현실화, 기본 60점)</text:span></text:span></text:p>
      <text:p text:style-name="P2"><text:span text:style-name="Source_20_Text"><text:span text:style-name="T1">✅ AI 캐시 초기화 (새 프롬프트 반영)</text:span></text:span></text:p>
      <text:p text:style-name="P2"><text:span text:style-name="Source_20_Text"><text:span text:style-name="T1">✅ 백테스트 시나리오 추가 (익절상향, 매수시작0930, 가산점하향, 일손실금액한도)</text:span></text:span></text:p>
      <text:p text:style-name="P2"><text:span text:style-name="Source_20_Text"><text:span text:style-name="T1">✅ 백테스트 시나리오 간 상수 격리 (importlib.reload)</text:span></text:span></text:p>
      <text:p text:style-name="P2"><text:span text:style-name="Source_20_Text"><text:span text:style-name="T1">✅ BacktestConfig 필드 추가 (sell_1st_rate, trail 등)</text:span></text:span></text:p>
      <text:p text:style-name="P2"><text:span text:style-name="Source_20_Text"><text:span text:style-name="T1">✅ sbot 미너비니 방식 1종목 추가 (_get_minervini_pick)</text:span></text:span></text:p>
      <text:p text:style-name="P2"><text:span text:style-name="Source_20_Text"><text:span text:style-name="T1">✅ 미너비니 종목 20영업일 보유 + 200일선 이탈 청산</text:span></text:span></text:p>
      <text:p text:style-name="P2"><text:span text:style-name="Source_20_Text"><text:span text:style-name="T1">✅ ebot 완전 제거 (kiki.py/kiki_cmd.py/kiki_data.py/kiki_briefing.py/kiki_monitor.py)</text:span></text:span></text:p>
      <text:p text:style-name="P2"><text:span text:style-name="Source_20_Text"><text:span text:style-name="T1">✅ bot.sh 개별 재시작 기능</text:span></text:span></text:p>
      <text:p text:style-name="P2"><text:span text:style-name="Source_20_Text"><text:span text:style-name="T1">✅ DB 정합성 체크 (account_sync.py — nbot/sbot/cbot)</text:span></text:span></text:p>
      <text:p text:style-name="P2"><text:span text:style-name="Source_20_Text"><text:span text:style-name="T1">✅ 봇 헬스체크 + 자동 재시작 (키키 2단계)</text:span></text:span></text:p>
      <text:p text:style-name="P2"><text:span text:style-name="Source_20_Text"><text:span text:style-name="T1">✅ daily_review cron 경로 수정</text:span></text:span></text:p>
      <text:p text:style-name="P2"><text:span text:style-name="Source_20_Text"><text:span text:style-name="T1">✅ performance.py master_trades 수정</text:span></text:span></text:p>
      <text:p text:style-name="P2"><text:span text:style-name="Source_20_Text"><text:span text:style-name="T1">✅ !전체상태 정리 (종가봇 제거)</text:span></text:span></text:p>
      <text:p text:style-name="P2"><text:span text:style-name="Source_20_Text"><text:span text:style-name="T1">✅ !매도 실계좌 조회 루틴</text:span></text:span></text:p>
      <text:p text:style-name="P2"><text:span text:style-name="Source_20_Text"><text:span text:style-name="T1">✅ sbot _save_status 현재가/등락률 추가</text:span></text:span></text:p>
      <text:p text:style-name="P2"><text:span text:style-name="Source_20_Text"><text:span text:style-name="T1">✅ sector_monitor 분석 (accel 최적 구간 1~5)</text:span></text:span></text:p>
      <text:p text:style-name="P2"><text:span text:style-name="Source_20_Text"><text:span text:style-name="T1">✅ sbot 스윙 테마 지속성 함수 (get_swing_theme_bonus)</text:span></text:span></text:p>
      <text:p text:style-name="P2"><text:span text:style-name="Source_20_Text"><text:span text:style-name="T1">✅ weekly_review.sh NBOT_LATEST 수정</text:span></text:span></text:p>
      <text:p text:style-name="P2">키키</text:p>
      <text:p text:style-name="P2">✅ cmd_buy 종목명 변환 추가</text:p>
      <text:p text:style-name="P2">✅ 승률 계산 오류 수정 (list/dict 구분)</text:p>
      <text:p text:style-name="P2">✅ _get_ai() None 처리 (6군데)</text:p>
      <text:p text:style-name="P2"><text:span text:style-name="Source_20_Text"><text:span text:style-name="T1"/></text:span></text:p>
      <text:p text:style-name="P3"><text:span text:style-name="Source_20_Text"><text:span text:style-name="T3">로드맵</text:span></text:span></text:p>
      <text:p text:style-name="P3"><text:span text:style-name="Source_20_Text"><text:span text:style-name="T3"/></text:span></text:p>
      <text:p text:style-name="P2"><text:span text:style-name="Source_20_Text"><text:span text:style-name="T1">📅 30일 후: 시간대별 테마 패턴, 순환매 분석</text:span></text:span></text:p>
      <text:p text:style-name="P2"><text:span text:style-name="Source_20_Text"><text:span text:style-name="T1">📅 본격 시드 투입 시: 통합 리스크 매니저</text:span></text:span></text:p>
      <text:p text:style-name="P2"><text:span text:style-name="Source_20_Text"><text:span text:style-name="T1">📅 6개월: Redis</text:span></text:span></text:p>
      <text:p text:style-name="P2"><text:span text:style-name="Source_20_Text"><text:span text:style-name="T1">📅 1년: 로컬 AI</text:span></text:span></text:p>
      <text:h text:style-name="P4" text:outline-level="4"><text:span text:style-name="Source_20_Text"><text:span text:style-name="T1">📅 </text:span></text:span><text:span text:style-name="Source_20_Text"><text:span text:style-name="Strong_20_Emphasis"><text:span text:style-name="T1">단기 (1-2주) — 안정화</text:span></text:span></text:span></text:h>
      <text:list text:style-name="L1">
        <text:list-item>
          <text:p text:style-name="P5"><text:span text:style-name="Strong_20_Emphasis"><text:span text:style-name="T4">위 치명적 버그 수정</text:span></text:span><text:span text:style-name="T4"> (경로 문제, 손절 중복, </text:span><text:span text:style-name="Source_20_Text"><text:span text:style-name="T4">buy_tags</text:span></text:span><text:span text:style-name="T4">)</text:span></text:p>
        </text:list-item>
        <text:list-item>
          <text:p text:style-name="P5"><text:soft-page-break/><text:span text:style-name="Strong_20_Emphasis"><text:span text:style-name="T4">단타봇 익절선 최적화</text:span></text:span><text:span text:style-name="T4"> (백테스트로 5% vs 6% vs 7% 비교)</text:span></text:p>
        </text:list-item>
        <text:list-item>
          <text:p text:style-name="P5"><text:span text:style-name="Strong_20_Emphasis"><text:span text:style-name="T4">kiki 자연어 명령 속도 개선</text:span></text:span><text:span text:style-name="T4"> (패턴 매칭 레이어 추가)</text:span></text:p>
        </text:list-item>
        <text:list-item>
          <text:p text:style-name="P5"><text:span text:style-name="Strong_20_Emphasis"><text:span text:style-name="T4">nbot 백테스트 전용 엔진 제작</text:span></text:span><text:span text:style-name="T4"> (</text:span><text:span text:style-name="Source_20_Text"><text:span text:style-name="T4">nbot_backtest_engine.py</text:span></text:span><text:span text:style-name="T4">)</text:span></text:p>
        </text:list-item>
      </text:list>
      <text:h text:style-name="Heading_20_4" text:outline-level="4"><text:span text:style-name="T4">📅 </text:span><text:span text:style-name="Strong_20_Emphasis"><text:span text:style-name="T4">중기 (1-2개월) — 전략 고도화</text:span></text:span></text:h>
      <text:list text:style-name="L2">
        <text:list-item>
          <text:p text:style-name="P6"><text:span text:style-name="Strong_20_Emphasis"><text:span text:style-name="T4">멀티 타임프레임 진입 필터</text:span></text:span></text:p>
          <text:list>
            <text:list-item>
              <text:p text:style-name="P7">일봉: 추세(MA 정배열) 확인 → 분봉(15분): 눌림목/돌파 매수 타이밍</text:p>
            </text:list-item>
          </text:list>
        </text:list-item>
        <text:list-item>
          <text:p text:style-name="P6"><text:span text:style-name="Strong_20_Emphasis"><text:span text:style-name="T4">자산 배분 로직</text:span></text:span></text:p>
          <text:list>
            <text:list-item>
              <text:p text:style-name="P7">nbot, sbot, cbot 간 자금 분배 비율 동적 조정 (예: 변동성 역가중)</text:p>
            </text:list-item>
          </text:list>
        </text:list-item>
        <text:list-item>
          <text:p text:style-name="P6"><text:span text:style-name="Strong_20_Emphasis"><text:span text:style-name="T4">AI 모델 최적화</text:span></text:span></text:p>
          <text:list>
            <text:list-item>
              <text:p text:style-name="P7">Claude API 비용 절감: 로컬 Llama 3 미세조정 또는 캐시 수명 연장(24h)</text:p>
            </text:list-item>
          </text:list>
        </text:list-item>
        <text:list-item>
          <text:p text:style-name="P6"><text:span text:style-name="Strong_20_Emphasis"><text:span text:style-name="T4">실시간 뉴스 감성 분석</text:span></text:span></text:p>
          <text:list>
            <text:list-item>
              <text:p text:style-name="P7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4">📅 </text:span><text:span text:style-name="Strong_20_Emphasis"><text:span text:style-name="T4">장기 (3-6개월) — 시스템 확장</text:span></text:span></text:h>
      <text:list text:style-name="L3">
        <text:list-item>
          <text:p text:style-name="P8"><text:span text:style-name="Strong_20_Emphasis"><text:span text:style-name="T4">통합 대시보드</text:span></text:span></text:p>
          <text:list>
            <text:list-item>
              <text:p text:style-name="P9">Flask + SocketIO로 웹 실시간 모니터링, 차트, 수동 개입</text:p>
            </text:list-item>
          </text:list>
        </text:list-item>
        <text:list-item>
          <text:p text:style-name="P8"><text:span text:style-name="Strong_20_Emphasis"><text:span text:style-name="T4">머신러닝 신호 생성기</text:span></text:span></text:p>
          <text:list>
            <text:list-item>
              <text:p text:style-name="P9">XGBoost/LSTM으로 일봉 데이터 학습, 전통 지표와 결합</text:p>
            </text:list-item>
          </text:list>
        </text:list-item>
        <text:list-item>
          <text:p text:style-name="P8"><text:span text:style-name="Strong_20_Emphasis"><text:span text:style-name="T4">자동 전략 전환</text:span></text:span></text:p>
          <text:list>
            <text:list-item>
              <text:p text:style-name="P9">시장 변동성(VIX), 거래대금 급증 시 nbot↔sbot 전환 자동화</text:p>
            </text:list-item>
          </text:list>
        </text:list-item>
        <text:list-item>
          <text:p text:style-name="P8"><text:span text:style-name="Strong_20_Emphasis"><text:span text:style-name="T4">멀티 계좌/멀티 브로커</text:span></text:span></text:p>
          <text:list>
            <text:list-item>
              <text:p text:style-name="P9">키움+한투+해외 주식 연동, 포트폴리오 통합 관리</text:p>
            </text:list-item>
          </text:list>
        </text:list-item>
      </text:list>
      <text:h text:style-name="P10" text:outline-level="3"><text:soft-page-break/><text:span text:style-name="Source_20_Text"><text:span text:style-name="T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6">1. vol_ratio 2차 매수 실제 연동 (sbot)</text:span></text:span></text:p>
      <text:list text:style-name="L4">
        <text:list-item>
          <text:p text:style-name="P11"><text:span text:style-name="Source_20_Text"><text:span text:style-name="T6">sbot_strategy.py</text:span></text:span><text:span text:style-name="T6"> check_sell() — </text:span><text:span text:style-name="Source_20_Text"><text:span text:style-name="T6">vol_ratio</text:span></text:span><text:span text:style-name="T6"> 파라미터 추가 </text:span></text:p>
        </text:list-item>
        <text:list-item>
          <text:p text:style-name="P11"><text:span text:style-name="Source_20_Text"><text:span text:style-name="T6">vol_ok = True</text:span></text:span><text:span text:style-name="T6"> 고정 → 실제 조건 (전일 대비 150% 이상)으로 교체 </text:span></text:p>
        </text:list-item>
        <text:list-item>
          <text:p text:style-name="P12"><text:span text:style-name="Source_20_Text"><text:span text:style-name="T6">sbot.py</text:span></text:span><text:span text:style-name="T6"> — </text:span><text:span text:style-name="Source_20_Text"><text:span text:style-name="T6">_get_vol_ratio()</text:span></text:span><text:span text:style-name="T6"> 신규 추가 (sector_monitor.db → KIS vol_inrt 순서) </text:span></text:p>
        </text:list-item>
      </text:list>
      <text:p text:style-name="Text_20_body"><text:span text:style-name="Strong_20_Emphasis"><text:span text:style-name="T6">2. master_db v2 전면 개선</text:span></text:span></text:p>
      <text:list text:style-name="L5">
        <text:list-item>
          <text:p text:style-name="P13"><text:span text:style-name="Source_20_Text"><text:span text:style-name="T6">master_trades</text:span></text:span><text:span text:style-name="T6"> — </text:span><text:span text:style-name="Source_20_Text"><text:span text:style-name="T6">is_partial</text:span></text:span><text:span text:style-name="T6"> 컬럼 추가 (분할매도 구분) </text:span></text:p>
        </text:list-item>
        <text:list-item>
          <text:p text:style-name="P13"><text:span text:style-name="Source_20_Text"><text:span text:style-name="T6">master_positions</text:span></text:span><text:span text:style-name="T6"> — 보유중 포지션 실시간 테이블 신규 </text:span></text:p>
        </text:list-item>
        <text:list-item>
          <text:p text:style-name="P13"><text:span text:style-name="Source_20_Text"><text:span text:style-name="T6">master_risk</text:span></text:span><text:span text:style-name="T6"> — 합산 리스크 상태 테이블 신규 </text:span></text:p>
        </text:list-item>
        <text:list-item>
          <text:p text:style-name="P14"><text:span text:style-name="T6">nbot/sbot/cbot 매수 시 </text:span><text:span text:style-name="Source_20_Text"><text:span text:style-name="T6">upsert_position</text:span></text:span><text:span text:style-name="T6">, 매도 시 </text:span><text:span text:style-name="Source_20_Text"><text:span text:style-name="T6">remove_position</text:span></text:span><text:span text:style-name="T6"> 연동 </text:span></text:p>
        </text:list-item>
      </text:list>
      <text:p text:style-name="Text_20_body"><text:span text:style-name="Strong_20_Emphasis"><text:span text:style-name="T6">3. unified_risk.py — 통합 리스크 매니저</text:span></text:span></text:p>
      <text:list text:style-name="L6">
        <text:list-item>
          <text:p text:style-name="P15">일일 손실 한도: 266,000원 (380만 × 7%) </text:p>
        </text:list-item>
        <text:list-item>
          <text:p text:style-name="P15">경고선: 186,200원 (70%) </text:p>
        </text:list-item>
        <text:list-item>
          <text:p text:style-name="P15">리스크 레벨 자동 산출 (normal/warning/danger) </text:p>
        </text:list-item>
        <text:list-item>
          <text:p text:style-name="P16">한도 초과 시 전봇 자동 중단 + 디스코드 알림 </text:p>
        </text:list-item>
      </text:list>
      <text:p text:style-name="Text_20_body"><text:span text:style-name="Strong_20_Emphasis"><text:span text:style-name="T6">4. dashboard.py — 통합 대시보드</text:span></text:span></text:p>
      <text:list text:style-name="L7">
        <text:list-item>
          <text:p text:style-name="P17">Flask + 모바일 반응형 UI </text:p>
        </text:list-item>
        <text:list-item>
          <text:p text:style-name="P17">실시간 세 봇 합산 손익 (5초 갱신) </text:p>
        </text:list-item>
        <text:list-item>
          <text:p text:style-name="P17">포지션 통합 현황 + 수익률/손익 </text:p>
        </text:list-item>
        <text:list-item>
          <text:p text:style-name="P17">리스크 한도 게이지 </text:p>
        </text:list-item>
        <text:list-item>
          <text:p text:style-name="P17">sector_monitor 테마 TOP5 </text:p>
        </text:list-item>
        <text:list-item>
          <text:p text:style-name="P17">긴급 전봇 중단/재개 버튼 </text:p>
        </text:list-item>
        <text:list-item>
          <text:p text:style-name="P17">손실 한도 설정 UI </text:p>
        </text:list-item>
        <text:list-item>
          <text:p text:style-name="P18"><text:span text:style-name="T6">systemd 서비스 등록 (</text:span><text:span text:style-name="Source_20_Text"><text:span text:style-name="T6">yeongam9-dashboard</text:span></text:span><text:span text:style-name="T6">) </text:span></text:p>
        </text:list-item>
        <text:list-item>
          <text:p text:style-name="P19"><text:span text:style-name="Source_20_Text"><text:span text:style-name="T6">bot.sh</text:span></text:span><text:span text:style-name="T6">에 dashboard 추가 </text:span></text:p>
        </text:list-item>
      </text:list>
      <text:p text:style-name="P20"/>
      <text:h text:style-name="P21" text:outline-level="4"><text:soft-page-break/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22">이슈</text:p>
            </table:table-cell>
            <table:table-cell table:style-name="표2.A1" office:value-type="string">
              <text:p text:style-name="P22">원인</text:p>
            </table:table-cell>
            <table:table-cell table:style-name="표2.A1" office:value-type="string">
              <text:p text:style-name="P22">조치</text:p>
            </table:table-cell>
          </table:table-row>
        </table:table-header-rows>
        <table:table-row>
          <table:table-cell table:style-name="표2.A1" office:value-type="string">
            <text:p text:style-name="P23">동진쎄미켐/에프엔에스테크 손절 안됨</text:p>
          </table:table-cell>
          <table:table-cell table:style-name="표2.A1" office:value-type="string">
            <text:p text:style-name="P23">패치 중 sbot 크래시 (장 시작 타이밍)</text:p>
          </table:table-cell>
          <table:table-cell table:style-name="표2.A1" office:value-type="string">
            <text:p text:style-name="P23">수동매도</text:p>
          </table:table-cell>
        </table:table-row>
        <table:table-row>
          <table:table-cell table:style-name="표2.A1" office:value-type="string">
            <text:p text:style-name="P23">미체결 한온시스템 취소 안됨</text:p>
          </table:table-cell>
          <table:table-cell table:style-name="표2.A1" office:value-type="string">
            <text:p text:style-name="P23">KIS API cancel 함수 없음</text:p>
          </table:table-cell>
          <table:table-cell table:style-name="표2.A1" office:value-type="string">
            <text:p text:style-name="P23">HTS 수동취소</text:p>
          </table:table-cell>
        </table:table-row>
        <table:table-row>
          <table:table-cell table:style-name="표2.A1" office:value-type="string">
            <text:p text:style-name="Table_20_Contents"><text:span text:style-name="T6">nbot/sbot </text:span><text:span text:style-name="Source_20_Text"><text:span text:style-name="T6">_master_upsert</text:span></text:span><text:span text:style-name="T6"> NameError</text:span></text:p>
          </table:table-cell>
          <table:table-cell table:style-name="표2.A1" office:value-type="string">
            <text:p text:style-name="P23">import 누락</text:p>
          </table:table-cell>
          <table:table-cell table:style-name="표2.A1" office:value-type="string">
            <text:p text:style-name="P23">각각 수동 추가</text:p>
          </table:table-cell>
        </table:table-row>
        <table:table-row>
          <table:table-cell table:style-name="표2.A1" office:value-type="string">
            <text:p text:style-name="P23">루트 master_db.py 충돌</text:p>
          </table:table-cell>
          <table:table-cell table:style-name="표2.A1" office:value-type="string">
            <text:p text:style-name="P23">옛날 파일 잔존</text:p>
          </table:table-cell>
          <table:table-cell table:style-name="표2.A1" office:value-type="string">
            <text:p text:style-name="P23">archive로 이동</text:p>
          </table:table-cell>
        </table:table-row>
      </table:table>
      <text:p text:style-name="Text_20_body"><text:span text:style-name="Strong_20_Emphasis"><text:span text:style-name="T6">교훈: 패치는 장 마감 후에!</text:span></text:span><text:span text:style-name="T6"> 😅</text:span></text:p>
      <text:p text:style-name="P20"/>
      <text:h text:style-name="P21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22">항목</text:p>
            </table:table-cell>
            <table:table-cell table:style-name="표3.A1" office:value-type="string">
              <text:p text:style-name="P22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6">is_paused()</text:span></text:span><text:span text:style-name="T6"> 봇 연동</text:span></text:p>
          </table:table-cell>
          <table:table-cell table:style-name="표3.A1" office:value-type="string">
            <text:p text:style-name="P23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6">키키 </text:span><text:span text:style-name="Source_20_Text"><text:span text:style-name="T6">!리스크</text:span></text:span><text:span text:style-name="T6"> 명령</text:span></text:p>
          </table:table-cell>
          <table:table-cell table:style-name="표3.A1" office:value-type="string">
            <text:p text:style-name="P23">디스코드에서 리스크 상태 조회</text:p>
          </table:table-cell>
        </table:table-row>
        <table:table-row>
          <table:table-cell table:style-name="표3.A1" office:value-type="string">
            <text:p text:style-name="P23">011210 종목명</text:p>
          </table:table-cell>
          <table:table-cell table:style-name="표3.A1" office:value-type="string">
            <text:p text:style-name="P23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sbot !상태</text:span></text:span><text:span text:style-name="T6"> 등락률 실시간</text:span></text:p>
          </table:table-cell>
          <table:table-cell table:style-name="표3.A1" office:value-type="string">
            <text:p text:style-name="P23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master_trades</text:span></text:span><text:span text:style-name="T6"> 통합</text:span></text:p>
          </table:table-cell>
          <table:table-cell table:style-name="표3.A1" office:value-type="string">
            <text:p text:style-name="P23">분할매도 포함 완료, 키키 연동 남음</text:p>
          </table:table-cell>
        </table:table-row>
      </table:table>
      <text:p text:style-name="P20"/>
      <text:p text:style-name="P24">vol_ratio sbot 2차 추매 조건 강화✅</text:p>
      <text:p text:style-name="P24">master_db v2 전면 개선✅</text:p>
      <text:p text:style-name="P24">unified_risk.py 통합 리스크 매니저✅</text:p>
      <text:p text:style-name="P24">dashboard.py 통합 대시보드✅</text:p>
      <text:p text:style-name="P24">cbot 2차 추매 조건 강화✅</text:p>
      <text:p text:style-name="P24">stock_bot 폴더 정리✅</text:p>
      <text:p text:style-name="P24">daily_review 경로 수정✅</text:p>
      <text:p text:style-name="P24">HTS 색상 (상승=빨강, 하락=파랑)✅</text:p>
      <text:p text:style-name="P24"><text:soft-page-break/></text:p>
      <text:p text:style-name="P24">2026.05.28</text:p>
      <text:p text:style-name="P24">✅ news_crawler.py — sector_monitor DB 기반 동적 수집</text:p>
      <text:p text:style-name="P24">✅ intelligence/news_sentiment.db 저장</text:p>
      <text:p text:style-name="P24">✅ cron 08:30 자동 수집 (평일)</text:p>
      <text:p text:style-name="P24">✅ ai_analyzer.py _get_news_hint() 프롬프트 주입</text:p>
      <text:p text:style-name="P24">✅ 키키 !뉴스 명령 추가</text:p>
      <text:h text:style-name="P21" text:outline-level="4"/>
      <text:h text:style-name="P25" text:outline-level="3"><text:span text:style-name="Source_20_Text"><text:span text:style-name="T7">2026.05.29 (토)</text:span></text:span></text:h>
      <text:p text:style-name="P26"><text:span text:style-name="Source_20_Text"><text:span text:style-name="T7">✅ cbot ws_prices/buy_price 오류 수정</text:span></text:span></text:p>
      <text:p text:style-name="P26"><text:span text:style-name="Source_20_Text"><text:span text:style-name="T7">✅ 봇 재시작 시 자동 실계좌 동기화 (account_sync)</text:span></text:span></text:p>
      <text:p text:style-name="P26"><text:span text:style-name="Source_20_Text"><text:span text:style-name="T7">✅ is_paused() 통합 리스크 연동 (nbot/sbot/cbot)</text:span></text:span></text:p>
      <text:p text:style-name="P26"><text:span text:style-name="Source_20_Text"><text:span text:style-name="T7">✅ 키키 !리스크/!리스크중단/!리스크재개 명령</text:span></text:span></text:p>
      <text:p text:style-name="P26"><text:span text:style-name="Source_20_Text"><text:span text:style-name="T7">✅ master_trades 분할매도 기록 (nbot)</text:span></text:span></text:p>
      <text:p text:style-name="P26"><text:span text:style-name="Source_20_Text"><text:span text:style-name="T7">✅ sbot 백테스트 now_t 오류 수정 (+18.09%)</text:span></text:span></text:p>
      <text:p text:style-name="P26"><text:span text:style-name="Source_20_Text"><text:span text:style-name="T7">✅ 저녁 브리핑 코스피/코스닥 네이버 API 직접 조회</text:span></text:span></text:p>
      <text:p text:style-name="P26"><text:span text:style-name="Source_20_Text"><text:span text:style-name="T7">✅ 브리핑 소수점/내일전망 수정</text:span></text:span></text:p>
      <text:p text:style-name="P26"><text:span text:style-name="Source_20_Text"><text:span text:style-name="T7">✅ 모닝 브리핑 뉴스 감성 섹션 추가</text:span></text:span></text:p>
      <text:p text:style-name="P26"><text:span text:style-name="Source_20_Text"><text:span text:style-name="T7">✅ news_crawler DB 경로 수정</text:span></text:span></text:p>
      <text:p text:style-name="P26"><text:span text:style-name="Source_20_Text"><text:span text:style-name="T7">✅ cron 08:30 → 07:50으로 변경</text:span></text:span></text:p>
      <text:p text:style-name="P26"/>
      <text:p text:style-name="P27">2026.05.30</text:p>
      <text:p text:style-name="P27">🎉 데탑 완전 이전 성공!</text:p>
      <text:list text:style-name="L8">
        <text:list-item>
          <text:p text:style-name="P28">실계좌 동기화 ✅ </text:p>
        </text:list-item>
        <text:list-item>
          <text:p text:style-name="P28"><text:soft-page-break/>키움 토큰 발급 ✅ </text:p>
        </text:list-item>
        <text:list-item>
          <text:p text:style-name="P28">테마 로딩 ✅ </text:p>
        </text:list-item>
        <text:list-item>
          <text:p text:style-name="P28">로컬 AI (qwen2.5:14b) ✅ </text:p>
        </text:list-item>
        <text:list-item>
          <text:p text:style-name="P29">주말 대기 중 ✅</text:p>
        </text:list-item>
      </text:list>
      <text:p text:style-name="P30">2026.06.01</text:p>
      <text:list text:style-name="L9">
        <text:list-item>
          <text:p text:style-name="P31">데탑 이전 시 DB 동기화 필수 </text:p>
        </text:list-item>
        <text:list-item>
          <text:p text:style-name="P31">ETF 필터 강화 </text:p>
        </text:list-item>
        <text:list-item>
          <text:p text:style-name="P31">대형주 제한 해제 </text:p>
        </text:list-item>
        <text:list-item>
          <text:p text:style-name="P32">포지션 사이징 개선</text:p>
        </text:list-item>
      </text:list>
      <text:p text:style-name="P30">✅ 종가매도 비활성화 </text:p>
      <text:list text:style-name="L10">
        <text:list-item>
          <text:p text:style-name="P33">✅ 장후(1530~2000) 매도 체크 추가 (nbot/sbot) </text:p>
        </text:list-item>
      </text:list>
      <text:list text:style-name="L11">
        <text:list-item>
          <text:p text:style-name="P34">✅ 대형주 제한 해제 (시총 700억 이하만 제외) </text:p>
        </text:list-item>
      </text:list>
      <text:list text:style-name="L12">
        <text:list-item>
          <text:p text:style-name="P35">✅ 포지션 사이징 90%로 상향</text:p>
        </text:list-item>
        <text:list-item>
          <text:h text:style-name="P36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22">작업</text:p>
            </table:table-cell>
            <table:table-cell table:style-name="표4.A1" office:value-type="string">
              <text:p text:style-name="P22">상태</text:p>
            </table:table-cell>
          </table:table-row>
        </table:table-header-rows>
        <table:table-row>
          <table:table-cell table:style-name="표4.A1" office:value-type="string">
            <text:p text:style-name="P23">데탑 이전 + 로컬 AI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ETF 필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대형주 제한 해제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종가매도 비활성화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장후 매도 체크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BUY_START_TIME 09:10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new 그룹 제외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텔레그램 빅 이벤트 모니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ai_analyzer 이벤트 가산점 연동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키키 !이벤트 명령어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crontab 등록</text:p>
          </table:table-cell>
          <table:table-cell table:style-name="표4.A1" office:value-type="string">
            <text:p text:style-name="P23">✅</text:p>
          </table:table-cell>
        </table:table-row>
      </table:table>
      <text:list text:continue-numbering="true" text:style-name="L12">
        <text:list-item>
          <text:p text:style-name="P35"/>
        </text:list-item>
      </text:list>
      <text:h text:style-name="P25" text:outline-level="3"><text:soft-page-break/>📋 2026.06.02 작업 내역</text:h>
      <text:h text:style-name="P37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38">파일</text:p>
            </table:table-cell>
            <table:table-cell table:style-name="표5.A1" office:value-type="string">
              <text:p text:style-name="P38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39">strategy.py</text:p>
          </table:table-cell>
          <table:table-cell table:style-name="표5.A1" office:value-type="string">
            <text:p text:style-name="P39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nbot.py</text:p>
          </table:table-cell>
          <table:table-cell table:style-name="표5.A1" office:value-type="string">
            <text:p text:style-name="P39">BUY_SCORE_MIN 55, 약세장 -1.0%, 순서 수정, SSL 재시도, 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risk_manager.py</text:p>
          </table:table-cell>
          <table:table-cell table:style-name="표5.A1" office:value-type="string">
            <text:p text:style-name="P39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.py</text:p>
          </table:table-cell>
          <table:table-cell table:style-name="표5.A1" office:value-type="string">
            <text:p text:style-name="P39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_analyzer.py</text:p>
          </table:table-cell>
          <table:table-cell table:style-name="표5.A1" office:value-type="string">
            <text:p text:style-name="P39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ki_cmd.py</text:p>
          </table:table-cell>
          <table:table-cell table:style-name="표5.A1" office:value-type="string">
            <text:p text:style-name="P39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s_api.py</text:p>
          </table:table-cell>
          <table:table-cell table:style-name="표5.A1" office:value-type="string">
            <text:p text:style-name="P39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account_sync.py</text:p>
          </table:table-cell>
          <table:table-cell table:style-name="표5.A1" office:value-type="string">
            <text:p text:style-name="P39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40"/>
      <text:h text:style-name="P37" text:outline-level="3">📋 오늘 2026.06.02 전체 작업 완료</text:h>
      <text:h text:style-name="P41" text:outline-level="4">🔧 긴급 버그 수정</text:h>
      <text:list text:style-name="L13">
        <text:list-item>
          <text:p text:style-name="P42"><text:span text:style-name="Source_20_Text">kis_api.py</text:span> — token.dat 만료 체크 + API 파라미터 완비 </text:p>
        </text:list-item>
        <text:list-item>
          <text:p text:style-name="P42"><text:span text:style-name="Source_20_Text">account_sync.py</text:span> — 토큰 재발급 재시도 </text:p>
        </text:list-item>
        <text:list-item>
          <text:p text:style-name="P42"><text:span text:style-name="Source_20_Text">nbot.py</text:span> — 실계좌 동기화 순서, 수동매도 오감지 방지 </text:p>
        </text:list-item>
        <text:list-item>
          <text:p text:style-name="P43"><text:span text:style-name="Source_20_Text">kiki_cmd.py</text:span> — !매도 잔재 클리어 </text:p>
        </text:list-item>
      </text:list>
      <text:h text:style-name="P41" text:outline-level="4">📈 수익률 개선</text:h>
      <text:list text:style-name="L14">
        <text:list-item>
          <text:p text:style-name="P44">종가매도 활성화 (-3% 손절) </text:p>
        </text:list-item>
        <text:list-item>
          <text:p text:style-name="P44">BUY_SCORE_MIN, 약세장 기준 강화 </text:p>
        </text:list-item>
        <text:list-item>
          <text:p text:style-name="P45">MACD/호가잔량 가산점 조정 </text:p>
        </text:list-item>
      </text:list>
      <text:h text:style-name="P41" text:outline-level="4">🎯 단타 진입 강화</text:h>
      <text:list text:style-name="L15">
        <text:list-item>
          <text:p text:style-name="P46">호가잔량 3배↑ 최우선 진입 </text:p>
        </text:list-item>
        <text:list-item>
          <text:p text:style-name="P46">눌림목/거래량폭발 초기 포착 </text:p>
        </text:list-item>
        <text:list-item>
          <text:p text:style-name="P47"><text:soft-page-break/>accel 가산점 상향 </text:p>
        </text:list-item>
      </text:list>
      <text:h text:style-name="P41" text:outline-level="4">📊 백테스트 기반 최적화</text:h>
      <text:list text:style-name="L16">
        <text:list-item>
          <text:p text:style-name="P48">손절선 -5% → <text:span text:style-name="Strong_20_Emphasis">-7%</text:span> </text:p>
        </text:list-item>
        <text:list-item>
          <text:p text:style-name="P48">MAX_POSITIONS <text:span text:style-name="Strong_20_Emphasis">5</text:span> </text:p>
        </text:list-item>
        <text:list-item>
          <text:p text:style-name="P48">매수금액 150만 → <text:span text:style-name="Strong_20_Emphasis">100만</text:span> </text:p>
        </text:list-item>
        <text:list-item>
          <text:p text:style-name="P49">마지막 슬롯 잔여자금 전액</text:p>
        </text:list-item>
      </text:list>
      <text:h text:style-name="P37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22">파일</text:p>
            </table:table-cell>
            <table:table-cell table:style-name="표6.A1" office:value-type="string">
              <text:p text:style-name="P22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6">cbot.py</text:span></text:span></text:p>
          </table:table-cell>
          <table:table-cell table:style-name="표6.A1" office:value-type="string">
            <text:p text:style-name="P23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mbngold_crawler.py</text:span></text:span></text:p>
          </table:table-cell>
          <table:table-cell table:style-name="표6.A1" office:value-type="string">
            <text:p text:style-name="P23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nbot.py</text:span></text:span></text:p>
          </table:table-cell>
          <table:table-cell table:style-name="표6.A1" office:value-type="string">
            <text:p text:style-name="P23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sbot.py</text:span></text:span></text:p>
          </table:table-cell>
          <table:table-cell table:style-name="표6.A1" office:value-type="string">
            <text:p text:style-name="P23">전문가 추천 가산점 +15점 (D+2까지)</text:p>
          </table:table-cell>
        </table:table-row>
      </table:table>
      <text:p text:style-name="P50"/>
      <text:h text:style-name="P41" text:outline-level="4">🆕 신규 기능</text:h>
      <text:list text:style-name="L17">
        <text:list-item>
          <text:p text:style-name="P51"><text:span text:style-name="Source_20_Text">mbngold_crawler.py</text:span> — 전문가 추천 4종목 자동 크롤링 </text:p>
        </text:list-item>
        <text:list-item>
          <text:p text:style-name="P51">nbot/sbot 전문가 추천 +15점 (D+1/D+2 유효) </text:p>
        </text:list-item>
        <text:list-item>
          <text:p text:style-name="P52">cbot BTC 양봉 시 극단공포 예외 허용</text:p>
        </text:list-item>
      </text:list>
      <text:p text:style-name="P53"/>
      <text:h text:style-name="P41" text:outline-level="4">내일 확인할 것들</text:h>
      <text:list text:style-name="L18">
        <text:list-item>
          <text:p text:style-name="P54"><text:span text:style-name="Source_20_Text">전문가추천[MBN골드](당일)</text:span> 로그 나오는지 </text:p>
        </text:list-item>
        <text:list-item>
          <text:p text:style-name="P54"><text:span text:style-name="Source_20_Text">⚡ BTC 양봉</text:span> cbot 정상 작동 </text:p>
        </text:list-item>
        <text:list-item>
          <text:p text:style-name="P54">nbot 슬롯 5개 활용되는지 </text:p>
        </text:list-item>
        <text:list-item>
          <text:p text:style-name="P55">손절선 -7% 실전 적용 확인</text:p>
        </text:list-item>
      </text:list>
      <text:h text:style-name="P37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56">파일</text:p>
            </table:table-cell>
            <table:table-cell table:style-name="표7.A1" office:value-type="string">
              <text:p text:style-name="P56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8">kis_websocket.py</text:span></text:span></text:p>
          </table:table-cell>
          <table:table-cell table:style-name="표7.A1" office:value-type="string">
            <text:p text:style-name="P57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s_api.py</text:span></text:span></text:p>
          </table:table-cell>
          <table:table-cell table:style-name="표7.A1" office:value-type="string">
            <text:p text:style-name="P57">계좌별 token.dat 분리, 잔고 캐시</text:p>
          </table:table-cell>
        </table:table-row>
        <text:soft-page-break/>
        <table:table-row>
          <table:table-cell table:style-name="표7.A1" office:value-type="string">
            <text:p text:style-name="Table_20_Contents"><text:span text:style-name="Source_20_Text"><text:span text:style-name="T8">nbot.py</text:span></text:span></text:p>
          </table:table-cell>
          <table:table-cell table:style-name="표7.A1" office:value-type="string">
            <text:p text:style-name="P57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sbot.py</text:span></text:span></text:p>
          </table:table-cell>
          <table:table-cell table:style-name="표7.A1" office:value-type="string">
            <text:p text:style-name="P57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ki.py/kiki_cmd.py</text:span></text:span></text:p>
          </table:table-cell>
          <table:table-cell table:style-name="표7.A1" office:value-type="string">
            <text:p text:style-name="P57">!전체재시작 명령 추가</text:p>
          </table:table-cell>
        </table:table-row>
      </table:table>
      <text:p text:style-name="P40"/>
      <text:h text:style-name="P58" text:outline-level="4"><text:span text:style-name="Source_20_Text"><text:span text:style-name="T9">2026.06.05</text:span></text:span></text:h>
      <text:h text:style-name="P59" text:outline-level="4"><text:span text:style-name="Source_20_Text"><text:span text:style-name="T10">🛡️ 폭락장 방어 로직 신규 추가</text:span></text:span></text:h>
      <text:p text:style-name="P60"><text:span text:style-name="Strong_20_Emphasis"><text:span text:style-name="T11">장 초반 급락 안전장치</text:span></text:span></text:p>
      <text:p text:style-name="P61"><text:span text:style-name="Source_20_Text"><text:span text:style-name="T12">nbot: 09:00~09:10 | sbot: 09:00~09:20</text:span></text:span></text:p>
      <text:p text:style-name="P62"><text:span text:style-name="Source_20_Text"><text:span text:style-name="T12">코스피 -3% 이하 + 계속 하락 중</text:span></text:span></text:p>
      <text:p text:style-name="P62"><text:span text:style-name="Source_20_Text"><text:span text:style-name="T12">→ stop 강제 전환 + 최저점 추적 시작</text:span></text:span></text:p>
      <text:p text:style-name="P60"><text:span text:style-name="Strong_20_Emphasis"><text:span text:style-name="T11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22">케이스</text:p>
            </table:table-cell>
            <table:table-cell table:style-name="표8.A1" office:value-type="string">
              <text:p text:style-name="P22">조건</text:p>
            </table:table-cell>
            <table:table-cell table:style-name="표8.A1" office:value-type="string">
              <text:p text:style-name="P22">반등 확인</text:p>
            </table:table-cell>
            <table:table-cell table:style-name="표8.A1" office:value-type="string">
              <text:p text:style-name="P22">종목 우선</text:p>
            </table:table-cell>
          </table:table-row>
        </table:table-header-rows>
        <table:table-row>
          <table:table-cell table:style-name="표8.A1" office:value-type="string">
            <text:p text:style-name="P23">1</text:p>
          </table:table-cell>
          <table:table-cell table:style-name="표8.A1" office:value-type="string">
            <text:p text:style-name="P23">코스피↓ + 코스닥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닥 우선</text:p>
          </table:table-cell>
        </table:table-row>
        <table:table-row>
          <table:table-cell table:style-name="표8.A1" office:value-type="string">
            <text:p text:style-name="P23">2</text:p>
          </table:table-cell>
          <table:table-cell table:style-name="표8.A1" office:value-type="string">
            <text:p text:style-name="P23">코스닥↓ + 코스피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피 우선</text:p>
          </table:table-cell>
        </table:table-row>
        <table:table-row>
          <table:table-cell table:style-name="표8.A1" office:value-type="string">
            <text:p text:style-name="P23">3</text:p>
          </table:table-cell>
          <table:table-cell table:style-name="표8.A1" office:value-type="string">
            <text:p text:style-name="P23">둘다↓ (오늘)</text:p>
          </table:table-cell>
          <table:table-cell table:style-name="표8.A1" office:value-type="string">
            <text:p text:style-name="P23">2번</text:p>
          </table:table-cell>
          <table:table-cell table:style-name="표8.A1" office:value-type="string">
            <text:p text:style-name="P23">덜 빠진 쪽</text:p>
          </table:table-cell>
        </table:table-row>
      </table:table>
      <text:p text:style-name="P63"/>
      <text:h text:style-name="P64" text:outline-level="4"/>
      <text:h text:style-name="P65" text:outline-level="3"><text:span text:style-name="Source_20_Text"><text:span text:style-name="T13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P22">파일</text:p>
            </table:table-cell>
            <table:table-cell table:style-name="표9.A1" office:value-type="string">
              <text:p text:style-name="P22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<text:span text:style-name="T6">build_sector_db.py</text:span></text:span></text:p>
          </table:table-cell>
          <table:table-cell table:style-name="표9.A1" office:value-type="string">
            <text:p text:style-name="P23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backtest_engine.py</text:span></text:span></text:p>
          </table:table-cell>
          <table:table-cell table:style-name="표9.A1" office:value-type="string">
            <text:p text:style-name="P23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strategy.py</text:span></text:span></text:p>
          </table:table-cell>
          <table:table-cell table:style-name="표9.A1" office:value-type="string">
            <text:p text:style-name="P23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backtest.py</text:span></text:span></text:p>
          </table:table-cell>
          <table:table-cell table:style-name="표9.A1" office:value-type="string">
            <text:p text:style-name="P23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walk_forward.py</text:span></text:span></text:p>
          </table:table-cell>
          <table:table-cell table:style-name="표9.A1" office:value-type="string">
            <text:p text:style-name="P23">파라미터 확장, 결과 요약</text:p>
          </table:table-cell>
        </table:table-row>
      </table:table>
      <text:p text:style-name="P66"><text:span text:style-name="Strong_20_Emphasis"><text:span text:style-name="T11">백테스트 최종 결과:</text:span></text:span></text:p>
      <text:p text:style-name="P67"><text:soft-page-break/><text:span text:style-name="Source_20_Text"><text:span text:style-name="T12">손절-10%+시간청산5일+주도섹터필터 → +43%대</text:span></text:span></text:p>
      <text:p text:style-name="P68"><text:span text:style-name="Source_20_Text"><text:span text:style-name="T12">현재 설정 손절-10% → +31.42%, 샤프 1.89 ✅</text:span></text:span></text:p>
      <text:p text:style-name="P68"><text:span text:style-name="Source_20_Text"><text:span text:style-name="T12"/></text:span></text:p>
      <text:h text:style-name="P69" text:outline-level="3"><text:span text:style-name="Source_20_Text"><text:span text:style-name="T14">📋 2026.06.07 작업 내역</text:span></text:span></text:h>
      <text:h text:style-name="P70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P22">항목</text:p>
            </table:table-cell>
            <table:table-cell table:style-name="표10.A1" office:value-type="string">
              <text:p text:style-name="P22">변경 전</text:p>
            </table:table-cell>
            <table:table-cell table:style-name="표10.A1" office:value-type="string">
              <text:p text:style-name="P22">변경 후</text:p>
            </table:table-cell>
          </table:table-row>
        </table:table-header-rows>
        <table:table-row>
          <table:table-cell table:style-name="표10.A1" office:value-type="string">
            <text:p text:style-name="P23">RSI_MIN</text:p>
          </table:table-cell>
          <table:table-cell table:style-name="표10.A1" office:value-type="string">
            <text:p text:style-name="P23">45</text:p>
          </table:table-cell>
          <table:table-cell table:style-name="표10.A1" office:value-type="string">
            <text:p text:style-name="P23">40 (눌림목 진입 허용)</text:p>
          </table:table-cell>
        </table:table-row>
        <table:table-row>
          <table:table-cell table:style-name="표10.A1" office:value-type="string">
            <text:p text:style-name="P23">본절 보호</text:p>
          </table:table-cell>
          <table:table-cell table:style-name="표10.A1" office:value-type="string">
            <text:p text:style-name="P23">-2%</text:p>
          </table:table-cell>
          <table:table-cell table:style-name="표10.A1" office:value-type="string">
            <text:p text:style-name="P23">-3% (코인 노이즈 대응)</text:p>
          </table:table-cell>
        </table:table-row>
        <table:table-row>
          <table:table-cell table:style-name="표10.A1" office:value-type="string">
            <text:p text:style-name="P23">야간 조건</text:p>
          </table:table-cell>
          <table:table-cell table:style-name="표10.A1" office:value-type="string">
            <text:p text:style-name="P23">BTC +2% AND 탐욕 60</text:p>
          </table:table-cell>
          <table:table-cell table:style-name="표10.A1" office:value-type="string">
            <text:p text:style-name="P23">BTC +1% OR 탐욕 50</text:p>
          </table:table-cell>
        </table:table-row>
        <table:table-row>
          <table:table-cell table:style-name="표10.A1" office:value-type="string">
            <text:p text:style-name="P23">POOL_SIZE</text:p>
          </table:table-cell>
          <table:table-cell table:style-name="표10.A1" office:value-type="string">
            <text:p text:style-name="P23">20</text:p>
          </table:table-cell>
          <table:table-cell table:style-name="표10.A1" office:value-type="string">
            <text:p text:style-name="P23">30 (회복장 대비)</text:p>
          </table:table-cell>
        </table:table-row>
        <table:table-row>
          <table:table-cell table:style-name="표10.A1" office:value-type="string">
            <text:p text:style-name="P23">MIN_TRADE_AMT_B</text:p>
          </table:table-cell>
          <table:table-cell table:style-name="표10.A1" office:value-type="string">
            <text:p text:style-name="P23">100억</text:p>
          </table:table-cell>
          <table:table-cell table:style-name="표10.A1" office:value-type="string">
            <text:p text:style-name="P23">50억 (극단공포 장 대응)</text:p>
          </table:table-cell>
        </table:table-row>
        <table:table-row>
          <table:table-cell table:style-name="표10.A1" office:value-type="string">
            <text:p text:style-name="P23">WebSocket 구독</text:p>
          </table:table-cell>
          <table:table-cell table:style-name="표10.A1" office:value-type="string">
            <text:p text:style-name="P23">15개</text:p>
          </table:table-cell>
          <table:table-cell table:style-name="표10.A1" office:value-type="string">
            <text:p text:style-name="P23">25개</text:p>
          </table:table-cell>
        </table:table-row>
      </table:table>
      <text:h text:style-name="P70" text:outline-level="4">sbot 미체결 취소 강화</text:h>
      <text:list text:style-name="L19">
        <text:list-item>
          <text:p text:style-name="P71">체결 완료 종목 pending 우선 제거 (nbot 방식 통일) </text:p>
        </text:list-item>
        <text:list-item>
          <text:p text:style-name="P72"><text:span text:style-name="T15">취소 후 </text:span><text:span text:style-name="Source_20_Text"><text:span text:style-name="T6">sold_today</text:span></text:span><text:span text:style-name="T15"> 등록 → 당일 재매수 차단 </text:span></text:p>
        </text:list-item>
        <text:list-item>
          <text:p text:style-name="P72"><text:span text:style-name="Source_20_Text"><text:span text:style-name="T6">buy_context</text:span></text:span><text:span text:style-name="T15">, </text:span><text:span text:style-name="Source_20_Text"><text:span text:style-name="T6">peak_tracker</text:span></text:span><text:span text:style-name="T15"> 잔재 정리 </text:span></text:p>
        </text:list-item>
        <text:list-item>
          <text:p text:style-name="P73">취소 성공 시 디스코드 알림 추가 </text:p>
        </text:list-item>
      </text:list>
      <text:h text:style-name="P70" text:outline-level="4">갭상승 눌림목 진입 포착 (nbot/strategy)</text:h>
      <text:list text:style-name="L20">
        <text:list-item>
          <text:p text:style-name="P74"><text:span text:style-name="Source_20_Text"><text:span text:style-name="T6">stck_oprc</text:span></text:span><text:span text:style-name="T15">(시가), </text:span><text:span text:style-name="Source_20_Text"><text:span text:style-name="T6">prdy_clpr</text:span></text:span><text:span text:style-name="T15">(전일종가) 데이터 수집 추가 </text:span></text:p>
        </text:list-item>
        <text:list-item>
          <text:p text:style-name="P75">갭+5% 이상 + 시가 눌림 → +12점 </text:p>
        </text:list-item>
        <text:list-item>
          <text:p text:style-name="P75">갭+3% 이상 + 약한 눌림 → +8점 </text:p>
        </text:list-item>
        <text:list-item>
          <text:p text:style-name="P76"><text:span text:style-name="T15">갭상승 종목은 </text:span><text:span text:style-name="Source_20_Text"><text:span text:style-name="T6">change &gt; 15%</text:span></text:span><text:span text:style-name="T15"> 과열 제외 면제 </text:span></text:p>
        </text:list-item>
      </text:list>
      <text:h text:style-name="P70" text:outline-level="4">VI 발동 종목 매수 제외 (nbot/sbot/strategy/sbot_strategy)</text:h>
      <text:list text:style-name="L21">
        <text:list-item>
          <text:p text:style-name="P77"><text:span text:style-name="Source_20_Text"><text:span text:style-name="T6">iscd_stat_cls_code = "51"</text:span></text:span><text:span text:style-name="T15"> → 단일가매매 중 매수 차단 </text:span></text:p>
        </text:list-item>
        <text:list-item>
          <text:p text:style-name="P78"><text:soft-page-break/>nbot/sbot 데이터 수집에 VI 상태 코드 추가 </text:p>
        </text:list-item>
        <text:list-item>
          <text:p text:style-name="P79"><text:span text:style-name="T15">strategy/sbot_strategy </text:span><text:span text:style-name="Source_20_Text"><text:span text:style-name="T6">passes_buy_filter</text:span></text:span><text:span text:style-name="T15"> 최우선 필터로 적용 </text:span></text:p>
        </text:list-item>
      </text:list>
      <text:h text:style-name="P70" text:outline-level="4">공시 실시간 가산점 연동</text:h>
      <text:list text:style-name="L22">
        <text:list-item>
          <text:p text:style-name="P80"><text:span text:style-name="Source_20_Text"><text:span text:style-name="T6">telegram_monitor.py</text:span></text:span><text:span text:style-name="T15"> v2 전면 개선 </text:span></text:p>
          <text:list>
            <text:list-item>
              <text:p text:style-name="P81">KIND 채널 공시 → 종목코드(6자리) 정규식 추출 </text:p>
            </text:list-item>
            <text:list-item>
              <text:p text:style-name="P81">공시 타입 17종 판별 (호재 12 / 악재 5) </text:p>
            </text:list-item>
            <text:list-item>
              <text:p text:style-name="P80"><text:span text:style-name="Source_20_Text"><text:span text:style-name="T6">consensus.py</text:span></text:span><text:span text:style-name="T15"> 리포트 가산점 자동 합산 </text:span></text:p>
            </text:list-item>
            <text:list-item>
              <text:p text:style-name="P80"><text:span text:style-name="Source_20_Text"><text:span text:style-name="T6">stock_event_bonus</text:span></text:span><text:span text:style-name="T15"> 테이블 신규 (종목코드 단위, 2~24h 유효) </text:span></text:p>
            </text:list-item>
            <text:list-item>
              <text:p text:style-name="P81">악재 공시 마이너스 가산점 (-15 ~ -25점) </text:p>
            </text:list-item>
          </text:list>
        </text:list-item>
        <text:list-item>
          <text:p text:style-name="P82"><text:span text:style-name="T15">nbot/sbot 분석 루프에 </text:span><text:span text:style-name="Source_20_Text"><text:span text:style-name="T6">_get_disclosure_bonus</text:span></text:span><text:span text:style-name="T15"> 연결 </text:span></text:p>
        </text:list-item>
      </text:list>
      <text:h text:style-name="P70" text:outline-level="4">generate_combined_report.py 재작성</text:h>
      <text:list text:style-name="L23">
        <text:list-item>
          <text:p text:style-name="P83">nbot + sbot 통합 단일 HTML (기존 따로 출력되던 문제 해결) </text:p>
        </text:list-item>
        <text:list-item>
          <text:p text:style-name="P84">요약 카드 / Equity Curve 비교 차트 / 월별 수익률 / 시나리오 테이블 탭 </text:p>
        </text:list-item>
      </text:list>
      <text:p text:style-name="P85"/>
      <text:p text:style-name="P86">수고하셨습니다! 내일 장 시작 후 로그에서 확인할 포인트:</text:p>
      <text:p text:style-name="P87">bash</text:p>
      <text:p text:style-name="P88"><text:span text:style-name="Source_20_Text"><text:span text:style-name="T16"># 갭상승 눌림목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갭상승눌림목"</text:span></text:span></text:p>
      <text:p text:style-name="P88"><text:span text:style-name="Source_20_Text"><text:span text:style-name="T16"># VI 필터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VI 발동"</text:span></text:span></text:p>
      <text:p text:style-name="P88"><text:span text:style-name="Source_20_Text"><text:span text:style-name="T16"># 공시 가산점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공시호재\|공시악재"</text:span></text:span></text:p>
      <text:p text:style-name="P88"><text:span text:style-name="Source_20_Text"><text:span text:style-name="T16"># sbot 미체결 취소</text:span></text:span></text:p>
      <text:p text:style-name="P88"><text:span text:style-name="Source_20_Text"><text:span text:style-name="T12">bot log s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미체결 취소"</text:span></text:span></text:p>
      <text:p text:style-name="P89"><text:span text:style-name="Source_20_Text"><text:span text:style-name="T19"/></text:span></text:p>
      <text:p text:style-name="P90"/>
      <text:p text:style-name="P91"><text:soft-page-break/><text:span text:style-name="Source_20_Text"><text:span text:style-name="T20">2026.06.08</text:span></text:span></text:p>
      <text:p text:style-name="P92"><text:span text:style-name="Strong_20_Emphasis"><text:span text:style-name="T21">kiki 브리핑 개선 내역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P38">항목</text:p>
            </table:table-cell>
            <table:table-cell table:style-name="표11.A1" office:value-type="string">
              <text:p text:style-name="P38">결과</text:p>
            </table:table-cell>
          </table:table-row>
        </table:table-header-rows>
        <table:table-row>
          <table:table-cell table:style-name="표11.A1" office:value-type="string">
            <text:p text:style-name="P39">모닝 브리핑 시간</text:p>
          </table:table-cell>
          <table:table-cell table:style-name="표11.A1" office:value-type="string">
            <text:p text:style-name="Table_20_Contents"><text:span text:style-name="Source_20_Text"><text:span text:style-name="T4">while</text:span></text:span><text:span text:style-name="T4"> 30초 루프 → 정확한 타임트리거 방식</text:span></text:p>
          </table:table-cell>
        </table:table-row>
        <table:table-row>
          <table:table-cell table:style-name="표11.A1" office:value-type="string">
            <text:p text:style-name="P39">엔비디아 하드코딩</text:p>
          </table:table-cell>
          <table:table-cell table:style-name="표11.A1" office:value-type="string">
            <text:p text:style-name="P39">제거 → Finnhub 실제 발표 종목으로 동적 생성</text:p>
          </table:table-cell>
        </table:table-row>
        <table:table-row>
          <table:table-cell table:style-name="표11.A1" office:value-type="string">
            <text:p text:style-name="P39">미국 지수</text:p>
          </table:table-cell>
          <table:table-cell table:style-name="표11.A1" office:value-type="string">
            <text:p text:style-name="Table_20_Contents"><text:span text:style-name="T4">Yahoo Finance(차단) → KIS API </text:span><text:span text:style-name="Source_20_Text"><text:span text:style-name="T4">FHKST03030100</text:span></text:span></text:p>
          </table:table-cell>
        </table:table-row>
        <table:table-row>
          <table:table-cell table:style-name="표11.A1" office:value-type="string">
            <text:p text:style-name="P39">나스닥/SOX/S&amp;P500</text:p>
          </table:table-cell>
          <table:table-cell table:style-name="표11.A1" office:value-type="string">
            <text:p text:style-name="P39">✅ 정확하게 조회</text:p>
          </table:table-cell>
        </table:table-row>
        <table:table-row>
          <table:table-cell table:style-name="표11.A1" office:value-type="string">
            <text:p text:style-name="P39">다우</text:p>
          </table:table-cell>
          <table:table-cell table:style-name="표11.A1" office:value-type="string">
            <text:p text:style-name="P39">KIS 미지원 → 제외</text:p>
          </table:table-cell>
        </table:table-row>
        <table:table-row>
          <table:table-cell table:style-name="표11.A1" office:value-type="string">
            <text:p text:style-name="P39">월요일 금요일 종가</text:p>
          </table:table-cell>
          <table:table-cell table:style-name="표11.A1" office:value-type="string">
            <text:p text:style-name="P39">✅ 자동 처리</text:p>
          </table:table-cell>
        </table:table-row>
      </table:table>
      <text:p text:style-name="P91"><text:span text:style-name="Source_20_Text"><text:span text:style-name="T22"/></text:span></text:p>
      <text:h text:style-name="P93" text:outline-level="2"><text:span text:style-name="Source_20_Text"><text:span text:style-name="T23">📋 2026-06-12 작업 일지</text:span></text:span></text:h>
      <text:h text:style-name="P94" text:outline-level="3">🗂 프로젝트 개요</text:h>
      <text:p text:style-name="P95"><text:span text:style-name="Strong_20_Emphasis">리나봇 (Lina Bot)</text:span> — 한국 주식 자동매매 + 디스코드 AI 비서 시스템</text:p>
      <text:p text:style-name="P96"/>
      <text:h text:style-name="P94" text:outline-level="3">✅ 완료 작업 목록</text:h>
      <text:h text:style-name="P97" text:outline-level="4">1. 스윙 추천 엔진 구축 (swing_analyzer.py)</text:h>
      <text:list text:style-name="L24">
        <text:list-item>
          <text:p text:style-name="P98">VCP + ATR 손절/목표가 + 섹터 군집 필터 완성 </text:p>
        </text:list-item>
        <text:list-item>
          <text:p text:style-name="P98">200일선 위 → 20일선 밀집 → VCP 수렴 → 거래량 마름 → 스마트머니 5단계 파이프라인 </text:p>
        </text:list-item>
        <text:list-item>
          <text:p text:style-name="P98">ETF / 우선주 필터 추가 </text:p>
        </text:list-item>
        <text:list-item>
          <text:p text:style-name="P98">R:R 1.5 미만 자동 제외 </text:p>
        </text:list-item>
        <text:list-item>
          <text:p text:style-name="P99"><text:span text:style-name="Source_20_Text">get_swing_data()</text:span> — dict 리스트 직접 반환 함수 추가 (텍스트 파싱 의존 제거) </text:p>
        </text:list-item>
      </text:list>
      <text:h text:style-name="P97" text:outline-level="4">2. 상승추세 눌림목 엔진 구축 (trend_analyzer.py)</text:h>
      <text:list text:style-name="L25">
        <text:list-item>
          <text:p text:style-name="P100">HH/HL 파동 + RSI 40~60 건전한 눌림 + 60일선 우상향 필터 </text:p>
        </text:list-item>
        <text:list-item>
          <text:p text:style-name="P100">ATR 손절/목표가 + 섹터 군집 포함 </text:p>
        </text:list-item>
        <text:list-item>
          <text:p text:style-name="P100"><text:soft-page-break/>ETF / 우선주 필터 추가 (KIWOOM 등) </text:p>
        </text:list-item>
        <text:list-item>
          <text:p text:style-name="P101"><text:span text:style-name="Source_20_Text">get_trend_data()</text:span> — dict 리스트 직접 반환 함수 추가 </text:p>
        </text:list-item>
      </text:list>
      <text:h text:style-name="P97" text:outline-level="4">3. S/A/B 등급 통합 마스터 리포트 (swing_master.py)</text:h>
      <text:list text:style-name="L26">
        <text:list-item>
          <text:p text:style-name="P102">3개 엔진 교집합 → S/A/B 등급 산출 </text:p>
          <text:list>
            <text:list-item>
              <text:p text:style-name="P102">🥇 S급: VCP + 추세 + 촉매 3개 교집합 </text:p>
            </text:list-item>
            <text:list-item>
              <text:p text:style-name="P102">🥈 A급: 2개 교집합 </text:p>
            </text:list-item>
            <text:list-item>
              <text:p text:style-name="P102">🥉 B급: 1개 단독 </text:p>
            </text:list-item>
          </text:list>
        </text:list-item>
        <text:list-item>
          <text:p text:style-name="P102">텍스트 파싱 완전 제거 → <text:span text:style-name="Source_20_Text">get_swing_data()</text:span> / <text:span text:style-name="Source_20_Text">get_trend_data()</text:span> 직접 호출 </text:p>
        </text:list-item>
        <text:list-item>
          <text:p text:style-name="P102">교집합 연산자 우선순위 버그 수정 </text:p>
        </text:list-item>
        <text:list-item>
          <text:p text:style-name="P103">VCP 탑픽 / 추세 탑픽 하단 표시 추가 </text:p>
        </text:list-item>
      </text:list>
      <text:h text:style-name="P97" text:outline-level="4">4. 촉매 엔진 고도화 (swing_master._get_catalyst_stocks)</text:h>
      <text:list text:style-name="L27">
        <text:list-item>
          <text:p text:style-name="P104">미장 급등(+3%) 티커 → DB 매핑 연동 </text:p>
        </text:list-item>
        <text:list-item>
          <text:p text:style-name="P104">텔레그램 실시간 언급 종목 감지 </text:p>
        </text:list-item>
        <text:list-item>
          <text:p text:style-name="P104">대장 관심주 183종목 DB 주입 </text:p>
        </text:list-item>
        <text:list-item>
          <text:p text:style-name="P104"><text:span text:style-name="Strong_20_Emphasis">sector_monitor.db 실시간 급등 테마 연동</text:span> (오늘 최종 완성) </text:p>
          <text:list>
            <text:list-item>
              <text:p text:style-name="P104">당일 09:00 이후 등락률 +7% 이상 상위 5개 테마 </text:p>
            </text:list-item>
            <text:list-item>
              <text:p text:style-name="P105">테마 키워드 매칭 → 해당 종목 촉매 자동 추가 </text:p>
            </text:list-item>
          </text:list>
        </text:list-item>
      </text:list>
      <text:h text:style-name="P97" text:outline-level="4">5. 관심주 DB 구축 (watchlist_manager.py)</text:h>
      <text:list text:style-name="L28">
        <text:list-item>
          <text:p text:style-name="P106">56개 테마 / 183개 종목 초기 세트 등록 </text:p>
        </text:list-item>
        <text:list-item>
          <text:p text:style-name="P107">반도체, 로봇, 원전, 바이오, 화장품, 방산 등 전 섹터 커버 </text:p>
        </text:list-item>
      </text:list>
      <text:h text:style-name="P97" text:outline-level="4">6. 미장 매핑 DB 고도화 (init_us_kr_mapping.py)</text:h>
      <text:list text:style-name="L29">
        <text:list-item>
          <text:p text:style-name="P108">46개 티커 / 144개 한국 수혜주 매핑 </text:p>
        </text:list-item>
        <text:list-item>
          <text:p text:style-name="P108">우주/방산, 통신, 반도체, 바이오, 원전, 신재생, 조선, 철강, 전력, 배터리, 화장품, 로봇, 자율주행, AI 전 섹터 추가 </text:p>
        </text:list-item>
        <text:list-item>
          <text:p text:style-name="P108">상장폐지된 X(US스틸) 티커 제거 </text:p>
        </text:list-item>
        <text:list-item>
          <text:p text:style-name="P109">DB에서 티커 동적 조회 방식으로 변경 (하드코딩 제거) </text:p>
        </text:list-item>
      </text:list>
      <text:h text:style-name="P97" text:outline-level="4"><text:soft-page-break/>7. 수급 데이터 수집 (backfill_investor.py)</text:h>
      <text:list text:style-name="L30">
        <text:list-item>
          <text:p text:style-name="P110">2,110종목 × 200일치 종가/거래량 수집 완료 (416,657건) </text:p>
        </text:list-item>
        <text:list-item>
          <text:p text:style-name="P110">수급 데이터 63,299건 백필 완료 </text:p>
        </text:list-item>
        <text:list-item>
          <text:p text:style-name="P111">파라미터 키 소문자 버그 수정 </text:p>
        </text:list-item>
      </text:list>
      <text:h text:style-name="P97" text:outline-level="4">8. DB 조회 유틸리티 (db_query.py)</text:h>
      <text:list text:style-name="L31">
        <text:list-item>
          <text:p text:style-name="P112">종목명 검색 / 테마 조회 / 전체 현황 확인 </text:p>
        </text:list-item>
        <text:list-item>
          <text:p text:style-name="P113">파워쉘 환경에서 sqlite 직접 조회 대체 </text:p>
        </text:list-item>
      </text:list>
      <text:h text:style-name="P97" text:outline-level="4">9. 리나봇 리눅스 이전 (lina_bot.py)</text:h>
      <text:list text:style-name="L32">
        <text:list-item>
          <text:p text:style-name="P114">Windows → Linux 완전 이전 </text:p>
        </text:list-item>
        <text:list-item>
          <text:p text:style-name="P114">systemd 서비스 등록 (<text:span text:style-name="Source_20_Text">yeongam9-lina.service</text:span>) </text:p>
        </text:list-item>
        <text:list-item>
          <text:p text:style-name="P114">스케줄러 5개 가동: </text:p>
          <text:list>
            <text:list-item>
              <text:p text:style-name="P114">07:00 아침 뉴스 (MBN골드 + 네이버 폴백) </text:p>
            </text:list-item>
            <text:list-item>
              <text:p text:style-name="P114">07:20 스윙 마스터 리포트 </text:p>
            </text:list-item>
            <text:list-item>
              <text:p text:style-name="P114">07:30 미장 + 텔레그램 + 수급 브리핑 </text:p>
            </text:list-item>
            <text:list-item>
              <text:p text:style-name="P114">14:30 생쇼 관심종목 </text:p>
            </text:list-item>
            <text:list-item>
              <text:p text:style-name="P114">매시간 30분 텔레그램 속보 </text:p>
            </text:list-item>
          </text:list>
        </text:list-item>
        <text:list-item>
          <text:p text:style-name="P114"><text:span text:style-name="Source_20_Text">!스윙</text:span> / <text:span text:style-name="Source_20_Text">!추세</text:span> / <text:span text:style-name="Source_20_Text">!마스터</text:span> 명령어 추가 </text:p>
        </text:list-item>
        <text:list-item>
          <text:p text:style-name="P115">asyncio.to_thread 비동기 처리 (디스코드 heartbeat 블로킹 방지) </text:p>
        </text:list-item>
      </text:list>
      <text:h text:style-name="P97" text:outline-level="4">10. sbo2 리나 스윙봇 신규 구축 (sbo2.py)</text:h>
      <text:list text:style-name="L33">
        <text:list-item>
          <text:p text:style-name="P116"><text:span text:style-name="Strong_20_Emphasis">설계 원칙:</text:span> </text:p>
          <text:list>
            <text:list-item>
              <text:p text:style-name="P116">시드 500만원 / 1종목 150만원 / 최대 4종목 </text:p>
            </text:list-item>
            <text:list-item>
              <text:p text:style-name="P116">S급 무조건 매수 / A급 70% 금액(105만원) </text:p>
            </text:list-item>
            <text:list-item>
              <text:p text:style-name="P116">ATR 기반 손절(-10%) / 목표가 자동 계산 </text:p>
            </text:list-item>
            <text:list-item>
              <text:p text:style-name="P116">하루 1회 스캔 (08:50 이전) </text:p>
            </text:list-item>
            <text:list-item>
              <text:p text:style-name="P116">30초 루프 </text:p>
            </text:list-item>
          </text:list>
        </text:list-item>
        <text:list-item>
          <text:p text:style-name="P116"><text:span text:style-name="Strong_20_Emphasis">실계좌 동기화 (sbot 방식):</text:span> </text:p>
          <text:list>
            <text:list-item>
              <text:p text:style-name="P116">매 루프 KIS API 잔고 조회 </text:p>
            </text:list-item>
            <text:list-item>
              <text:p text:style-name="P116"><text:soft-page-break/>팔린 종목 자동 제거 / 신규 종목 자동 추가 </text:p>
            </text:list-item>
            <text:list-item>
              <text:p text:style-name="P116">종목명 DB 조회 (<text:span text:style-name="Source_20_Text">get_stock_name</text:span>) </text:p>
            </text:list-item>
          </text:list>
        </text:list-item>
        <text:list-item>
          <text:p text:style-name="P116"><text:span text:style-name="Strong_20_Emphasis">버그 수정:</text:span> </text:p>
          <text:list>
            <text:list-item>
              <text:p text:style-name="P116">장마감 강제 청산 로직 제거 (스윙봇 → 단타봇 변환 버그) </text:p>
            </text:list-item>
            <text:list-item>
              <text:p text:style-name="P116">tgt=0 즉시 매도 방어막 추가 </text:p>
            </text:list-item>
            <text:list-item>
              <text:p text:style-name="P116">미체결 주문 취소 로직 (sbot 방식, 1루프 후 취소) </text:p>
            </text:list-item>
          </text:list>
        </text:list-item>
        <text:list-item>
          <text:p text:style-name="P116"><text:span text:style-name="Strong_20_Emphasis">인프라:</text:span> </text:p>
          <text:list>
            <text:list-item>
              <text:p text:style-name="P116">systemd 서비스 등록 (<text:span text:style-name="Source_20_Text">yeongam9-sbo2.service</text:span>) </text:p>
            </text:list-item>
            <text:list-item>
              <text:p text:style-name="P116">bot.sh 에 sbo2 등록 </text:p>
            </text:list-item>
            <text:list-item>
              <text:p text:style-name="P116">master_db 연동 </text:p>
            </text:list-item>
            <text:list-item>
              <text:p text:style-name="P117">디스코드 알림 </text:p>
            </text:list-item>
          </text:list>
        </text:list-item>
      </text:list>
      <text:h text:style-name="P97" text:outline-level="4">11. 상태파일 관리 (sbo2_state.json)</text:h>
      <text:list text:style-name="L34">
        <text:list-item>
          <text:p text:style-name="P118"><text:span text:style-name="Source_20_Text">reset_sbo2_state.py</text:span> — 상태파일 초기화 유틸 </text:p>
        </text:list-item>
        <text:list-item>
          <text:p text:style-name="P118">cand_date 유지 (재시작시 불필요한 재스캔 방지) </text:p>
        </text:list-item>
        <text:list-item>
          <text:p text:style-name="P119">sold_today 관리 (재매수 방지) </text:p>
        </text:list-item>
      </text:list>
      <text:p text:style-name="P96"/>
      <text:h text:style-name="P94" text:outline-level="3">🔧 내일/추후 작업 예정</text:h>
      <text:p text:style-name="P120"><text:span text:style-name="Source_20_Text"><text:span text:style-name="T24">1. </text:span></text:span><text:span text:style-name="Source_20_Text"><text:span text:style-name="T25">백테스트 구현</text:span></text:span></text:p>
      <text:p text:style-name="P121"><text:span text:style-name="Source_20_Text"><text:span text:style-name="T26"><text:s text:c="3"/>→ </text:span></text:span><text:span text:style-name="Source_20_Text"><text:span text:style-name="T24">200</text:span></text:span><text:span text:style-name="Source_20_Text"><text:span text:style-name="T25">일 </text:span></text:span><text:span text:style-name="Source_20_Text"><text:span text:style-name="T24">DB </text:span></text:span><text:span text:style-name="Source_20_Text"><text:span text:style-name="T25">활용 과거 시뮬레이션</text:span></text:span></text:p>
      <text:p text:style-name="P121"><text:span text:style-name="Source_20_Text"><text:span text:style-name="T26"><text:s text:c="3"/>→ </text:span></text:span><text:span text:style-name="Source_20_Text"><text:span text:style-name="T25">승률 </text:span></text:span><text:span text:style-name="Source_20_Text"><text:span text:style-name="T24">/ </text:span></text:span><text:span text:style-name="Source_20_Text"><text:span text:style-name="T25">평균수익률 </text:span></text:span><text:span text:style-name="Source_20_Text"><text:span text:style-name="T24">/ </text:span></text:span><text:span text:style-name="Source_20_Text"><text:span text:style-name="T25">최대낙폭 계산</text:span></text:span></text:p>
      <text:p text:style-name="P121"/>
      <text:p text:style-name="P121"><text:span text:style-name="Source_20_Text"><text:span text:style-name="T24">2. sbot </text:span></text:span><text:span text:style-name="Source_20_Text"><text:span text:style-name="T25">프리장</text:span></text:span><text:span text:style-name="Source_20_Text"><text:span text:style-name="T24">/</text:span></text:span><text:span text:style-name="Source_20_Text"><text:span text:style-name="T25">애프터장 매도 시간 수정</text:span></text:span></text:p>
      <text:p text:style-name="P121"><text:span text:style-name="Source_20_Text"><text:span text:style-name="T26"><text:s text:c="3"/>→ </text:span></text:span><text:span text:style-name="Source_20_Text"><text:span text:style-name="T24">SELL_START = "0800" / SELL_END = "2000"</text:span></text:span></text:p>
      <text:p text:style-name="P121"/>
      <text:p text:style-name="P121"><text:span text:style-name="Source_20_Text"><text:span text:style-name="T24">3. </text:span></text:span><text:span text:style-name="Source_20_Text"><text:span text:style-name="T25">월요일 실전 테스트</text:span></text:span></text:p>
      <text:p text:style-name="P121"><text:soft-page-break/><text:span text:style-name="Source_20_Text"><text:span text:style-name="T26"><text:s text:c="3"/>→ </text:span></text:span><text:span text:style-name="Source_20_Text"><text:span text:style-name="T24">sbo2 </text:span></text:span><text:span text:style-name="Source_20_Text"><text:span text:style-name="T25">매수</text:span></text:span><text:span text:style-name="Source_20_Text"><text:span text:style-name="T24">/</text:span></text:span><text:span text:style-name="Source_20_Text"><text:span text:style-name="T25">매도 실전 검증</text:span></text:span></text:p>
      <text:p text:style-name="P121"><text:span text:style-name="Source_20_Text"><text:span text:style-name="T26"><text:s text:c="3"/>→ </text:span></text:span><text:span text:style-name="Source_20_Text"><text:span text:style-name="T25">미체결 취소 로직 검증</text:span></text:span></text:p>
      <text:p text:style-name="P121"/>
      <text:p text:style-name="P121"><text:span text:style-name="Source_20_Text"><text:span text:style-name="T24">4. </text:span></text:span><text:span text:style-name="Source_20_Text"><text:span text:style-name="T25">주말 데이터 수집 현실화</text:span></text:span></text:p>
      <text:p text:style-name="P121"><text:span text:style-name="Source_20_Text"><text:span text:style-name="T26"><text:s text:c="3"/>→ </text:span></text:span><text:span text:style-name="Source_20_Text"><text:span text:style-name="T24">8</text:span></text:span><text:span text:style-name="Source_20_Text"><text:span text:style-name="T25">월까지 실데이터 축적 목표</text:span></text:span></text:p>
      <text:p text:style-name="P96"/>
      <text:h text:style-name="P94" text:outline-level="3">📊 현재 봇 상태</text:h>
      <text:p text:style-name="P120"><text:span text:style-name="Source_20_Text"><text:span text:style-name="T26">✅ </text:span></text:span><text:span text:style-name="Source_20_Text"><text:span text:style-name="T24">sbot <text:s text:c="4"/>✅ sbo2 <text:s text:c="2"/>✅ cbot</text:span></text:span></text:p>
      <text:p text:style-name="P121"><text:span text:style-name="Source_20_Text"><text:span text:style-name="T26">✅ </text:span></text:span><text:span text:style-name="Source_20_Text"><text:span text:style-name="T24">kiki <text:s text:c="4"/>✅ sector <text:s/>✅ dashboard</text:span></text:span></text:p>
      <text:p text:style-name="P121"><text:span text:style-name="Source_20_Text"><text:span text:style-name="T26">✅ </text:span></text:span><text:span text:style-name="Source_20_Text"><text:span text:style-name="T24">telegram ✅ lina</text:span></text:span></text:p>
      <text:p text:style-name="P121"><text:span text:style-name="Source_20_Text"><text:span text:style-name="T25">총 </text:span></text:span><text:span text:style-name="Source_20_Text"><text:span text:style-name="T24">8</text:span></text:span><text:span text:style-name="Source_20_Text"><text:span text:style-name="T25">개 봇 </text:span></text:span><text:span text:style-name="Source_20_Text"><text:span text:style-name="T24">ALL GREEN 🟢</text:span></text:span></text:p>
      <text:p text:style-name="P122"><text:span text:style-name="Source_20_Text"><text:span text:style-name="T23"/></text:span></text:p>
      <text:p text:style-name="Text_20_body"/>
      <text:p text:style-name="P123"><text:span text:style-name="Source_20_Text"><text:span text:style-name="T27">alias 등록 (추천)</text:span></text:span></text:p>
      <text:p text:style-name="P123"><text:span text:style-name="Source_20_Text"><text:span text:style-name="T27">echo "alias bot='~/k-bot/stock_bot/bot.sh'" &gt;&gt; ~/.bashrc</text:span></text:span></text:p>
      <text:p text:style-name="P123"><text:span text:style-name="Source_20_Text"><text:span text:style-name="T27">source ~/.bashrc</text:span></text:span></text:p>
      <text:p text:style-name="P123"><text:span text:style-name="Source_20_Text"><text:span text:style-name="T27">/bin/bash ~/backup_bot.sh</text:span></text:span></text:p>
      <text:p text:style-name="P123"><text:span text:style-name="Source_20_Text"><text:span text:style-name="T27">ollama run qwen2.5:14b</text:span></text:span></text:p>
      <text:p text:style-name="P124"/>
      <text:p text:style-name="P125">bot <text:span text:style-name="T28">git</text:span> <text:span text:style-name="T29">"</text:span>데이터 기반의 주도주 필터링<text:span text:style-name="T29">"</text:span></text:p>
      <text:p text:style-name="P124"/>
      <text:p text:style-name="P126">kortws-beep</text:p>
      <text:p text:style-name="P126"/>
      <text:p text:style-name="P127"><text:span text:style-name="Source_20_Text"><text:span text:style-name="T30">git add .</text:span></text:span> (수정한 파일들을 장바구니에 몽땅 담기)</text:p>
      <text:list text:style-name="L35">
        <text:list-item>
          <text:p text:style-name="P128"><text:span text:style-name="Source_20_Text"><text:span text:style-name="T30">git commit -m "</text:span></text:span><text:span text:style-name="Source_20_Text"><text:span text:style-name="T31">시간 청산 로직 추가</text:span></text:span><text:span text:style-name="Source_20_Text"><text:span text:style-name="T30">"</text:span></text:span> (어떤 작업을 했는지 메모를 적고 버전 확정하기)</text:p>
        </text:list-item>
      </text:list>
      <text:list text:style-name="L36">
        <text:list-item>
          <text:p text:style-name="P129"><text:span text:style-name="Source_20_Text"><text:span text:style-name="T30">git push</text:span></text:span> (GitHub 온라인 서버로 밀어 올리기)</text:p>
        </text:list-item>
      </text:list>
      <text:p text:style-name="Text_20_body"/>
      <text:h text:style-name="P130" text:outline-level="3"><text:soft-page-break/>🔍 지금 당장 추가할 만한 것들</text:h>
      <text:list text:style-name="L37">
        <text:list-item>
          <text:p text:style-name="P131"><text:span text:style-name="Strong_20_Emphasis">sbot 익절 후 재진입 허용</text:span> — 현재 당일 sold_today로 재매수 차단인데, sbot은 며칠 보유라 재진입 의미 있을 수 있음</text:p>
        </text:list-item>
      </text:list>
      <text:p text:style-name="Text_20_body">tail -f /home/free4tak/k-bot/stock_bot/logs/sector_monitor.log</text:p>
      <text:p text:style-name="P132"><text:span text:style-name="Source_20_Text"><text:span text:style-name="T32">tail -f /home/free4tak/k-bot/stock_bot/logs/cbot.log</text:span></text:span></text:p>
      <text:p text:style-name="P132"><text:span text:style-name="Source_20_Text"><text:span text:style-name="T32"/></text:span></text:p>
      <text:p text:style-name="P133"><text:span text:style-name="Source_20_Text"><text:span text:style-name="T33">./bot.sh restart sbo2</text:span></text:span></text:p>
      <text:p text:style-name="P133"><text:span text:style-name="Source_20_Text"><text:span text:style-name="T33">./bot.sh log sbo2</text:span></text:span></text:p>
      <text:p text:style-name="P1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12T19:24:16.178149297</dc:date>
    <meta:editing-duration>P9DT9H49M36S</meta:editing-duration>
    <meta:editing-cycles>45</meta:editing-cycles>
    <meta:generator>LibreOffice/26.2.3.2$Linux_X86_64 LibreOffice_project/620$Build-2</meta:generator>
    <meta:document-statistic meta:table-count="10" meta:image-count="0" meta:object-count="0" meta:page-count="18" meta:paragraph-count="512" meta:word-count="2475" meta:character-count="10738" meta:non-whitespace-character-count="8751"/>
  </office:meta>
</office:document-meta>
</file>