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A8000004444E06372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KR" svg:font-family="'Noto Sans Mono CJK KR'" style:font-family-generic="modern" style:font-pitch="fixed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OpenSymbol" svg:font-family="OpenSymbol" style:font-charset="x-symbol"/>
    <style:font-face style:name="var font-mono" svg:font-family="'var font-mono'"/>
  </office:font-face-decls>
  <office:automatic-styles>
    <style:style style:name="P1" style:family="paragraph" style:parent-style-name="Heading_20_4">
      <style:paragraph-properties fo:margin-left="0cm" fo:margin-right="0cm" fo:text-indent="0cm" style:auto-text-indent="false"/>
    </style:style>
    <style:style style:name="P2" style:family="paragraph" style:parent-style-name="Preformatted_20_Text">
      <loext:graphic-properties draw:fill="none" draw:fill-color="#ffffff"/>
      <style:paragraph-properties fo:background-color="transparent"/>
    </style:style>
    <style:style style:name="P3" style:family="paragraph" style:parent-style-name="Preformatted_20_Text">
      <loext:graphic-properties draw:fill="none" draw:fill-color="#ffffff"/>
      <style:paragraph-properties fo:margin-left="0cm" fo:margin-right="0cm" fo:text-indent="0cm" style:auto-text-indent="false" fo:background-color="transparent"/>
    </style:style>
    <style:style style:name="P4" style:family="paragraph" style:parent-style-name="Preformatted_20_Text">
      <loext:graphic-properties draw:fill="none" draw:fill-color="#ffffff"/>
      <style:paragraph-properties fo:margin-left="0cm" fo:margin-right="0cm" fo:margin-top="0cm" fo:margin-bottom="0.499cm" style:contextual-spacing="false" fo:text-indent="0cm" style:auto-text-indent="false" fo:background-color="transparent"/>
    </style:style>
    <style:style style:name="P5" style:family="paragraph" style:parent-style-name="Preformatted_20_Text">
      <loext:graphic-properties draw:fill="none" draw:fill-color="#ffffff"/>
      <style:paragraph-properties fo:margin-top="0cm" fo:margin-bottom="0.499cm" style:contextual-spacing="false" fo:background-color="transparent"/>
    </style:style>
    <style:style style:name="P6" style:family="paragraph" style:parent-style-name="Preformatted_20_Text">
      <loext:graphic-properties draw:fill="none" draw:fill-color="#ffffff"/>
      <style:paragraph-properties fo:background-color="transparent"/>
      <style:text-properties officeooo:paragraph-rsid="0008e9c4"/>
    </style:style>
    <style:style style:name="P7" style:family="paragraph" style:parent-style-name="Standard">
      <style:paragraph-properties fo:margin-left="0cm" fo:margin-right="0cm" fo:margin-top="0cm" fo:margin-bottom="0.499cm" style:contextual-spacing="false" fo:text-indent="0cm" style:auto-text-indent="false"/>
    </style:style>
    <style:style style:name="P8" style:family="paragraph" style:parent-style-name="Standard">
      <style:paragraph-properties fo:margin-left="0cm" fo:margin-right="0cm" fo:orphans="1" fo:text-indent="0cm" style:auto-text-indent="false"/>
    </style:style>
    <style:style style:name="P9" style:family="paragraph" style:parent-style-name="Text_20_body">
      <style:paragraph-properties fo:margin-left="0cm" fo:margin-right="0cm" fo:text-indent="0cm" style:auto-text-indent="false"/>
    </style:style>
    <style:style style:name="P10" style:family="paragraph" style:parent-style-name="Text_20_body" style:list-style-name="L1"/>
    <style:style style:name="P11" style:family="paragraph" style:parent-style-name="Text_20_body" style:list-style-name="L1">
      <style:paragraph-properties fo:margin-top="0cm" fo:margin-bottom="0cm" style:contextual-spacing="false"/>
    </style:style>
    <style:style style:name="P12" style:family="paragraph" style:parent-style-name="Text_20_body">
      <style:paragraph-properties fo:margin-left="0cm" fo:margin-right="0cm" fo:margin-top="0cm" fo:margin-bottom="0cm" style:contextual-spacing="false" fo:orphans="1" fo:text-indent="0cm" style:auto-text-indent="false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officeooo:rsid="0008e9c4" officeooo:paragraph-rsid="0008e9c4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fo:font-size="15pt" fo:font-weight="normal" officeooo:rsid="0008e9c4" officeooo:paragraph-rsid="0008e9c4" style:font-size-asian="15pt" style:font-weight-asian="normal" style:font-size-complex="15pt" style:font-weight-complex="normal"/>
    </style:style>
    <style:style style:name="T1" style:family="text">
      <style:text-properties fo:color="#6e7687" loext:opacity="100%"/>
    </style:style>
    <style:style style:name="T2" style:family="text">
      <style:text-properties fo:color="#6e7687" loext:opacity="100%" style:font-name="var font-mono" fo:background-color="transparent" loext:char-shading-value="0"/>
    </style:style>
    <style:style style:name="T3" style:family="text">
      <style:text-properties fo:color="#6e7687" loext:opacity="100%" fo:background-color="transparent" loext:char-shading-value="0" style:font-name-asian="var font-mono"/>
    </style:style>
    <style:style style:name="T4" style:family="text">
      <style:text-properties fo:color="#0051c2" loext:opacity="100%"/>
    </style:style>
    <style:style style:name="T5" style:family="text">
      <style:text-properties fo:color="#0051c2" loext:opacity="100%" style:font-name="var font-mono" fo:background-color="transparent" loext:char-shading-value="0"/>
    </style:style>
    <style:style style:name="T6" style:family="text">
      <style:text-properties fo:color="#14181f" loext:opacity="100%" style:font-name="var font-mono" fo:background-color="transparent" loext:char-shading-value="0"/>
    </style:style>
    <style:style style:name="T7" style:family="text">
      <style:text-properties fo:color="#14181f" loext:opacity="100%" fo:background-color="transparent" loext:char-shading-value="0" style:font-name-asian="var font-mono"/>
    </style:style>
    <style:style style:name="T8" style:family="text">
      <style:text-properties fo:color="#b34a00" loext:opacity="100%" style:font-name="var font-mono" fo:background-color="transparent" loext:char-shading-value="0"/>
    </style:style>
    <style:style style:name="T9" style:family="text">
      <style:text-properties fo:color="#008000" loext:opacity="100%"/>
    </style:style>
    <style:style style:name="T10" style:family="text">
      <style:text-properties fo:color="#008000" loext:opacity="100%" style:font-name="var font-mono" fo:background-color="transparent" loext:char-shading-value="0"/>
    </style:style>
    <style:style style:name="T11" style:family="text">
      <style:text-properties fo:color="#008000" loext:opacity="100%" fo:background-color="transparent" loext:char-shading-value="0" style:font-name-asian="var font-mono"/>
    </style:style>
    <style:style style:name="T12" style:family="text">
      <style:text-properties fo:color="#bd0f1e" loext:opacity="100%" style:font-name="var font-mono" fo:background-color="transparent" loext:char-shading-value="0"/>
    </style:style>
    <style:style style:name="T13" style:family="text">
      <style:text-properties fo:color="#2b303b" loext:opacity="100%" style:font-name="var font-mono" fo:background-color="transparent" loext:char-shading-value="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# 실행권한 부여 (최초 1회)</text:span> <text:span text:style-name="T4">chmod</text:span> +x start.sh stop.sh status.sh <text:span text:style-name="T1"># 전체 기동</text:span> ./start.sh <text:span text:style-name="T1"># 상태 확인</text:span> ./status.sh <text:span text:style-name="T1"># 전체 종료</text:span> ./stop.sh</text:p>
      <text:p text:style-name="P9"/>
      <text:p text:style-name="P9"/>
      <text:p text:style-name="P9"/>
      <text:p text:style-name="P8">명령 2개 실행함</text:p>
      <text:p text:style-name="P7">명령 2개 실행함</text:p>
      <text:p text:style-name="P9">경로 확인 완료:</text:p>
      <text:list text:style-name="L1">
        <text:list-item>
          <text:p text:style-name="P11">운영 폴더: <text:span text:style-name="Source_20_Text">/home/free4tak/k-bot/stock_bot</text:span> </text:p>
        </text:list-item>
        <text:list-item>
          <text:p text:style-name="P11">venv: <text:span text:style-name="Source_20_Text">/home/free4tak/venv</text:span> </text:p>
        </text:list-item>
        <text:list-item>
          <text:p text:style-name="P10">사용자: <text:span text:style-name="Source_20_Text">free4tak</text:span> </text:p>
        </text:list-item>
      </text:list>
      <text:p text:style-name="P12">2개의 파일 생성됨, 명령 실행함, 파일 읽음</text:p>
      <text:p text:style-name="P9">2개의 파일 생성됨, 명령 실행함, 파일 읽음</text:p>
      <text:p text:style-name="P9">완료! 🦊</text:p>
      <text:p text:style-name="Horizontal_20_Line"/>
      <text:h text:style-name="Heading_20_3" text:outline-level="3">🚀 설치 방법</text:h>
      <text:p text:style-name="P9">bash</text:p>
      <text:p text:style-name="P3"><text:span text:style-name="Source_20_Text"><text:span text:style-name="T8">cd</text:span></text:span><text:span text:style-name="Source_20_Text"><text:span text:style-name="T6"> /home/free4tak/k-bot/stock_bot</text:span></text:span></text:p>
      <text:p text:style-name="P2"/>
      <text:p text:style-name="P3"><text:span text:style-name="Source_20_Text"><text:span text:style-name="T2"># 1. </text:span></text:span><text:span text:style-name="Source_20_Text"><text:span text:style-name="T3">파일 복사</text:span></text:span></text:p>
      <text:p text:style-name="P3"><text:span text:style-name="Source_20_Text"><text:span text:style-name="T5">cp</text:span></text:span><text:span text:style-name="Source_20_Text"><text:span text:style-name="T6"> install_systemd.sh bot.sh </text:span></text:span><text:span text:style-name="Source_20_Text"><text:span text:style-name="T8">.</text:span></text:span></text:p>
      <text:p text:style-name="P2"/>
      <text:p text:style-name="P3"><text:span text:style-name="Source_20_Text"><text:span text:style-name="T2"># 2. </text:span></text:span><text:span text:style-name="Source_20_Text"><text:span text:style-name="T3">실행권한</text:span></text:span></text:p>
      <text:p text:style-name="P3"><text:span text:style-name="Source_20_Text"><text:span text:style-name="T5">chmod</text:span></text:span><text:span text:style-name="Source_20_Text"><text:span text:style-name="T6"> +x install_systemd.sh bot.sh</text:span></text:span></text:p>
      <text:p text:style-name="P2"/>
      <text:p text:style-name="P3"><text:span text:style-name="Source_20_Text"><text:span text:style-name="T2"># 3. </text:span></text:span><text:span text:style-name="Source_20_Text"><text:span text:style-name="T3">설치 </text:span></text:span><text:span text:style-name="Source_20_Text"><text:span text:style-name="T2">(sudo </text:span></text:span><text:span text:style-name="Source_20_Text"><text:span text:style-name="T3">필요</text:span></text:span><text:span text:style-name="Source_20_Text"><text:span text:style-name="T2">)</text:span></text:span></text:p>
      <text:p text:style-name="P3"><text:span text:style-name="Source_20_Text"><text:span text:style-name="T5">sudo</text:span></text:span><text:span text:style-name="Source_20_Text"><text:span text:style-name="T6"> </text:span></text:span><text:span text:style-name="Source_20_Text"><text:span text:style-name="T5">bash</text:span></text:span><text:span text:style-name="Source_20_Text"><text:span text:style-name="T6"> install_systemd.sh</text:span></text:span></text:p>
      <text:p text:style-name="P2"/>
      <text:p text:style-name="P3"><text:span text:style-name="Source_20_Text"><text:span text:style-name="T2"># 4. </text:span></text:span><text:span text:style-name="Source_20_Text"><text:span text:style-name="T3">전체 시작</text:span></text:span></text:p>
      <text:p text:style-name="P5"><text:span text:style-name="Source_20_Text"><text:span text:style-name="T6">./bot.sh start</text:span></text:span></text:p>
      <text:p text:style-name="Horizontal_20_Line"/>
      <text:h text:style-name="Heading_20_3" text:outline-level="3">📋 이제부터 사용법</text:h>
      <text:h text:style-name="Heading_20_4" text:outline-level="4">기존 방식 대신</text:h>
      <text:p text:style-name="P9">bash</text:p>
      <text:p text:style-name="P3"><text:span text:style-name="Source_20_Text"><text:span text:style-name="T2"># Before</text:span></text:span></text:p>
      <text:p text:style-name="P3"><text:span text:style-name="Source_20_Text"><text:span text:style-name="T5">bash</text:span></text:span><text:span text:style-name="Source_20_Text"><text:span text:style-name="T6"> start.sh</text:span></text:span></text:p>
      <text:p text:style-name="P3"><text:span text:style-name="Source_20_Text"><text:span text:style-name="T5">bash</text:span></text:span><text:span text:style-name="Source_20_Text"><text:span text:style-name="T6"> stop.sh</text:span></text:span></text:p>
      <text:p text:style-name="P3"><text:span text:style-name="Source_20_Text"><text:span text:style-name="T5">tail</text:span></text:span><text:span text:style-name="Source_20_Text"><text:span text:style-name="T6"> -f logs/nbot.log</text:span></text:span></text:p>
      <text:p text:style-name="P2"><text:soft-page-break/></text:p>
      <text:p text:style-name="P3"><text:span text:style-name="Source_20_Text"><text:span text:style-name="T2"># After</text:span></text:span></text:p>
      <text:p text:style-name="P2"><text:span text:style-name="Source_20_Text"><text:span text:style-name="T6">./bot.sh start</text:span></text:span></text:p>
      <text:p text:style-name="P2"><text:span text:style-name="Source_20_Text"><text:span text:style-name="T6">./bot.sh stop</text:span></text:span></text:p>
      <text:p text:style-name="P5"><text:span text:style-name="Source_20_Text"><text:span text:style-name="T6">./bot.sh log nbot</text:span></text:span></text:p>
      <text:h text:style-name="Heading_20_4" text:outline-level="4">핵심 명령어</text:h>
      <text:p text:style-name="P9">bash</text:p>
      <text:p text:style-name="P3"><text:span text:style-name="Source_20_Text"><text:span text:style-name="T6">./bot.sh status <text:s text:c="10"/></text:span></text:span><text:span text:style-name="Source_20_Text"><text:span text:style-name="T2"># 5</text:span></text:span><text:span text:style-name="Source_20_Text"><text:span text:style-name="T3">봇 상태 한눈에</text:span></text:span></text:p>
      <text:p text:style-name="P3"><text:span text:style-name="Source_20_Text"><text:span text:style-name="T6">./bot.sh log all <text:s text:c="9"/></text:span></text:span><text:span text:style-name="Source_20_Text"><text:span text:style-name="T2"># </text:span></text:span><text:span text:style-name="Source_20_Text"><text:span text:style-name="T3">전체 실시간 로그</text:span></text:span></text:p>
      <text:p text:style-name="P3"><text:span text:style-name="Source_20_Text"><text:span text:style-name="T6">./bot.sh log nbot <text:s text:c="8"/></text:span></text:span><text:span text:style-name="Source_20_Text"><text:span text:style-name="T2"># </text:span></text:span><text:span text:style-name="Source_20_Text"><text:span text:style-name="T3">단타봇 로그</text:span></text:span></text:p>
      <text:p text:style-name="P3"><text:span text:style-name="Source_20_Text"><text:span text:style-name="T6">./bot.sh today <text:s text:c="11"/></text:span></text:span><text:span text:style-name="Source_20_Text"><text:span text:style-name="T2"># </text:span></text:span><text:span text:style-name="Source_20_Text"><text:span text:style-name="T3">오늘 전체 로그</text:span></text:span></text:p>
      <text:p text:style-name="P4"><text:span text:style-name="Source_20_Text"><text:span text:style-name="T6">./bot.sh restart <text:s text:c="9"/></text:span></text:span><text:span text:style-name="Source_20_Text"><text:span text:style-name="T2"># </text:span></text:span><text:span text:style-name="Source_20_Text"><text:span text:style-name="T3">전체 재시작</text:span></text:span></text:p>
      <text:p text:style-name="P4"><text:span text:style-name="Source_20_Text"><text:span text:style-name="T3">tail -f /home/free4tak/k-bot/stock_bot/logs/cbot.log</text:span></text:span></text:p>
      <text:h text:style-name="Heading_20_4" text:outline-level="4">journalctl 유용한 명령</text:h>
      <text:p text:style-name="P9">bash</text:p>
      <text:p text:style-name="P3"><text:span text:style-name="Source_20_Text"><text:span text:style-name="T2"># </text:span></text:span><text:span text:style-name="Source_20_Text"><text:span text:style-name="T3">오늘 </text:span></text:span><text:span text:style-name="Source_20_Text"><text:span text:style-name="T2">nbot </text:span></text:span><text:span text:style-name="Source_20_Text"><text:span text:style-name="T3">로그</text:span></text:span></text:p>
      <text:p text:style-name="P2"><text:span text:style-name="Source_20_Text"><text:span text:style-name="T6">journalctl -u yeongam9-nbot --since today</text:span></text:span></text:p>
      <text:p text:style-name="P2"/>
      <text:p text:style-name="P3"><text:span text:style-name="Source_20_Text"><text:span text:style-name="T2"># </text:span></text:span><text:span text:style-name="Source_20_Text"><text:span text:style-name="T3">매수</text:span></text:span><text:span text:style-name="Source_20_Text"><text:span text:style-name="T2">/</text:span></text:span><text:span text:style-name="Source_20_Text"><text:span text:style-name="T3">매도만 필터</text:span></text:span></text:p>
      <text:p text:style-name="P3"><text:span text:style-name="Source_20_Text"><text:span text:style-name="T6">journalctl -u yeongam9-nbot --since today | </text:span></text:span><text:span text:style-name="Source_20_Text"><text:span text:style-name="T5">grep</text:span></text:span><text:span text:style-name="Source_20_Text"><text:span text:style-name="T6"> -E </text:span></text:span><text:span text:style-name="Source_20_Text"><text:span text:style-name="T10">"🚀|💔|💰"</text:span></text:span></text:p>
      <text:p text:style-name="P2"/>
      <text:p text:style-name="P3"><text:span text:style-name="Source_20_Text"><text:span text:style-name="T2"># </text:span></text:span><text:span text:style-name="Source_20_Text"><text:span text:style-name="T3">에러만 보기</text:span></text:span></text:p>
      <text:p text:style-name="P3"><text:span text:style-name="Source_20_Text"><text:span text:style-name="T6">journalctl -u </text:span></text:span><text:span text:style-name="Source_20_Text"><text:span text:style-name="T10">'yeongam9-*'</text:span></text:span><text:span text:style-name="Source_20_Text"><text:span text:style-name="T6"> --since today | </text:span></text:span><text:span text:style-name="Source_20_Text"><text:span text:style-name="T5">grep</text:span></text:span><text:span text:style-name="Source_20_Text"><text:span text:style-name="T6"> -E </text:span></text:span><text:span text:style-name="Source_20_Text"><text:span text:style-name="T10">"❌|⚠️|ERROR"</text:span></text:span></text:p>
      <text:p text:style-name="P2"/>
      <text:p text:style-name="P3"><text:span text:style-name="Source_20_Text"><text:span text:style-name="T2"># </text:span></text:span><text:span text:style-name="Source_20_Text"><text:span text:style-name="T3">봇 재시작 횟수 확인</text:span></text:span></text:p>
      <text:p text:style-name="P4"><text:span text:style-name="Source_20_Text"><text:span text:style-name="T6">journalctl -u yeongam9-nbot | </text:span></text:span><text:span text:style-name="Source_20_Text"><text:span text:style-name="T5">grep</text:span></text:span><text:span text:style-name="Source_20_Text"><text:span text:style-name="T6"> </text:span></text:span><text:span text:style-name="Source_20_Text"><text:span text:style-name="T10">"Started </text:span></text:span><text:span text:style-name="Source_20_Text"><text:span text:style-name="T11">영암</text:span></text:span><text:span text:style-name="Source_20_Text"><text:span text:style-name="T10">9"</text:span></text:span></text:p>
      <text:p text:style-name="Horizontal_20_Line"/>
      <text:h text:style-name="Heading_20_3" text:outline-level="3">🛡 자동 재시작 설정</text:h>
      <text:p text:style-name="P9">ini</text:p>
      <text:p text:style-name="P3"><text:span text:style-name="Source_20_Text"><text:span text:style-name="T12">Restart</text:span></text:span><text:span text:style-name="Source_20_Text"><text:span text:style-name="T13">=</text:span></text:span><text:span text:style-name="Source_20_Text"><text:span text:style-name="T10">on-failure <text:s text:c="3"/># </text:span></text:span><text:span text:style-name="Source_20_Text"><text:span text:style-name="T11">비정상 종료 시만 재시작</text:span></text:span></text:p>
      <text:p text:style-name="P3"><text:span text:style-name="Source_20_Text"><text:span text:style-name="T12">RestartSec</text:span></text:span><text:span text:style-name="Source_20_Text"><text:span text:style-name="T13">=</text:span></text:span><text:span text:style-name="Source_20_Text"><text:span text:style-name="T10">30s <text:s text:c="7"/># 30</text:span></text:span><text:span text:style-name="Source_20_Text"><text:span text:style-name="T11">초 후 재시작</text:span></text:span></text:p>
      <text:p text:style-name="P4"><text:span text:style-name="Source_20_Text"><text:span text:style-name="T12">StartLimitBurst</text:span></text:span><text:span text:style-name="Source_20_Text"><text:span text:style-name="T13">=</text:span></text:span><text:span text:style-name="Source_20_Text"><text:span text:style-name="T10">5 <text:s text:c="4"/># 5</text:span></text:span><text:span text:style-name="Source_20_Text"><text:span text:style-name="T11">분 내 </text:span></text:span><text:span text:style-name="Source_20_Text"><text:span text:style-name="T10">5</text:span></text:span><text:span text:style-name="Source_20_Text"><text:span text:style-name="T11">회 이상 실패 시 중단</text:span></text:span></text:p>
      <text:p text:style-name="P9"/>
      <text:h text:style-name="P1" text:outline-level="4">필수 (자주 수정됨)</text:h>
      <text:p text:style-name="P3"><text:span text:style-name="Source_20_Text"><text:span text:style-name="T6">kiki.py <text:s text:c="9"/>← </text:span></text:span><text:span text:style-name="Source_20_Text"><text:span text:style-name="T7">오늘 가장 많이 바뀜</text:span></text:span></text:p>
      <text:p text:style-name="P6"><text:span text:style-name="Source_20_Text"><text:span text:style-name="T6">nbot.py <text:s text:c="9"/>← </text:span></text:span><text:span text:style-name="Source_20_Text"><text:span text:style-name="T7">켈리</text:span></text:span><text:span text:style-name="Source_20_Text"><text:span text:style-name="T6">/</text:span></text:span><text:span text:style-name="Source_20_Text"><text:span text:style-name="T7">조건검색가점</text:span></text:span><text:span text:style-name="Source_20_Text"><text:span text:style-name="T6">/</text:span></text:span><text:span text:style-name="Source_20_Text"><text:span text:style-name="T7">재분析방지</text:span></text:span></text:p>
      <text:p text:style-name="P2"><text:span text:style-name="Source_20_Text"><text:span text:style-name="T6">sbot.py <text:s text:c="9"/>← </text:span></text:span><text:span text:style-name="Source_20_Text"><text:span text:style-name="T7">켈리 적용</text:span></text:span></text:p>
      <text:p text:style-name="P2"><text:span text:style-name="Source_20_Text"><text:span text:style-name="T6">strategy.py <text:s text:c="5"/>← MACD/</text:span></text:span><text:span text:style-name="Source_20_Text"><text:span text:style-name="T7">볼린저</text:span></text:span><text:span text:style-name="Source_20_Text"><text:span text:style-name="T6">/</text:span></text:span><text:span text:style-name="Source_20_Text"><text:span text:style-name="T7">수급</text:span></text:span><text:span text:style-name="Source_20_Text"><text:span text:style-name="T6">/</text:span></text:span><text:span text:style-name="Source_20_Text"><text:span text:style-name="T7">조건검색가점</text:span></text:span></text:p>
      <text:p text:style-name="P2"><text:span text:style-name="Source_20_Text"><text:span text:style-name="T6">risk_manager.py <text:s/>← </text:span></text:span><text:span text:style-name="Source_20_Text"><text:span text:style-name="T7">켈리 공식</text:span></text:span></text:p>
      <text:p text:style-name="P2"><text:soft-page-break/><text:span text:style-name="Source_20_Text"><text:span text:style-name="T6">kis_api.py <text:s text:c="6"/>← </text:span></text:span><text:span text:style-name="Source_20_Text"><text:span text:style-name="T7">네이버지수</text:span></text:span><text:span text:style-name="Source_20_Text"><text:span text:style-name="T6">/MACD/</text:span></text:span><text:span text:style-name="Source_20_Text"><text:span text:style-name="T7">당일수급</text:span></text:span></text:p>
      <text:p text:style-name="P5"><text:span text:style-name="Source_20_Text"><text:span text:style-name="T6">performance.py <text:s text:c="2"/>← </text:span></text:span><text:span text:style-name="Source_20_Text"><text:span text:style-name="T7">신규</text:span></text:span></text:p>
      <text:h text:style-name="Heading_20_4" text:outline-level="4">선택 (가끔 수정)</text:h>
      <text:p text:style-name="P3"><text:span text:style-name="Source_20_Text"><text:span text:style-name="T6">ebot.py <text:s text:c="9"/>← 15</text:span></text:span><text:span text:style-name="Source_20_Text"><text:span text:style-name="T7">시 대기</text:span></text:span></text:p>
      <text:p text:style-name="P2"><text:span text:style-name="Source_20_Text"><text:span text:style-name="T6">cbot.py <text:s text:c="9"/>← 4</text:span></text:span><text:span text:style-name="Source_20_Text"><text:span text:style-name="T7">시간봉 필터</text:span></text:span></text:p>
      <text:p text:style-name="P5"><text:span text:style-name="Source_20_Text"><text:span text:style-name="T6">kiwoom_api.py <text:s text:c="3"/>← skip_keywords</text:span></text:span></text:p>
      <text:p text:style-name="P13">***</text:p>
      <text:p text:style-name="P14"/>
      <text:p text:style-name="P14">백업 실행</text:p>
      <text:p text:style-name="P14">/bin/bash ~/backup_bot.sh </text:p>
      <text:p text:style-name="P14"/>
      <text:p text:style-name="P14">nbot.py / sbot.py / kiki.py</text:p>
      <text:p text:style-name="P14">strategy.py / risk_manager.py</text:p>
      <text:p text:style-name="P14">kis_api.py / kiwoom_api.py</text:p>
      <text:p text:style-name="P14">ai_analyzer.py / daily_review.py</text:p>
      <text:p text:style-name="P14">backtest/backtest_engine.py</text:p>
      <text:p text:style-name="P14">backtest/run_backtest.py</text:p>
      <text:p text:style-name="P14"/>
      <text:p text:style-name="P14">WORKLOG_20260517_20260519.md <text:s/>← 방금 생성</text:p>
      <text:p text:style-name="P14">WORKLOG_20260513.md <text:s text:c="10"/>← 이전 작업</text:p>
      <text:p text:style-name="P14">BACKTEST_GUIDE.md <text:s text:c="12"/>← 백테스터 가이드</text:p>
      <text:p text:style-name="P14"/>
      <text:p text:style-name="P14">```</text:p>
      <text:p text:style-name="P14"/>
      <text:p text:style-name="P14"># 영암9 작업일지 — 2026-05-17 ~ 2026-05-19</text:p>
      <text:p text:style-name="P14"><text:soft-page-break/></text:p>
      <text:p text:style-name="P14">---</text:p>
      <text:p text:style-name="P14"/>
      <text:p text:style-name="P14">## 📋 전체 요약</text:p>
      <text:p text:style-name="P14"/>
      <text:p text:style-name="P14">| 날짜 | 주요 작업 |</text:p>
      <text:p text:style-name="P14">|---|---|</text:p>
      <text:p text:style-name="P14">| 5/17 | 백테스터 버그 수정, 수급 수집, 주간 리뷰 자동화 |</text:p>
      <text:p text:style-name="P14">| 5/18 | 호가잔량, 병렬API, 브리핑 개선, market_status 동적화 |</text:p>
      <text:p text:style-name="P14">| 5/19 | KDA 대시보드, sbot 브리핑 추가, 브리핑 쿼리 개선 |</text:p>
      <text:p text:style-name="P14"/>
      <text:p text:style-name="P14">---</text:p>
      <text:p text:style-name="P14"/>
      <text:p text:style-name="P14">## 2026-05-17 (토)</text:p>
      <text:p text:style-name="P14"/>
      <text:p text:style-name="P14">### 백테스터 구축 완료</text:p>
      <text:p text:style-name="P14">- `backtest/backtest_engine.py` — iloc 버그 수정 (DataFrame/Series 판별)</text:p>
      <text:p text:style-name="P14">- `backtest/feature_builder.py` — hasattr 대신 hasattr(x, "columns") 사용</text:p>
      <text:p text:style-name="P14">- `backtest/run_backtest.py` — 시나리오 비교 추가</text:p>
      <text:p text:style-name="P14"/>
      <text:p text:style-name="P14">### 백테스트 결과 (2025-08-01 ~ 2026-05-01)</text:p>
      <text:p text:style-name="P14"><text:soft-page-break/>| 시나리오 | 수익률 | 승률 | MDD | PF |</text:p>
      <text:p text:style-name="P14">|---|---|---|---|---|</text:p>
      <text:p text:style-name="P14">| 기본(60) | -10.26% | 50.0% | -21.05% | 0.88 |</text:p>
      <text:p text:style-name="P14">| **보수적(70) ⭐** | **+5.81%** | **56.5%** | **-9.25%** | **1.16** |</text:p>
      <text:p text:style-name="P14">| 포지션少+보수적(max=3,70) | +13.07% | 59.5% | -7.42% | 1.55 |</text:p>
      <text:p text:style-name="P14"/>
      <text:p text:style-name="P14">**결론: MAX_POSITIONS=3 + 임계치70 최적**</text:p>
      <text:p text:style-name="P14"/>
      <text:p text:style-name="P14">### 수급 데이터 수집</text:p>
      <text:p text:style-name="P14">- `fetch_investor.py` 생성 — KIS FHKST01010900</text:p>
      <text:p text:style-name="P14">- 52종목 × 30일치 = 1,650건 수집</text:p>
      <text:p text:style-name="P14">- cron 등록: `30 17 * * 1-5 python3 fetch_investor.py`</text:p>
      <text:p text:style-name="P14"/>
      <text:p text:style-name="P14">### 주간 리뷰 자동화</text:p>
      <text:p text:style-name="P14">- `weekly_review.sh` — 토요일 명령 하나로 끝</text:p>
      <text:p text:style-name="P14">- `generate_report.py` — HTML 리포트 생성</text:p>
      <text:p text:style-name="P14"/>
      <text:p text:style-name="P14">---</text:p>
      <text:p text:style-name="P14"/>
      <text:p text:style-name="P14">## 2026-05-18 (일)</text:p>
      <text:p text:style-name="P14"/>
      <text:p text:style-name="P14">### 호가잔량 API 추가 (kis_api.py)</text:p>
      <text:p text:style-name="P14">```python</text:p>
      <text:p text:style-name="P14"><text:soft-page-break/>def get_hoga(self, code: str) -&gt; dict:</text:p>
      <text:p text:style-name="P14"><text:s text:c="4"/># KIS FHKST01010200</text:p>
      <text:p text:style-name="P14"><text:s text:c="4"/># total_ask_rsqn, total_bid_rsqn, ask_bid_ratio 반환</text:p>
      <text:p text:style-name="P14"><text:s text:c="4"/># 30초 캐시</text:p>
      <text:p text:style-name="P14">```</text:p>
      <text:p text:style-name="P14"/>
      <text:p text:style-name="P14">### 호가 가산점 (strategy.py get_rule_score)</text:p>
      <text:p text:style-name="P14">```python</text:p>
      <text:p text:style-name="P14">if hoga_ratio &gt;= 5.0: <text:s text:c="2"/>score += 15 <text:s/># 극단적 눌림</text:p>
      <text:p text:style-name="P14">elif hoga_ratio &gt;= 3.0: score += 10 <text:s/># ★ 핵심 타점</text:p>
      <text:p text:style-name="P14">elif hoga_ratio &gt;= 2.0: score += 5</text:p>
      <text:p text:style-name="P14">elif hoga_ratio &lt;= 0.3: score -= 10 <text:s/># 천장 위험</text:p>
      <text:p text:style-name="P14">elif hoga_ratio &lt;= 0.5: score -= 5</text:p>
      <text:p text:style-name="P14">```</text:p>
      <text:p text:style-name="P14"/>
      <text:p text:style-name="P14">### 병렬 API 호출 (nbot.py, sbot.py)</text:p>
      <text:p text:style-name="P14">- `_analyze_one_code`: 시세+호가 ThreadPoolExecutor(2) 동시 조회</text:p>
      <text:p text:style-name="P14">- 종목 분석 루프: ThreadPoolExecutor(5) 5개씩 병렬</text:p>
      <text:p text:style-name="P14">- 예상 속도: 45초 → 9초</text:p>
      <text:p text:style-name="P14"/>
      <text:p text:style-name="P14">### 젬마 제안 반영</text:p>
      <text:p text:style-name="P14">- 백테스터 max_daily_loss 하드코딩 수정 (2→5)</text:p>
      <text:p text:style-name="P14">- 분할매도 트랜잭션 원자성 (db_manager.py)</text:p>
      <text:p text:style-name="P14"><text:soft-page-break/>- ATR=0 Safe Fallback (기본값 3%)</text:p>
      <text:p text:style-name="P14">- current_price=0 ZeroDivision 방어</text:p>
      <text:p text:style-name="P14"/>
      <text:p text:style-name="P14">### AI 캐시 백테스트 모드 추가</text:p>
      <text:p text:style-name="P14">- `ai_score_mode: "cache"` — ai_cache.db 실제 점수 활용</text:p>
      <text:p text:style-name="P14">- `_get_cached_ai_score()` 메서드 추가</text:p>
      <text:p text:style-name="P14"/>
      <text:p text:style-name="P14">### MAX_POSITIONS=3 적용</text:p>
      <text:p text:style-name="P14">- 백테스트 근거: +13.07% → 거래 125건, 승률 60.8%</text:p>
      <text:p text:style-name="P14">- nbot.py MAX_POSITIONS=3 적용</text:p>
      <text:p text:style-name="P14"/>
      <text:p text:style-name="P14">### market_status 동적화 ⭐ 최대 성과</text:p>
      <text:p text:style-name="P14">- KOSPI/KOSDAQ 577일치 수집 → market_meta 테이블</text:p>
      <text:p text:style-name="P14"><text:s text:c="2"/>- normal: 523일 / weak: 34일 / stop: 20일</text:p>
      <text:p text:style-name="P14">- BacktestEngine에 `_load_market_meta()`, `_get_market_status_at()` 추가</text:p>
      <text:p text:style-name="P14">- stop 모드 매수 차단</text:p>
      <text:p text:style-name="P14"/>
      <text:p text:style-name="P14">**백테스트 결과 (동적화 후)**</text:p>
      <text:p text:style-name="P14">| 시나리오 | 이전 | 이후 | 변화 |</text:p>
      <text:p text:style-name="P14">|---|---|---|---|</text:p>
      <text:p text:style-name="P14">| 기본(60) | -10.26% | +4.27% | +14.53%p |</text:p>
      <text:p text:style-name="P14">| 보수적(70) | +5.81% | +12.74% | +6.93%p |</text:p>
      <text:p text:style-name="P14"><text:soft-page-break/>| **포지션少+보수적⭐** | **+13.07%** | **+18.07%** | **+5.00%p** |</text:p>
      <text:p text:style-name="P14"/>
      <text:p text:style-name="P14">### Death Spiral 가드레일 (daily_review.py)</text:p>
      <text:p text:style-name="P14">```python</text:p>
      <text:p text:style-name="P14">def validate_review(review: dict) -&gt; dict:</text:p>
      <text:p text:style-name="P14"><text:s text:c="4"/># "매수 금지" → "신중한 진입 유지"</text:p>
      <text:p text:style-name="P14"><text:s text:c="4"/># 신뢰도 1이하 → "기본 전략 유지"</text:p>
      <text:p text:style-name="P14"><text:s text:c="4"/># 전면 시간대 금지 → "주의"로 완화</text:p>
      <text:p text:style-name="P14">```</text:p>
      <text:p text:style-name="P14"/>
      <text:p text:style-name="P14">### 브리핑 수치 정확도 개선 (kiki.py)</text:p>
      <text:p text:style-name="P14">- 검색 결과 전체를 Claude에 주고 정확한 수치 추출</text:p>
      <text:p text:style-name="P14">- 네이버 우선 검색 (실시간성 높음)</text:p>
      <text:p text:style-name="P14">- 항목별 개별 요약 방식으로 변경</text:p>
      <text:p text:style-name="P14">- 역환율(0.000670) 방지 프롬프트 추가</text:p>
      <text:p text:style-name="P14">- 저녁 브리핑 search_results 수집 블록 추가</text:p>
      <text:p text:style-name="P14">- 미실현 손익 반영 (sbot 보유 포지션)</text:p>
      <text:p text:style-name="P14"/>
      <text:p text:style-name="P14">---</text:p>
      <text:p text:style-name="P14"/>
      <text:p text:style-name="P14">## 2026-05-19 (월)</text:p>
      <text:p text:style-name="P14"/>
      <text:p text:style-name="P14">### sbot 모닝 브리핑 추가</text:p>
      <text:p text:style-name="P14"><text:soft-page-break/>```</text:p>
      <text:p text:style-name="P14">📊 스윙봇: ▶️ | 포지션:2개 | 평가손익:+22,549원</text:p>
      <text:p text:style-name="P14">```</text:p>
      <text:p text:style-name="P14"/>
      <text:p text:style-name="P14">### 브리핑 검색 쿼리 개선</text:p>
      <text:p text:style-name="P14">- 미국장: 영어 → 한국어 네이버 검색</text:p>
      <text:p text:style-name="P14">- 환율: USD/KRW → 달러 원화 환율 오늘</text:p>
      <text:p text:style-name="P14">- 코인: 영어 → 한국어 검색</text:p>
      <text:p text:style-name="P14"/>
      <text:p text:style-name="P14">### KDA 성과 대시보드 (cmd_performance)</text:p>
      <text:p text:style-name="P14">```</text:p>
      <text:p text:style-name="P14">🎮 [영암9] Trader Performance [2026-05-19]</text:p>
      <text:p text:style-name="P14">━━━━━━━━━━━━━━━━━━━━━━━━━━━━━━</text:p>
      <text:p text:style-name="P14">⚔️ Win Rate : 60.0% (승:12 / 패:8)</text:p>
      <text:p text:style-name="P14">📊 Recent Form : ✅✅❌✅✅ [🔥 HOT STREAK]</text:p>
      <text:p text:style-name="P14">💹 Avg Win : +4.34% | Avg Loss : -2.87%</text:p>
      <text:p text:style-name="P14">━━━━━━━━━━━━━━━━━━━━━━━━━━━━━━</text:p>
      <text:p text:style-name="P14">💰 TODAY P&amp;L</text:p>
      <text:p text:style-name="P14"><text:s text:c="2"/>📈 단타봇: +XX,XXX원</text:p>
      <text:p text:style-name="P14"><text:s text:c="2"/>📊 스윙봇: +XX,XXX원</text:p>
      <text:p text:style-name="P14">━━━━━━━━━━━━━━━━━━━━━━━━━━━━━━</text:p>
      <text:p text:style-name="P14">✅ 합계: +XX,XXX원</text:p>
      <text:p text:style-name="P14">🎯 전략: 포지션 3개 | 임계치 70점 | 시장 동적 대응</text:p>
      <text:p text:style-name="P14"><text:soft-page-break/>```</text:p>
      <text:p text:style-name="P14"/>
      <text:p text:style-name="P14">### !시작 재개 시 시장 상태 안내</text:p>
      <text:p text:style-name="P14">```</text:p>
      <text:p text:style-name="P14">▶️ 단타봇 재개</text:p>
      <text:p text:style-name="P14">⚠️ 현재 시장 STOP 모드 (코스피 -3.77%)</text:p>
      <text:p text:style-name="P14">📌 신규 매수는 차단됩니다.</text:p>
      <text:p text:style-name="P14">```</text:p>
      <text:p text:style-name="P14"/>
      <text:p text:style-name="P14">---</text:p>
      <text:p text:style-name="P14"/>
      <text:p text:style-name="P14">## 📊 현재 봇 설정</text:p>
      <text:p text:style-name="P14"/>
      <text:p text:style-name="P14">### nbot.py</text:p>
      <text:p text:style-name="P14">```python</text:p>
      <text:p text:style-name="P14">MAX_POSITIONS <text:s text:c="3"/>= 3</text:p>
      <text:p text:style-name="P14">BUY_1ST_AMT_BASE = 300000</text:p>
      <text:p text:style-name="P14">BUY_SCORE_ENTER <text:s/>= 70</text:p>
      <text:p text:style-name="P14">MARKET_WEAK_THRESH = -1.5</text:p>
      <text:p text:style-name="P14">MARKET_STOP_THRESH = -3.0</text:p>
      <text:p text:style-name="P14">MAX_DAILY_LOSS <text:s text:c="2"/>= 5</text:p>
      <text:p text:style-name="P14">```</text:p>
      <text:p text:style-name="P14"/>
      <text:p text:style-name="P14"><text:soft-page-break/>### sbot.py</text:p>
      <text:p text:style-name="P14">```python</text:p>
      <text:p text:style-name="P14">MAX_POSITIONS <text:s text:c="3"/>= 2</text:p>
      <text:p text:style-name="P14">BUY_SCORE_ENTER <text:s/>= 70</text:p>
      <text:p text:style-name="P14">MAX_DAILY_LOSS <text:s text:c="2"/>= 5</text:p>
      <text:p text:style-name="P14">```</text:p>
      <text:p text:style-name="P14"/>
      <text:p text:style-name="P14">### cbot.py</text:p>
      <text:p text:style-name="P14">```python</text:p>
      <text:p text:style-name="P14">MAX_DAILY_LOSS <text:s text:c="2"/>= 5</text:p>
      <text:p text:style-name="P14"># 시드: 130만원, 1차 35만, 2차 15만, MAX 3종목</text:p>
      <text:p text:style-name="P14">```</text:p>
      <text:p text:style-name="P14"/>
      <text:p text:style-name="P14">---</text:p>
      <text:p text:style-name="P14"/>
      <text:p text:style-name="P14">## 📅 다음 작업 로드맵</text:p>
      <text:p text:style-name="P14"/>
      <text:p text:style-name="P14">| 순위 | 작업 | 시기 | 난이도 |</text:p>
      <text:p text:style-name="P14">|---|---|---|---|</text:p>
      <text:p text:style-name="P14">| 1 | 군집도 평가 | 5/25 | ⭐⭐⭐ |</text:p>
      <text:p text:style-name="P14">| 2 | 지표 상관관계 정리 | 이후 | ⭐⭐⭐⭐ |</text:p>
      <text:p text:style-name="P14">| 3 | 멀티 에이전트 | 장기 | ⭐⭐⭐⭐⭐ |</text:p>
      <text:p text:style-name="P14">| 4 | 단타 백테스터 최종 | 8월 | ⭐⭐⭐ |</text:p>
      <text:p text:style-name="P14"><text:soft-page-break/></text:p>
      <text:p text:style-name="P14">---</text:p>
      <text:p text:style-name="P14"/>
      <text:p text:style-name="P14">## 🗄️ 주요 파일 경로</text:p>
      <text:p text:style-name="P14">```</text:p>
      <text:p text:style-name="P14">봇: /home/free4tak/k-bot/stock_bot/{nbot,sbot,ebot,cbot,kiki}.py</text:p>
      <text:p text:style-name="P14">전략: strategy.py, risk_manager.py, ai_analyzer.py</text:p>
      <text:p text:style-name="P14">복기: daily_review.py</text:p>
      <text:p text:style-name="P14">백테스터: backtest/{backtest_engine,run_backtest,feature_builder}.py</text:p>
      <text:p text:style-name="P14">DB: backtest/data/backtest_data.db (OHLCV + 수급 + market_meta)</text:p>
      <text:p text:style-name="P14">AI캐시: ai_cache.db</text:p>
      <text:p text:style-name="P14">복기결과: daily_review.json</text:p>
      <text:p text:style-name="P14">섹터모니터: sector_monitor.db</text:p>
      <text:p text:style-name="P14">로그: logs/{nbot,sbot,ebot,cbot,kiki}.log</text:p>
      <text:p text:style-name="P14">```</text:p>
      <text:p text:style-name="P14"/>
      <text:p text:style-name="P14">*영암9 작업일지 — 2026-05-17~19*</text:p>
      <text:p text:style-name="P14"/>
      <text:p text:style-name="P14"/>
      <text:p text:style-name="P14"><text:span text:style-name="T9"/></text:p>
      <text:p text:style-name="P14"><text:span text:style-name="T9"/></text:p>
      <text:p text:style-name="P14"><text:soft-page-break/><text:span text:style-name="T9"/></text:p>
      <text:p text:style-name="P14"><draw:frame draw:style-name="fr1" draw:name="이미지1" text:anchor-type="char" svg:width="17cm" svg:height="27.3cm" draw:z-index="0"><draw:image xlink:href="Pictures/10000001000002A8000004444E063729.png" xlink:type="simple" xlink:show="embed" xlink:actuate="onLoad" draw:mime-type="image/png"/></draw:frame><text:soft-page-break/><text:span text:style-name="T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KR" svg:font-family="'Noto Sans Mono CJK KR'" style:font-family-generic="modern" style:font-pitch="fixed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OpenSymbol" svg:font-family="OpenSymbol" style:font-charset="x-symbol"/>
    <style:font-face style:name="var font-mono" svg:font-family="'var font-mono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 CJK KR" fo:font-size="10pt" fo:language="en" fo:country="US" style:letter-kerning="true" style:font-name-asian="Noto Serif CJK KR1" style:font-size-asian="10pt" style:language-asian="ko" style:country-asian="KR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 CJK KR" fo:font-size="10pt" fo:language="en" fo:country="US" style:letter-kerning="true" style:font-name-asian="Noto Serif CJK KR1" style:font-size-asian="10pt" style:language-asian="ko" style:country-asian="KR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0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0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KR1" style:font-family-asian="'Noto Serif CJK KR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KR" style:font-family-asian="'Noto Sans Mono CJK K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KR1" style:font-family-asian="'Noto Serif CJK KR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KR1" style:font-family-asian="'Noto Serif CJK KR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KR1" style:font-family-asian="'Noto Serif CJK KR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KR" style:font-family-asian="'Noto Sans Mono CJK KR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0T23:43:53.431236098</meta:creation-date>
    <dc:date>2026-05-21T17:19:05.788695612</dc:date>
    <meta:editing-duration>P3DT2H51M23S</meta:editing-duration>
    <meta:editing-cycles>4</meta:editing-cycles>
    <meta:generator>LibreOffice/24.2.7.2$Linux_X86_64 LibreOffice_project/420$Build-2</meta:generator>
    <meta:document-statistic meta:table-count="0" meta:image-count="1" meta:object-count="0" meta:page-count="14" meta:paragraph-count="240" meta:word-count="1820" meta:character-count="5959" meta:non-whitespace-character-count="4916"/>
  </office:meta>
</office:document-meta>
</file>