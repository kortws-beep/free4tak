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Text_20_body" style:list-style-name="L31">
      <style:paragraph-properties fo:margin-top="0cm" fo:margin-bottom="0cm" style:contextual-spacing="false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5" style:family="paragraph" style:parent-style-name="Text_20_body" style:list-style-name="L31">
      <style:paragraph-properties fo:margin-top="0cm" fo:margin-bottom="0cm" style:contextual-spacing="false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6" style:family="paragraph" style:parent-style-name="Text_20_body" style:list-style-name="L31"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2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26">장 초반 급락 안전장치</text:span></text:span></text:p>
      <text:p text:style-name="P120"><text:span text:style-name="Source_20_Text"><text:span text:style-name="T31">nbot: 09:00~09:10 | sbot: 09:00~09:20</text:span></text:span></text:p>
      <text:p text:style-name="P121"><text:span text:style-name="Source_20_Text"><text:span text:style-name="T31">코스피 -3% 이하 + 계속 하락 중</text:span></text:span></text:p>
      <text:p text:style-name="P121"><text:span text:style-name="Source_20_Text"><text:span text:style-name="T31">→ stop 강제 전환 + 최저점 추적 시작</text:span></text:span></text:p>
      <text:p text:style-name="P119"><text:span text:style-name="Strong_20_Emphasis"><text:span text:style-name="T26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>📅 향후 계획</text:h>
      <text:list text:style-name="L31">
        <text:list-item>
          <text:p text:style-name="P124"><text:span text:style-name="Strong_20_Emphasis"><text:span text:style-name="T26">5영업일</text:span></text:span><text:span text:style-name="T26"> 운영하면서 성과 관찰 </text:span></text:p>
        </text:list-item>
        <text:list-item>
          <text:p text:style-name="P124"><text:span text:style-name="Strong_20_Emphasis"><text:span text:style-name="T26">토요일</text:span></text:span><text:span text:style-name="T26"> 백테스트로 미세조정 </text:span></text:p>
          <text:list>
            <text:list-item>
              <text:p text:style-name="P125">손절선 재검증 </text:p>
            </text:list-item>
            <text:list-item>
              <text:p text:style-name="P125">반등 감지 임계값 (1%/2번) 적정성 확인 </text:p>
            </text:list-item>
            <text:list-item>
              <text:p text:style-name="P126">케이스별 성과 분석</text:p>
            </text:list-item>
          </text:list>
        </text:list-item>
      </text:list>
      <text:p text:style-name="P127"><text:span text:style-name="Source_20_Text"><text:span text:style-name="T32"/></text:span></text:p>
      <text:p text:style-name="P127"><text:span text:style-name="Source_20_Text"><text:span text:style-name="T32"/></text:span></text:p>
      <text:p text:style-name="P127"><text:span text:style-name="Source_20_Text"><text:span text:style-name="T32">alias 등록 (추천)</text:span></text:span></text:p>
      <text:p text:style-name="P127"><text:span text:style-name="Source_20_Text"><text:span text:style-name="T32">echo "alias bot='~/k-bot/stock_bot/bot.sh'" &gt;&gt; ~/.bashrc</text:span></text:span></text:p>
      <text:p text:style-name="P127"><text:span text:style-name="Source_20_Text"><text:span text:style-name="T32">source ~/.bashrc</text:span></text:span></text:p>
      <text:p text:style-name="P127"><text:span text:style-name="Source_20_Text"><text:span text:style-name="T32">/bin/bash ~/backup_bot.sh</text:span></text:span></text:p>
      <text:p text:style-name="P127"><text:span text:style-name="Source_20_Text"><text:span text:style-name="T32">ollama run qwen2.5:14b</text:span></text:span></text:p>
      <text:p text:style-name="P12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05T14:56:13.224656720</dc:date>
    <meta:editing-duration>P7DT17H7M48S</meta:editing-duration>
    <meta:editing-cycles>36</meta:editing-cycles>
    <meta:generator>LibreOffice/26.2.2.2$Linux_X86_64 LibreOffice_project/620$Build-2</meta:generator>
    <meta:document-statistic meta:table-count="8" meta:image-count="0" meta:object-count="0" meta:page-count="32" meta:paragraph-count="772" meta:word-count="4081" meta:character-count="19213" meta:non-whitespace-character-count="15696"/>
  </office:meta>
</office:document-meta>
</file>